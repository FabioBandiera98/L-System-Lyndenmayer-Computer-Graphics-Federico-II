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"/>
  <manifest:file-entry manifest:full-path="media/image2.jpg" manifest:media-type="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"/>
  <manifest:file-entry manifest:full-path="media/image6.jpg" manifest:media-type=""/>
  <manifest:file-entry manifest:full-path="media/image7.jpeg" manifest:media-type="image/jpeg"/>
  <manifest:file-entry manifest:full-path="media/image8.jpeg" manifest:media-type="image/jpeg"/>
  <manifest:file-entry manifest:full-path="media/image9.jpg" manifest:media-type="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jpg" manifest:media-type=""/>
  <manifest:file-entry manifest:full-path="media/image17.jpg" manifest:media-type="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6.3%" style:tab-stop-distance="1in" fo:margin-left="0.62292in" fo:margin-right="1.04722in" fo:text-indent="-0.57153in" fo:margin-top="0.30972in" fo:margin-bottom="0in" style:punctuation-wrap="hanging" style:vertical-align="auto">
        <style:tab-stops>
          <style:tab-stop style:position="0in"/>
          <style:tab-stop style:position="0.00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48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c2a3a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c2a3a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5b58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6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c2a3a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11816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0.35694in" style:tab-stop-distance="1in" fo:margin-left="0.01736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7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1875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15.599%" style:tab-stop-distance="1in" fo:margin-left="0.62569in" fo:margin-right="0.42014in" fo:text-indent="-0.57222in" fo:margin-top="0.30486in" fo:margin-bottom="0in" style:punctuation-wrap="hanging" style:vertical-align="auto">
        <style:tab-stops>
          <style:tab-stop style:position="0in"/>
          <style:tab-stop style:position="0.00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21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8b18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0.38681in" style:tab-stop-distance="1in" fo:margin-left="0.01389in" fo:margin-right="0in" fo:text-indent="0in" fo:margin-top="0.01875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180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9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16.3%" style:tab-stop-distance="1in" fo:margin-left="0.62569in" fo:margin-right="0.02639in" fo:text-indent="-0.57431in" fo:margin-top="0.30972in" fo:margin-bottom="0in" style:punctuation-wrap="hanging" style:vertical-align="auto">
        <style:tab-stops>
          <style:tab-stop style:position="0in"/>
          <style:tab-stop style:position="0.002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5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133323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.03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1c312a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2">
      <style:paragraph-properties fo:line-height="100%" style:tab-stop-distance="1in" fo:margin-left="0.04167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4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5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-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6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7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-0.021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8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9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-0.021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0">
      <style:text-properties fo:color="#28332a" fo:font-family="Times New Roman" style:font-family-complex="Times New Roman" fo:font-size="0.31944in" style:font-size-asian="0.31944in" style:font-size-complex="0.31944in" fo:letter-spacing="0.02292in"/>
    </style:style>
    <style:style style:family="text" style:name="a2001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002">
      <style:text-properties fo:color="#28332a" fo:font-family="Times New Roman" style:font-family-complex="Times New Roman" fo:font-size="0.31944in" style:font-size-asian="0.31944in" style:font-size-complex="0.31944in" fo:letter-spacing="0.01042in"/>
    </style:style>
    <style:style style:family="text" style:name="a2210">
      <style:text-properties fo:font-variant="normal" fo:text-transform="none" fo:color="#0f1f0f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3">
      <style:text-properties fo:color="#28332a" fo:font-family="Times New Roman" style:font-family-complex="Times New Roman" fo:font-size="0.31944in" style:font-size-asian="0.31944in" style:font-size-complex="0.31944in" fo:letter-spacing="0.00972in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color="#28332a" fo:font-family="Times New Roman" style:font-family-complex="Times New Roman" fo:font-size="0.31944in" style:font-size-asian="0.31944in" style:font-size-complex="0.31944in"/>
    </style:style>
    <style:style style:family="paragraph" style:name="a2212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color="#28332a" fo:font-family="Times New Roman" style:font-family-complex="Times New Roman" fo:font-size="0.31944in" style:font-size-asian="0.31944in" style:font-size-complex="0.31944in" fo:letter-spacing="-0.00694in"/>
    </style:style>
    <style:style style:family="graphic" style:name="a2213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6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21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color="#28332a" fo:font-family="Times New Roman" style:font-family-complex="Times New Roman" fo:font-size="0.31944in" style:font-size-asian="0.31944in" style:font-size-complex="0.31944in" fo:letter-spacing="0.02292in"/>
    </style:style>
    <style:style style:family="text" style:name="a221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283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21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color="#28332a" fo:font-family="Times New Roman" style:font-family-complex="Times New Roman" fo:font-size="0.31944in" style:font-size-asian="0.31944in" style:font-size-complex="0.31944in" fo:letter-spacing="0.00903in"/>
    </style:style>
    <style:style style:family="text" style:name="a221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27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2011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2012">
      <style:paragraph-properties fo:line-height="100%" fo:margin-top="0.35208in">
        <style:tab-stops>
          <style:tab-stop style:position="2.78958in"/>
        </style:tab-stops>
      </style:paragraph-properties>
    </style:style>
    <style:style style:family="text" style:name="a222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972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55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4">
      <style:table-cell-properties style:vertical-align="top" fo:padding-top="0.35208in" fo:padding-bottom="0in" fo:padding-left="0in" fo:padding-right="0in"/>
      <style:paragraph-properties style:writing-mode="lr-tb"/>
    </style:style>
    <style:style style:family="text" style:name="a222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181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color="#28332a" fo:font-family="Times New Roman" style:font-family-complex="Times New Roman" fo:font-size="0.31944in" style:font-size-asian="0.31944in" style:font-size-complex="0.31944in" fo:letter-spacing="0.00764in"/>
    </style:style>
    <style:style style:family="text" style:name="a222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625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color="#28332a" fo:font-family="Times New Roman" style:font-family-complex="Times New Roman" fo:font-size="0.31944in" style:font-size-asian="0.31944in" style:font-size-complex="0.31944in" fo:letter-spacing="0.00625in"/>
    </style:style>
    <style:style style:family="text" style:name="a222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69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22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138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color="#28332a" fo:font-family="Times New Roman" style:font-family-complex="Times New Roman" fo:font-size="0.31944in" style:font-size-asian="0.31944in" style:font-size-complex="0.31944in" fo:letter-spacing="0.01042in"/>
    </style:style>
    <style:style style:family="text" style:name="a222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45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22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1111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45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972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color="#28332a" fo:font-family="Times New Roman" style:font-family-complex="Times New Roman" fo:font-size="0.31944in" style:font-size-asian="0.31944in" style:font-size-complex="0.31944in" fo:letter-spacing="0.00208in"/>
    </style:style>
    <style:style style:family="text" style:name="a2021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2022">
      <style:text-properties fo:color="#28332a" fo:font-family="Times New Roman" style:font-family-complex="Times New Roman" fo:font-size="0.31944in" style:font-size-asian="0.31944in" style:font-size-complex="0.31944in" fo:letter-spacing="-0.00833in"/>
    </style:style>
    <style:style style:family="text" style:name="a223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69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223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90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color="#28332a" fo:font-family="Times New Roman" style:font-family-complex="Times New Roman" fo:font-size="0.31944in" style:font-size-asian="0.31944in" style:font-size-complex="0.31944in" fo:letter-spacing="0.00625in"/>
    </style:style>
    <style:style style:family="text" style:name="a223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042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color="#28332a" fo:font-family="Times New Roman" style:font-family-complex="Times New Roman" fo:font-size="0.31944in" style:font-size-asian="0.31944in" style:font-size-complex="0.31944in" fo:letter-spacing="-0.01583in"/>
    </style:style>
    <style:style style:family="text" style:name="a223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76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color="#28332a" fo:font-family="Times New Roman" style:font-family-complex="Times New Roman" fo:font-size="0.31944in" style:font-size-asian="0.31944in" style:font-size-complex="0.31944in" fo:letter-spacing="-0.00486in"/>
    </style:style>
    <style:style style:family="text" style:name="a223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color="#28332a" fo:font-family="Times New Roman" style:font-family-complex="Times New Roman" fo:font-size="0.31944in" style:font-size-asian="0.31944in" style:font-size-complex="0.31944in" fo:letter-spacing="0.01806in"/>
    </style:style>
    <style:style style:family="text" style:name="a223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326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color="#28332a" fo:font-family="Times New Roman" style:font-family-complex="Times New Roman" fo:font-size="0.31944in" style:font-size-asian="0.31944in" style:font-size-complex="0.31944in" fo:letter-spacing="-0.02292in"/>
    </style:style>
    <style:style style:family="text" style:name="a223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223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417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972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2031">
      <style:paragraph-properties fo:line-height="100%" fo:margin-left="0.00486in" fo:margin-right="0.01319in" fo:margin-top="0.35208in"/>
    </style:style>
    <style:style style:family="text" style:name="a224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3">
      <style:table-cell-properties style:vertical-align="top" fo:padding-top="0.35208in" fo:padding-bottom="0in" fo:padding-left="0in" fo:padding-right="0in"/>
      <style:paragraph-properties style:writing-mode="lr-tb"/>
    </style:style>
    <style:style style:family="text" style:name="a224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972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family="Times New Roman" style:font-family-complex="Times New Roman" fo:font-size="0.33333in" style:font-size-asian="0.33333in" style:font-size-complex="0.33333in"/>
    </style:style>
    <style:style style:family="text" style:name="a224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/>
    </style:style>
    <style:style style:family="text" style:name="a224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667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7">
      <style:table-cell-properties style:vertical-align="top" fo:border-right="0.02083in solid #000000" fo:padding-top="0in" fo:padding-bottom="0in" fo:padding-left="0in" fo:padding-right="0in"/>
      <style:paragraph-properties style:writing-mode="lr-tb"/>
    </style:style>
    <style:style style:family="text" style:name="a224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29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38">
      <style:table-row-properties style:row-height="0.05139in"/>
    </style:style>
    <style:style style:family="text" style:name="a224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83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family="Times New Roman" style:font-family-complex="Times New Roman" fo:font-size="0.01389in" style:font-size-asian="0.01389in" style:font-size-complex="0.01389in"/>
    </style:style>
    <style:style style:family="text" style:name="a224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13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/>
    </style:style>
    <style:style style:family="table-cell" style:name="a2042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25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family="Times New Roman" style:font-family-complex="Times New Roman" fo:font-size="0.01389in" style:font-size-asian="0.01389in" style:font-size-complex="0.01389in"/>
    </style:style>
    <style:style style:family="text" style:name="a225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margin-right="0.00347in"/>
    </style:style>
    <style:style style:family="text" style:name="a225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111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83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25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13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family="Times New Roman" style:font-family-complex="Times New Roman" fo:font-size="0.01389in" style:font-size-asian="0.01389in" style:font-size-complex="0.01389in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/>
    </style:style>
    <style:style style:family="paragraph" style:name="a2256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59" style:parent-style-name="Graphics">
      <style:graphic-properties draw:fill="none" draw:stroke="none"/>
    </style:style>
    <style:style style:family="table-cell" style:name="a205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51">
      <style:text-properties fo:font-family="Times New Roman" style:font-family-complex="Times New Roman" fo:font-size="0.01389in" style:font-size-asian="0.01389in" style:font-size-complex="0.01389in"/>
    </style:style>
    <style:style style:family="paragraph" style:name="a2052">
      <style:paragraph-properties fo:line-height="100%"/>
    </style:style>
    <style:style style:family="table-cell" style:name="a205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55">
      <style:text-properties fo:font-family="Times New Roman" style:font-family-complex="Times New Roman" fo:font-size="0.01389in" style:font-size-asian="0.01389in" style:font-size-complex="0.01389in"/>
    </style:style>
    <style:style style:family="paragraph" style:name="a2056">
      <style:paragraph-properties fo:line-height="100%" fo:margin-right="0.01319in"/>
    </style:style>
    <style:style style:family="table-cell" style:name="a2058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59">
      <style:text-properties fo:font-family="Times New Roman" style:font-family-complex="Times New Roman" fo:font-size="0.01389in" style:font-size-asian="0.01389in" style:font-size-complex="0.01389in"/>
    </style:style>
    <style:style style:family="paragraph" style:name="a2060">
      <style:paragraph-properties fo:line-height="100%"/>
    </style:style>
    <style:style style:family="table-cell" style:name="a2062">
      <style:table-cell-properties style:vertical-align="top" fo:border-right="0.02083in solid #000000" fo:padding-top="0in" fo:padding-bottom="0in" fo:padding-left="0in" fo:padding-right="0in"/>
      <style:paragraph-properties style:writing-mode="lr-tb"/>
    </style:style>
    <style:style style:family="drawing-page" style:name="a20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29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1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6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wrap" fo:padding-top="0.0263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95" style:parent-style-name="Graphics">
      <style:graphic-properties draw:fill="none" draw:stroke="none"/>
    </style:style>
    <style:style style:family="drawing-page" style:name="a20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able-cell" style:name="a1900">
      <style:table-cell-properties style:vertical-align="top" fo:border-bottom="0.00347in solid #d3dbd8" fo:padding-top="0in" fo:padding-bottom="0in" fo:padding-left="0in" fo:padding-right="0in"/>
      <style:paragraph-properties style:writing-mode="lr-tb"/>
    </style:style>
    <style:style style:family="text" style:name="a1901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1902">
      <style:paragraph-properties fo:line-height="100%" fo:margin-top="0.00208in"/>
    </style:style>
    <style:style style:family="text" style:name="a1904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905">
      <style:text-properties fo:color="#28332a" fo:font-family="Times New Roman" style:font-family-complex="Times New Roman" fo:font-size="0.31944in" style:font-size-asian="0.31944in" style:font-size-complex="0.31944in" fo:letter-spacing="0.01528in"/>
    </style:style>
    <style:style style:family="text" style:name="a1906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907">
      <style:text-properties fo:color="#28332a" fo:font-family="Times New Roman" style:font-family-complex="Times New Roman" fo:font-size="0.31944in" style:font-size-asian="0.31944in" style:font-size-complex="0.31944in" fo:letter-spacing="-0.00486in"/>
    </style:style>
    <style:style style:family="text" style:name="a1908">
      <style:text-properties fo:color="#28332a" fo:font-family="Times New Roman" style:font-family-complex="Times New Roman" fo:font-size="0.31944in" style:font-size-asian="0.31944in" style:font-size-complex="0.31944in" fo:letter-spacing="0.0375in"/>
    </style:style>
    <style:style style:family="text" style:name="a1909">
      <style:text-properties fo:color="#28332a" fo:font-family="Times New Roman" style:font-family-complex="Times New Roman" fo:font-size="0.31944in" style:font-size-asian="0.31944in" style:font-size-complex="0.31944in" fo:letter-spacing="0.01875in"/>
    </style:style>
    <style:style style:family="text" style:name="a170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70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color="#28332a" fo:font-family="Times New Roman" style:font-family-complex="Times New Roman" fo:font-size="0.31944in" style:font-size-asian="0.31944in" style:font-size-complex="0.31944in" fo:letter-spacing="-0.00903in"/>
    </style:style>
    <style:style style:family="text" style:name="a170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color="#28332a" fo:font-family="Times New Roman" style:font-family-complex="Times New Roman" fo:font-size="0.31944in" style:font-size-asian="0.31944in" style:font-size-complex="0.31944in" fo:letter-spacing="0.01111in"/>
    </style:style>
    <style:style style:family="text" style:name="a170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family="Times New Roman" style:font-family-complex="Times New Roman" fo:font-size="0.31944in" style:font-size-asian="0.31944in" style:font-size-complex="0.31944in"/>
    </style:style>
    <style:style style:family="text" style:name="a170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/>
    </style:style>
    <style:style style:family="text" style:name="a170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6">
      <style:table-cell-properties style:vertical-align="top" fo:border-bottom="0.00347in solid #d3dbd8" fo:padding-top="0.00208in" fo:padding-bottom="0in" fo:padding-left="0in" fo:padding-right="0in"/>
      <style:paragraph-properties style:writing-mode="lr-tb"/>
    </style:style>
    <style:style style:family="text" style:name="a170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1918">
      <style:paragraph-properties fo:line-height="100%" fo:margin-right="0.01319in" fo:margin-top="0.00208in"/>
    </style:style>
    <style:style style:family="text" style:name="a150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71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color="#28332a" fo:font-family="Times New Roman" style:font-family-complex="Times New Roman" fo:font-size="0.31944in" style:font-size-asian="0.31944in" style:font-size-complex="0.31944in" fo:letter-spacing="0.01458in"/>
    </style:style>
    <style:style style:family="text" style:name="a150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50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13.9%" style:tab-stop-distance="1in" fo:margin-left="0.61597in" fo:margin-right="0.38125in" fo:text-indent="-0.56389in" fo:margin-top="0.30972in" fo:margin-bottom="0in" style:punctuation-wrap="hanging" style:vertical-align="auto">
        <style:tab-stops>
          <style:tab-stop style:position="0in"/>
          <style:tab-stop style:position="0.00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color="#28332a" fo:font-family="Times New Roman" style:font-family-complex="Times New Roman" fo:font-size="0.31944in" style:font-size-asian="0.31944in" style:font-size-complex="0.31944in" fo:letter-spacing="0.01806in"/>
    </style:style>
    <style:style style:family="paragraph" style:name="a15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color="#28332a" fo:font-family="Times New Roman" style:font-family-complex="Times New Roman" fo:font-size="0.31944in" style:font-size-asian="0.31944in" style:font-size-complex="0.31944in"/>
    </style:style>
    <style:style style:family="graphic" style:name="a1717">
      <style:graphic-properties fo:wrap-option="wrap" fo:padding-top="0.0263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5">
      <style:text-properties fo:color="#28332a" fo:font-family="Times New Roman" style:font-family-complex="Times New Roman" fo:font-size="0.31944in" style:font-size-asian="0.31944in" style:font-size-complex="0.31944in" fo:letter-spacing="0.00972in"/>
    </style:style>
    <style:style style:family="text" style:name="a150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 style:parent-style-name="Graphics">
      <style:graphic-properties draw:fill="none" draw:stroke="none"/>
    </style:style>
    <style:style style:family="text" style:name="a1926">
      <style:text-properties fo:color="#28332a" fo:font-family="Times New Roman" style:font-family-complex="Times New Roman" fo:font-size="0.31944in" style:font-size-asian="0.31944in" style:font-size-complex="0.31944in" fo:letter-spacing="0.02708in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27">
      <style:text-properties fo:color="#28332a" fo:font-family="Times New Roman" style:font-family-complex="Times New Roman" fo:font-size="0.31944in" style:font-size-asian="0.31944in" style:font-size-complex="0.31944in" fo:letter-spacing="0.02778in"/>
    </style:style>
    <style:style style:family="text" style:name="a1928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929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13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style:tab-stop-distance="1in" fo:margin-left="0in" fo:margin-right="0in" fo:text-indent="0in" fo:margin-top="0.12153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-0.042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margin-left="0.01042in" fo:margin-right="0.01319in"/>
    </style:style>
    <style:style style:family="text" style:name="a151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-0.024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2">
      <style:table-cell-properties style:vertical-align="top" fo:border-bottom="0.00347in solid #d3dbd8" fo:padding-top="0.00208in" fo:padding-bottom="0in" fo:padding-left="0in" fo:padding-right="0in"/>
      <style:paragraph-properties style:writing-mode="lr-tb"/>
    </style:style>
    <style:style style:family="text" style:name="a130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family="Times New Roman" style:font-family-complex="Times New Roman" fo:font-size="0.33333in" style:font-size-asian="0.33333in" style:font-size-complex="0.33333in"/>
    </style:style>
    <style:style style:family="text" style:name="a151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/>
    </style:style>
    <style:style style:family="text" style:name="a151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auto-grow-width="false" draw:auto-grow-height="false"/>
      <style:paragraph-properties style:font-independent-line-spacing="true" style:writing-mode="lr-tb"/>
    </style:style>
    <style:style style:family="table-cell" style:name="a1936">
      <style:table-cell-properties style:vertical-align="top" fo:border-bottom="0.00347in solid #d3dbd8" fo:border-right="0.02083in solid #000000" fo:padding-top="0in" fo:padding-bottom="0in" fo:padding-left="0in" fo:padding-right="0in"/>
      <style:paragraph-properties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37">
      <style:table-row-properties style:row-height="1.14514in"/>
    </style:style>
    <style:style style:family="text" style:name="a1938">
      <style:text-properties fo:font-family="Times New Roman" style:font-family-complex="Times New Roman" fo:font-size="0.33333in" style:font-size-asian="0.33333in" style:font-size-complex="0.33333in"/>
    </style:style>
    <style:style style:family="paragraph" style:name="a1939">
      <style:paragraph-properties fo:line-height="100%"/>
    </style:style>
    <style:style style:family="text" style:name="a110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style:tab-stop-distance="1in" fo:margin-left="0.46458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6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77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941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52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2">
      <style:text-properties fo:color="#1fae80" fo:font-family="Arial" style:font-family-complex="Arial" fo:font-size="0.40278in" style:font-size-asian="0.40278in" style:font-size-complex="0.40278in" fo:letter-spacing="-0.00694in" fo:language="it" fo:country="IT"/>
    </style:style>
    <style:style style:family="text" style:name="a152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2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3">
      <style:text-properties fo:color="#1fae80" fo:font-family="Arial" style:font-family-complex="Arial" fo:font-size="0.40278in" style:font-size-asian="0.40278in" style:font-size-complex="0.40278in" fo:letter-spacing="-0.00694in"/>
    </style:style>
    <style:style style:family="paragraph" style:name="a15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4">
      <style:paragraph-properties fo:line-height="100%" fo:margin-left="0.01875in" fo:margin-right="0.00347in" fo:margin-top="0.28611in"/>
    </style:style>
    <style:style style:family="text" style:name="a1737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90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2833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946">
      <style:table-cell-properties style:vertical-align="top" fo:border-top="0.00347in solid #d3dbd8" fo:padding-top="0.28611in" fo:padding-bottom="0in" fo:padding-left="0in" fo:padding-right="0in"/>
      <style:paragraph-properties style:writing-mode="lr-tb"/>
    </style:style>
    <style:style style:family="paragraph" style:name="a1739">
      <style:paragraph-properties fo:line-height="100%" style:tab-stop-distance="1in" fo:margin-left="0.04792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family="Times New Roman" style:font-family-complex="Times New Roman" fo:font-size="0.33333in" style:font-size-asian="0.33333in" style:font-size-complex="0.33333in"/>
    </style:style>
    <style:style style:family="paragraph" style:name="a1948">
      <style:paragraph-properties fo:line-height="100%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0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53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solid" draw:fill-color="#1133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53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style:tab-stop-distance="1in" fo:margin-left="0.675in" fo:margin-right="0in" fo:text-indent="-0.21528in" fo:margin-top="0.22153in" fo:margin-bottom="0in" style:punctuation-wrap="hanging" style:vertical-align="auto">
        <style:tab-stops>
          <style:tab-stop style:position="0in"/>
          <style:tab-stop style:position="1.66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744">
      <style:table-properties style:writing-mode="lr-tb"/>
    </style:style>
    <style:style style:family="text" style:name="a1952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53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5">
      <style:table-column-properties style:column-width="0.42778in"/>
    </style:style>
    <style:style style:family="text" style:name="a1953">
      <style:text-properties fo:color="#28332a" fo:font-family="Times New Roman" style:font-family-complex="Times New Roman" fo:font-size="0.31944in" style:font-size-asian="0.31944in" style:font-size-complex="0.31944in" fo:letter-spacing="0.025in"/>
    </style:style>
    <style:style style:family="text" style:name="a153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1746">
      <style:table-column-properties style:column-width="1.57778in"/>
    </style:style>
    <style:style style:family="text" style:name="a1954">
      <style:text-properties fo:color="#28332a" fo:font-family="Times New Roman" style:font-family-complex="Times New Roman" fo:font-size="0.31944in" style:font-size-asian="0.31944in" style:font-size-complex="0.31944in" fo:letter-spacing="-0.01667in"/>
    </style:style>
    <style:style style:family="text" style:name="a153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7">
      <style:table-column-properties style:column-width="1.35069in"/>
    </style:style>
    <style:style style:family="text" style:name="a1955">
      <style:text-properties fo:color="#28332a" fo:font-family="Times New Roman" style:font-family-complex="Times New Roman" fo:font-size="0.31944in" style:font-size-asian="0.31944in" style:font-size-complex="0.31944in" fo:letter-spacing="0.00833in"/>
    </style:style>
    <style:style style:family="paragraph" style:name="a153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8">
      <style:table-column-properties style:column-width="7.21806in"/>
    </style:style>
    <style:style style:family="text" style:name="a1956">
      <style:text-properties fo:color="#28332a" fo:font-family="Times New Roman" style:font-family-complex="Times New Roman" fo:font-size="0.31944in" style:font-size-asian="0.31944in" style:font-size-complex="0.31944in" fo:letter-spacing="-0.00069in"/>
    </style:style>
    <style:style style:family="table-column" style:name="a1749">
      <style:table-column-properties style:column-width="6.73958in"/>
    </style:style>
    <style:style style:family="text" style:name="a1957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958">
      <style:text-properties fo:color="#28332a" fo:font-family="Times New Roman" style:font-family-complex="Times New Roman" fo:font-size="0.31944in" style:font-size-asian="0.31944in" style:font-size-complex="0.31944in" fo:letter-spacing="-0.01319in"/>
    </style:style>
    <style:style style:family="text" style:name="a1959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12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50">
      <style:table-column-properties style:column-width="1.96806in"/>
    </style:style>
    <style:style style:family="paragraph" style:name="a154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1">
      <style:table-row-properties style:row-height="0.44375in"/>
    </style:style>
    <style:style style:family="text" style:name="a133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family="Times New Roman" style:font-family-complex="Times New Roman" fo:font-size="0.33333in" style:font-size-asian="0.33333in" style:font-size-complex="0.33333in"/>
    </style:style>
    <style:style style:family="text" style:name="a1960">
      <style:text-properties fo:font-family="Times New Roman" style:font-family-complex="Times New Roman" fo:font-size="0.31944in" style:font-size-asian="0.31944in" style:font-size-complex="0.31944in"/>
    </style:style>
    <style:style style:family="text" style:name="a154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/>
    </style:style>
    <style:style style:family="paragraph" style:name="a1961">
      <style:paragraph-properties fo:line-height="100%" fo:margin-left="0.00278in" fo:margin-top="0.36042in"/>
    </style:style>
    <style:style style:family="paragraph" style:name="a15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343f38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.06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27083in" style:font-size-asian="0.27083in" style:font-size-complex="0.2708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5">
      <style:table-cell-properties style:vertical-align="top" fo:border-bottom="0.00347in solid #d3dbd8" fo:padding-top="0in" fo:padding-bottom="0in" fo:padding-left="0in" fo:padding-right="0in"/>
      <style:paragraph-properties style:writing-mode="lr-tb"/>
    </style:style>
    <style:style style:family="table-cell" style:name="a1963">
      <style:table-cell-properties style:vertical-align="top" fo:border-top="0.00347in solid #d3dbd8" fo:padding-top="0.36042in" fo:padding-bottom="0in" fo:padding-left="0in" fo:padding-right="0in"/>
      <style:paragraph-properties style:writing-mode="lr-tb"/>
    </style:style>
    <style:style style:family="text" style:name="a154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color="#f2f9f2" fo:font-family="Arial" style:font-family-complex="Arial" fo:font-size="0.30556in" style:font-size-asian="0.30556in" style:font-size-complex="0.30556in" fo:letter-spacing="0.01806in" fo:font-weight="bold" style:font-weight-asian="bold" style:font-weight-complex="bold"/>
    </style:style>
    <style:style style:family="text" style:name="a1964">
      <style:text-properties fo:color="#28332a" fo:font-family="Times New Roman" style:font-family-complex="Times New Roman" fo:font-size="0.31944in" style:font-size-asian="0.31944in" style:font-size-complex="0.31944in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family="Arial" style:font-family-complex="Arial" fo:font-size="0.30556in" style:font-size-asian="0.30556in" style:font-size-complex="0.30556in"/>
    </style:style>
    <style:style style:family="text" style:name="a1965">
      <style:text-properties fo:color="#28332a" fo:font-family="Times New Roman" style:font-family-complex="Times New Roman" fo:font-size="0.31944in" style:font-size-asian="0.31944in" style:font-size-complex="0.31944in" fo:letter-spacing="0.02431in"/>
    </style:style>
    <style:style style:family="graphic" style:name="a1549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8">
      <style:paragraph-properties fo:line-height="100%" fo:margin-top="0.02153in"/>
    </style:style>
    <style:style style:family="text" style:name="a1966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80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color="#28332a" fo:font-family="Times New Roman" style:font-family-complex="Times New Roman" fo:font-size="0.31944in" style:font-size-asian="0.31944in" style:font-size-complex="0.31944in" fo:letter-spacing="0.02917in"/>
    </style:style>
    <style:style style:family="text" style:name="a80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80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color="#28332a" fo:font-family="Times New Roman" style:font-family-complex="Times New Roman" fo:font-size="0.31944in" style:font-size-asian="0.31944in" style:font-size-complex="0.31944in" fo:letter-spacing="-0.00625in"/>
    </style:style>
    <style:style style:family="text" style:name="a80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18.7%" style:tab-stop-distance="1in" fo:margin-left="0.01389in" fo:margin-right="0.00556in" fo:text-indent="0.0125in" fo:margin-top="0.22361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d8a15e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8">
      <style:text-properties fo:font-variant="normal" fo:text-transform="none" fo:color="#d8a15e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d8a15e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style:tab-stop-distance="1in" fo:margin-left="0.67083in" fo:margin-right="0in" fo:text-indent="-0.21111in" fo:margin-top="0.23958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0">
      <style:table-cell-properties style:vertical-align="top" fo:background-color="#113323" fo:padding-top="0.02153in" fo:padding-bottom="0in" fo:padding-left="0in" fo:padding-right="0in"/>
      <style:paragraph-properties style:writing-mode="lr-tb"/>
    </style:style>
    <style:style style:family="paragraph" style:name="a15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family="Times New Roman" style:font-family-complex="Times New Roman" fo:font-size="0.33333in" style:font-size-asian="0.33333in" style:font-size-complex="0.33333in"/>
    </style:style>
    <style:style style:family="graphic" style:name="a15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/>
    </style:style>
    <style:style style:family="text" style:name="a1970">
      <style:text-properties fo:color="#28332a" fo:font-family="Times New Roman" style:font-family-complex="Times New Roman" fo:font-size="0.31944in" style:font-size-asian="0.31944in" style:font-size-complex="0.31944in" fo:letter-spacing="0.02014in"/>
    </style:style>
    <style:style style:family="text" style:name="a155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color="#28332a" fo:font-family="Times New Roman" style:font-family-complex="Times New Roman" fo:font-size="0.31944in" style:font-size-asian="0.31944in" style:font-size-complex="0.31944in" fo:letter-spacing="0.04236in"/>
    </style:style>
    <style:style style:family="text" style:name="a155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972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55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8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color="#f2f9f2" fo:font-family="Arial" style:font-family-complex="Arial" fo:font-size="0.30556in" style:font-size-asian="0.30556in" style:font-size-complex="0.30556in" fo:letter-spacing="0.0125in" fo:font-weight="bold" style:font-weight-asian="bold" style:font-weight-complex="bold"/>
    </style:style>
    <style:style style:family="text" style:name="a1973">
      <style:text-properties fo:font-family="Times New Roman" style:font-family-complex="Times New Roman" fo:font-size="0.31944in" style:font-size-asian="0.31944in" style:font-size-complex="0.31944in"/>
    </style:style>
    <style:style style:family="text" style:name="a155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9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color="#f2f9f2" fo:font-family="Arial" style:font-family-complex="Arial" fo:font-size="0.30556in" style:font-size-asian="0.30556in" style:font-size-complex="0.30556in" fo:letter-spacing="0.00486in" fo:font-weight="bold" style:font-weight-asian="bold" style:font-weight-complex="bold"/>
    </style:style>
    <style:style style:family="paragraph" style:name="a1974">
      <style:paragraph-properties fo:line-height="100%" fo:margin-left="0.01042in" fo:margin-right="0.01319in" fo:margin-top="0.36042in"/>
    </style:style>
    <style:style style:family="text" style:name="a155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6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7">
      <style:text-properties fo:color="#f2f9f2" fo:font-family="Arial" style:font-family-complex="Arial" fo:font-size="0.30556in" style:font-size-asian="0.30556in" style:font-size-complex="0.30556in" fo:letter-spacing="0.01319in" fo:font-weight="bold" style:font-weight-asian="bold" style:font-weight-complex="bold"/>
    </style:style>
    <style:style style:family="text" style:name="a155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76">
      <style:table-cell-properties style:vertical-align="top" fo:border-top="0.00347in solid #d3dbd8" fo:padding-top="0.36042in" fo:padding-bottom="0in" fo:padding-left="0in" fo:padding-right="0in"/>
      <style:paragraph-properties style:writing-mode="lr-tb"/>
    </style:style>
    <style:style style:family="text" style:name="a1768">
      <style:text-properties fo:color="#f2f9f2" fo:font-family="Arial" style:font-family-complex="Arial" fo:font-size="0.30556in" style:font-size-asian="0.30556in" style:font-size-complex="0.30556in" fo:letter-spacing="0.025in" fo:font-weight="bold" style:font-weight-asian="bold" style:font-weight-complex="bold"/>
    </style:style>
    <style:style style:family="graphic" style:name="a602" style:parent-style-name="Graphics">
      <style:graphic-properties draw:fill="none" draw:stroke="none"/>
    </style:style>
    <style:style style:family="text" style:name="a1977">
      <style:text-properties fo:font-family="Times New Roman" style:font-family-complex="Times New Roman" fo:font-size="0.33333in" style:font-size-asian="0.33333in" style:font-size-complex="0.33333in"/>
    </style:style>
    <style:style style:family="text" style:name="a810">
      <style:text-properties fo:font-variant="normal" fo:text-transform="none" fo:color="#d8a15e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1736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9">
      <style:text-properties fo:color="#f2f9f2" fo:font-family="Arial" style:font-family-complex="Arial" fo:font-size="0.30556in" style:font-size-asian="0.30556in" style:font-size-complex="0.30556in" fo:letter-spacing="0.00556in" fo:font-weight="bold" style:font-weight-asian="bold" style:font-weight-complex="bold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8">
      <style:paragraph-properties fo:line-height="100%"/>
    </style:style>
    <style:style style:family="paragraph" style:name="a811">
      <style:paragraph-properties fo:line-height="100%" style:tab-stop-distance="1in" fo:margin-left="0.013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5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6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7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6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9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family="Arial" style:font-family-complex="Arial" fo:font-size="0.30556in" style:font-size-asian="0.30556in" style:font-size-complex="0.30556in"/>
    </style:style>
    <style:style style:family="text" style:name="a156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680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100%" fo:margin-top="0.02153in"/>
    </style:style>
    <style:style style:family="text" style:name="a156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032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 style:parent-style-name="Graphics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0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56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29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3">
      <style:table-cell-properties style:vertical-align="top" fo:padding-top="0.02153in" fo:padding-bottom="0in" fo:padding-left="0in" fo:padding-right="0in"/>
      <style:paragraph-properties style:writing-mode="lr-tb"/>
    </style:style>
    <style:style style:family="table-row" style:name="a1981">
      <style:table-row-properties style:row-height="0.96389in"/>
    </style:style>
    <style:style style:family="paragraph" style:name="a1565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22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color="#f2f9f2" fo:font-family="Arial" style:font-family-complex="Arial" fo:font-size="0.30556in" style:font-size-asian="0.30556in" style:font-size-complex="0.30556in" fo:letter-spacing="0.01528in" fo:font-weight="bold" style:font-weight-asian="bold" style:font-weight-complex="bold"/>
    </style:style>
    <style:style style:family="text" style:name="a1982">
      <style:text-properties fo:font-family="Times New Roman" style:font-family-complex="Times New Roman" fo:font-size="0.33333in" style:font-size-asian="0.33333in" style:font-size-complex="0.33333in"/>
    </style:style>
    <style:style style:family="presentation" style:name="a1566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color="#f2f9f2" fo:font-family="Arial" style:font-family-complex="Arial" fo:font-size="0.30556in" style:font-size-asian="0.30556in" style:font-size-complex="0.30556in" fo:letter-spacing="0.00903in" fo:font-weight="bold" style:font-weight-asian="bold" style:font-weight-complex="bold"/>
    </style:style>
    <style:style style:family="paragraph" style:name="a1983">
      <style:paragraph-properties fo:line-height="100%"/>
    </style:style>
    <style:style style:family="text" style:name="a156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5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color="#f2f9f2" fo:font-family="Arial" style:font-family-complex="Arial" fo:font-size="0.30556in" style:font-size-asian="0.30556in" style:font-size-complex="0.30556in" fo:letter-spacing="0.01319in" fo:font-weight="bold" style:font-weight-asian="bold" style:font-weight-complex="bold"/>
    </style:style>
    <style:style style:family="text" style:name="a156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.04167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5">
      <style:table-cell-properties style:vertical-align="top" fo:border-left="0.01042in solid #000000" fo:padding-top="0in" fo:padding-bottom="0in" fo:padding-left="0in" fo:padding-right="0in"/>
      <style:paragraph-properties style:writing-mode="lr-tb"/>
    </style:style>
    <style:style style:family="text" style:name="a156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color="#f2f9f2" fo:font-family="Arial" style:font-family-complex="Arial" fo:font-size="0.30556in" style:font-size-asian="0.30556in" style:font-size-complex="0.30556in" fo:letter-spacing="-0.01389in" fo:font-weight="bold" style:font-weight-asian="bold" style:font-weight-complex="bold"/>
    </style:style>
    <style:style style:family="presentation" style:name="a611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6">
      <style:text-properties fo:color="#1fae80" fo:font-family="Arial" style:font-family-complex="Arial" fo:font-size="0.375in" style:font-size-asian="0.375in" style:font-size-complex="0.375in" fo:letter-spacing="-0.00694in"/>
    </style:style>
    <style:style style:family="text" style:name="a40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color="#f2f9f2" fo:font-family="Arial" style:font-family-complex="Arial" fo:font-size="0.30556in" style:font-size-asian="0.30556in" style:font-size-complex="0.30556in" fo:letter-spacing="0.01736in" fo:font-weight="bold" style:font-weight-asian="bold" style:font-weight-complex="bold"/>
    </style:style>
    <style:style style:family="text" style:name="a61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7">
      <style:text-properties fo:color="#1fae80" fo:font-family="Arial" style:font-family-complex="Arial" fo:font-size="0.375in" style:font-size-asian="0.375in" style:font-size-complex="0.375in"/>
    </style:style>
    <style:style style:family="text" style:name="a40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659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8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color="#f2f9f2" fo:font-family="Arial" style:font-family-complex="Arial" fo:font-size="0.30556in" style:font-size-asian="0.30556in" style:font-size-complex="0.30556in" fo:letter-spacing="-0.02778in" fo:font-weight="bold" style:font-weight-asian="bold" style:font-weight-complex="bold"/>
    </style:style>
    <style:style style:family="text" style:name="a61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8">
      <style:text-properties fo:color="#1fae80" fo:font-family="Arial" style:font-family-complex="Arial" fo:font-size="0.38889in" style:font-size-asian="0.38889in" style:font-size-complex="0.38889in" fo:letter-spacing="-0.00694in"/>
    </style:style>
    <style:style style:family="text" style:name="a40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9">
      <style:text-properties fo:color="#1fae80" fo:font-family="Arial" style:font-family-complex="Arial" fo:font-size="0.38889in" style:font-size-asian="0.38889in" style:font-size-complex="0.38889in"/>
    </style:style>
    <style:style style:family="text" style:name="a40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06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87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6">
      <style:text-properties fo:font-variant="normal" fo:text-transform="none" fo:color="#d1e6d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1806in" fo:padding-bottom="0in" fo:padding-left="0in" fo:padding-right="0in" draw:textarea-vertical-align="top" draw:textarea-horizontal-align="left" draw:fill="solid" draw:fill-color="#133121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29" style:parent-style-name="Graphics">
      <style:graphic-properties draw:fill="none" draw:stroke="none"/>
    </style:style>
    <style:style style:family="graphic" style:name="a11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2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color="#f2f9f2" fo:font-family="Arial" style:font-family-complex="Arial" fo:font-size="0.30556in" style:font-size-asian="0.30556in" style:font-size-complex="0.30556in" fo:letter-spacing="0.01181in" fo:font-weight="bold" style:font-weight-asian="bold" style:font-weight-complex="bold"/>
    </style:style>
    <style:style style:family="text" style:name="a157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3680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1">
      <style:text-properties fo:font-family="Arial" style:font-family-complex="Arial" fo:font-size="0.30556in" style:font-size-asian="0.30556in" style:font-size-complex="0.30556in"/>
    </style:style>
    <style:style style:family="text" style:name="a157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162b21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.047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margin-right="0.01319in" fo:margin-top="0.02153in"/>
    </style:style>
    <style:style style:family="text" style:name="a1990">
      <style:text-properties fo:color="#1fae80" fo:font-family="Arial" style:font-family-complex="Arial" fo:font-size="0.375in" style:font-size-asian="0.375in" style:font-size-complex="0.375in" fo:letter-spacing="-0.00694in"/>
    </style:style>
    <style:style style:family="text" style:name="a157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c312a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9">
      <style:paragraph-properties fo:line-height="100%" style:tab-stop-distance="1in" fo:margin-left="0.04861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family="Arial" style:font-family-complex="Arial" fo:font-size="0.375in" style:font-size-asian="0.375in" style:font-size-complex="0.375in"/>
    </style:style>
    <style:style style:family="text" style:name="a157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4">
      <style:table-cell-properties style:vertical-align="top" fo:background-color="#113323" fo:padding-top="0.02153in" fo:padding-bottom="0in" fo:padding-left="0in" fo:padding-right="0in"/>
      <style:paragraph-properties style:writing-mode="lr-tb"/>
    </style:style>
    <style:style style:family="paragraph" style:name="a1992">
      <style:paragraph-properties fo:line-height="100%" fo:margin-left="0.02778in" fo:margin-right="0.00347in" fo:margin-top="0.26528in">
        <style:tab-stops>
          <style:tab-stop style:position="0.36944in"/>
          <style:tab-stop style:position="0.75833in"/>
        </style:tab-stops>
      </style:paragraph-properties>
    </style:style>
    <style:style style:family="text" style:name="a157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family="Times New Roman" style:font-family-complex="Times New Roman" fo:font-size="0.33333in" style:font-size-asian="0.33333in" style:font-size-complex="0.33333in"/>
    </style:style>
    <style:style style:family="text" style:name="a157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15.599%" style:tab-stop-distance="1in" fo:margin-left="0.625in" fo:margin-right="0.00556in" fo:text-indent="-0.57153in" fo:margin-top="0.30417in" fo:margin-bottom="0in" style:punctuation-wrap="hanging" style:vertical-align="auto">
        <style:tab-stops>
          <style:tab-stop style:position="0in"/>
          <style:tab-stop style:position="0.00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-0.06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/>
    </style:style>
    <style:style style:family="table-cell" style:name="a1994">
      <style:table-cell-properties style:vertical-align="top" fo:padding-top="0.26528in" fo:padding-bottom="0in" fo:padding-left="0in" fo:padding-right="0in"/>
      <style:paragraph-properties style:writing-mode="lr-tb"/>
    </style:style>
    <style:style style:family="text" style:name="a157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5">
      <style:text-properties fo:font-family="Times New Roman" style:font-family-complex="Times New Roman" fo:font-size="0.33333in" style:font-size-asian="0.33333in" style:font-size-complex="0.33333in"/>
    </style:style>
    <style:style style:family="text" style:name="a157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8">
      <style:table-cell-properties style:vertical-align="top" fo:border-bottom="0.00347in solid #d3dbd8" fo:padding-top="0in" fo:padding-bottom="0in" fo:padding-left="0in" fo:padding-right="0in"/>
      <style:paragraph-properties style:writing-mode="lr-tb"/>
    </style:style>
    <style:style style:family="text" style:name="a62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row" style:name="a1789">
      <style:table-row-properties style:row-height="1.40694in"/>
    </style:style>
    <style:style style:family="text" style:name="a62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998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1.7%" style:tab-stop-distance="1in" fo:margin-left="0.01944in" fo:margin-right="0.00556in" fo:text-indent="0.00278in" fo:margin-top="0.0256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9">
      <style:text-properties fo:color="#28332a" fo:font-family="Times New Roman" style:font-family-complex="Times New Roman" fo:font-size="0.31944in" style:font-size-asian="0.31944in" style:font-size-complex="0.31944in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08">
      <style:graphic-properties fo:wrap-option="wrap" fo:padding-top="0.01875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36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631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9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6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19.2%" style:tab-stop-distance="1in" fo:margin-left="0.01875in" fo:margin-right="0.57222in" fo:text-indent="-0.00556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6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right" style:tab-stop-distance="1in" fo:margin-left="0in" fo:margin-right="0.02639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16.3%" style:tab-stop-distance="1in" fo:margin-left="0.46875in" fo:margin-right="0.06319in" fo:text-indent="-0.01042in" fo:margin-top="0.18056in" fo:margin-bottom="0in" style:punctuation-wrap="hanging" style:vertical-align="auto">
        <style:tab-stops>
          <style:tab-stop style:position="0.00069in"/>
          <style:tab-stop style:position="0.19375in"/>
          <style:tab-stop style:position="6.0354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in" fo:margin-right="0in" fo:text-indent="0in" fo:margin-top="0.1201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family="Times New Roman" style:font-family-complex="Times New Roman" fo:font-size="0.38889in" style:font-size-asian="0.38889in" style:font-size-complex="0.38889in"/>
    </style:style>
    <style:style style:family="text" style:name="a158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margin-right="0.00347in" fo:margin-top="0.12361in"/>
    </style:style>
    <style:style style:family="text" style:name="a158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458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right" style:tab-stop-distance="1in" fo:margin-left="0in" fo:margin-right="0.02222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458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color="#1fae80" fo:font-family="Arial" style:font-family-complex="Arial" fo:font-size="0.38889in" style:font-size-asian="0.38889in" style:font-size-complex="0.38889in" fo:letter-spacing="-0.06667in"/>
    </style:style>
    <style:style style:family="text" style:name="a158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458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family="Arial" style:font-family-complex="Arial" fo:font-size="0.38889in" style:font-size-asian="0.38889in" style:font-size-complex="0.38889in"/>
    </style:style>
    <style:style style:family="text" style:name="a158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04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5">
      <style:paragraph-properties fo:line-height="100%" fo:margin-right="0.00347in"/>
    </style:style>
    <style:style style:family="text" style:name="a158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46528in" style:font-size-asian="0.46528in" style:font-size-complex="0.46528in" fo:letter-spacing="-0.0756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0.39028in" style:tab-stop-distance="1in" fo:margin-left="0.01944in" fo:margin-right="0in" fo:text-indent="0in" fo:margin-top="0.01875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0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797">
      <style:table-cell-properties style:vertical-align="top" fo:border-bottom="0.00347in solid #d3dbd8" fo:padding-top="0.12361in" fo:padding-bottom="0in" fo:padding-left="0in" fo:padding-right="0in"/>
      <style:paragraph-properties style:writing-mode="lr-tb"/>
    </style:style>
    <style:style style:family="graphic" style:name="a631" style:parent-style-name="Graphics">
      <style:graphic-properties draw:fill="none" draw:stroke="none"/>
    </style:style>
    <style:style style:family="text" style:name="a42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0.029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8">
      <style:text-properties fo:font-family="Times New Roman" style:font-family-complex="Times New Roman" fo:font-size="0.33333in" style:font-size-asian="0.33333in" style:font-size-complex="0.33333in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45833in" style:font-size-asian="0.45833in" style:font-size-complex="0.45833in" fo:letter-spacing="-0.0158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9">
      <style:paragraph-properties fo:line-height="100%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1">
      <style:paragraph-properties fo:line-height="100%" style:tab-stop-distance="1in" fo:margin-left="0.013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style:tab-stop-distance="1in" fo:margin-left="0.04167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in" fo:margin-right="0in" fo:text-indent="0in" fo:margin-top="0.08611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458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1in" fo:margin-left="0in" fo:margin-right="0.01736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9">
      <style:paragraph-properties fo:line-height="100%" style:tab-stop-distance="1in" fo:margin-left="0in" fo:margin-right="0in" fo:text-indent="0in" fo:margin-top="0.12083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0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-0.03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22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3" style:parent-style-name="Graphics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0.35694in" style:tab-stop-distance="1in" fo:margin-left="0.0222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36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36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right" style:tab-stop-distance="1in" fo:margin-left="0in" fo:margin-right="0.00556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.1069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7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9">
      <style:paragraph-properties fo:line-height="100%" fo:text-align="right" style:tab-stop-distance="1in" fo:margin-left="0in" fo:margin-right="0.04236in" fo:text-indent="0in" fo:margin-top="0.0006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3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631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 style:parent-style-name="Graphics">
      <style:graphic-properties draw:fill="none" draw:stroke="none"/>
    </style:style>
    <style:style style:family="text" style:name="a23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45833in" style:font-size-asian="0.45833in" style:font-size-complex="0.45833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5" style:parent-style-name="Graphics">
      <style:graphic-properties draw:fill="none" draw:stroke="none"/>
    </style:style>
    <style:style style:family="text" style:name="a23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.04167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-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333d38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8">
      <style:paragraph-properties fo:line-height="105.7%" style:tab-stop-distance="1in" fo:margin-left="0.01389in" fo:margin-right="0.09792in" fo:text-indent="0.00417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9">
      <style:graphic-properties fo:wrap-option="wrap" fo:padding-top="0.01875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9.2%" style:tab-stop-distance="1in" fo:margin-left="0.01875in" fo:margin-right="0.57222in" fo:text-indent="-0.00556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graphic" style:name="a251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graphic" style:name="a253" style:parent-style-name="Graphics">
      <style:graphic-properties draw:fill="none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 style:parent-style-name="Graphics">
      <style:graphic-properties draw:fill="none" draw:stroke="none"/>
    </style:style>
    <style:style style:family="text" style:name="a67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36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327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212d26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.08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29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1c312a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158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2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82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0">
      <style:paragraph-properties fo:line-height="100%" style:tab-stop-distance="1in" fo:margin-left="0.04167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1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01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79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8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style:tab-stop-distance="1in" fo:margin-left="0.013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6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4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3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0">
      <style:paragraph-properties fo:line-height="100%" style:tab-stop-distance="1in" fo:margin-left="0.013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5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1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1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409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43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7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27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3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6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3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3f463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29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4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9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263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22" style:parent-style-name="Graphics">
      <style:graphic-properties draw:fill="none" draw:stroke="none"/>
    </style:style>
    <style:style style:family="drawing-page" style:name="a21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29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1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5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1in" fo:margin-left="0in" fo:margin-right="0in" fo:text-indent="0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left" style:tab-stop-distance="1in" fo:margin-left="0in" fo:margin-right="0in" fo:text-indent="0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left" style:tab-stop-distance="1in" fo:margin-left="0in" fo:margin-right="0in" fo:text-indent="0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263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60" style:parent-style-name="Graphics">
      <style:graphic-properties draw:fill="none" draw:stroke="none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292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9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4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.0263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88" style:parent-style-name="Graphics">
      <style:graphic-properties draw:fill="none" draw:stroke="none"/>
    </style:style>
    <style:style style:family="drawing-page" style:name="a21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190" style:parent-style-name="Graphics">
      <style:graphic-properties draw:fill="none" draw:stroke="non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5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7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6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7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8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9">
      <style:text-properties fo:font-variant="normal" fo:text-transform="none" fo:color="#1333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35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801">
      <style:table-cell-properties style:vertical-align="top" fo:border-bottom="0.00347in solid #d3dbd8" fo:padding-top="0in" fo:padding-bottom="0in" fo:padding-left="0in" fo:padding-right="0in"/>
      <style:paragraph-properties style:writing-mode="lr-tb"/>
    </style:style>
    <style:style style:family="text" style:name="a1802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1803">
      <style:paragraph-properties fo:line-height="100%" fo:margin-top="0.26389in"/>
    </style:style>
    <style:style style:family="text" style:name="a1805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806">
      <style:text-properties fo:color="#28332a" fo:font-family="Times New Roman" style:font-family-complex="Times New Roman" fo:font-size="0.31944in" style:font-size-asian="0.31944in" style:font-size-complex="0.31944in" fo:letter-spacing="0.00347in"/>
    </style:style>
    <style:style style:family="text" style:name="a1807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808">
      <style:text-properties fo:color="#28332a" fo:font-family="Times New Roman" style:font-family-complex="Times New Roman" fo:font-size="0.31944in" style:font-size-asian="0.31944in" style:font-size-complex="0.31944in" fo:letter-spacing="-0.00486in"/>
    </style:style>
    <style:style style:family="text" style:name="a1809">
      <style:text-properties fo:color="#28332a" fo:font-family="Times New Roman" style:font-family-complex="Times New Roman" fo:font-size="0.31944in" style:font-size-asian="0.31944in" style:font-size-complex="0.31944in" fo:letter-spacing="0.00972in"/>
    </style:style>
    <style:style style:family="text" style:name="a160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color="#28332a" fo:font-family="Times New Roman" style:font-family-complex="Times New Roman" fo:font-size="0.31944in" style:font-size-asian="0.31944in" style:font-size-complex="0.31944in" fo:letter-spacing="-0.00208in"/>
    </style:style>
    <style:style style:family="text" style:name="a160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color="#28332a" fo:font-family="Times New Roman" style:font-family-complex="Times New Roman" fo:font-size="0.31944in" style:font-size-asian="0.31944in" style:font-size-complex="0.31944in" fo:letter-spacing="0.00764in"/>
    </style:style>
    <style:style style:family="text" style:name="a160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60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color="#28332a" fo:font-family="Times New Roman" style:font-family-complex="Times New Roman" fo:font-size="0.31944in" style:font-size-asian="0.31944in" style:font-size-complex="0.31944in" fo:letter-spacing="0.00833in"/>
    </style:style>
    <style:style style:family="text" style:name="a160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color="#28332a" fo:font-family="Times New Roman" style:font-family-complex="Times New Roman" fo:font-size="0.31944in" style:font-size-asian="0.31944in" style:font-size-complex="0.31944in" fo:letter-spacing="-0.00694in"/>
    </style:style>
    <style:style style:family="text" style:name="a160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60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color="#28332a" fo:font-family="Times New Roman" style:font-family-complex="Times New Roman" fo:font-size="0.31944in" style:font-size-asian="0.31944in" style:font-size-complex="0.31944in" fo:letter-spacing="-0.00694in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color="#28332a" fo:font-family="Times New Roman" style:font-family-complex="Times New Roman" fo:font-size="0.31944in" style:font-size-asian="0.31944in" style:font-size-complex="0.31944in" fo:letter-spacing="0.00903in"/>
    </style:style>
    <style:style style:family="text" style:name="a1818">
      <style:text-properties fo:font-family="Times New Roman" style:font-family-complex="Times New Roman" fo:font-size="0.31944in" style:font-size-asian="0.31944in" style:font-size-complex="0.31944in"/>
    </style:style>
    <style:style style:family="paragraph" style:name="a1819">
      <style:paragraph-properties fo:line-height="100%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6.9%" style:tab-stop-distance="1in" fo:margin-left="0.03056in" fo:margin-right="0.00556in" fo:text-indent="-0.00347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1">
      <style:table-cell-properties style:vertical-align="top" fo:border-bottom="0.00347in solid #d3dbd8" fo:padding-top="0.26389in" fo:padding-bottom="0in" fo:padding-left="0in" fo:padding-right="0in"/>
      <style:paragraph-properties style:writing-mode="lr-tb"/>
    </style:style>
    <style:style style:family="text" style:name="a161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family="Times New Roman" style:font-family-complex="Times New Roman" fo:font-size="0.31944in" style:font-size-asian="0.31944in" style:font-size-complex="0.31944in"/>
    </style:style>
    <style:style style:family="text" style:name="a161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margin-right="0.01319in" fo:margin-top="0.25556in"/>
    </style:style>
    <style:style style:family="text" style:name="a161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42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61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color="#28332a" fo:font-family="Times New Roman" style:font-family-complex="Times New Roman" fo:font-size="0.31944in" style:font-size-asian="0.31944in" style:font-size-complex="0.31944in" fo:letter-spacing="0.02014in"/>
    </style:style>
    <style:style style:family="text" style:name="a161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color="#28332a" fo:font-family="Times New Roman" style:font-family-complex="Times New Roman" fo:font-size="0.31944in" style:font-size-asian="0.31944in" style:font-size-complex="0.31944in" fo:letter-spacing="0.00764in"/>
    </style:style>
    <style:style style:family="text" style:name="a1828">
      <style:text-properties fo:color="#28332a" fo:font-family="Times New Roman" style:font-family-complex="Times New Roman" fo:font-size="0.31944in" style:font-size-asian="0.31944in" style:font-size-complex="0.31944in" fo:letter-spacing="0.01806in"/>
    </style:style>
    <style:style style:family="text" style:name="a1829">
      <style:text-properties fo:color="#494f49" fo:font-family="Times New Roman" style:font-family-complex="Times New Roman" fo:font-size="0.23611in" style:font-size-asian="0.23611in" style:font-size-complex="0.23611in" fo:letter-spacing="0.01181in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color="#494f49" fo:font-family="Times New Roman" style:font-family-complex="Times New Roman" fo:font-size="0.23611in" style:font-size-asian="0.23611in" style:font-size-complex="0.23611in" fo:letter-spacing="0.02778in"/>
    </style:style>
    <style:style style:family="graphic" style:name="a1206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color="#28332a" fo:font-family="Times New Roman" style:font-family-complex="Times New Roman" fo:font-size="0.31944in" style:font-size-asian="0.31944in" style:font-size-complex="0.31944in" fo:letter-spacing="0.00903in"/>
    </style:style>
    <style:style style:family="text" style:name="a1207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color="#28332a" fo:font-family="Times New Roman" style:font-family-complex="Times New Roman" fo:font-size="0.31944in" style:font-size-asian="0.31944in" style:font-size-complex="0.31944in" fo:letter-spacing="0.02778in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color="#28332a" fo:font-family="Times New Roman" style:font-family-complex="Times New Roman" fo:font-size="0.31944in" style:font-size-asian="0.31944in" style:font-size-complex="0.31944in"/>
    </style:style>
    <style:style style:family="paragraph" style:name="a1209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color="#28332a" fo:font-family="Times New Roman" style:font-family-complex="Times New Roman" fo:font-size="0.31944in" style:font-size-asian="0.31944in" style:font-size-complex="0.31944in" fo:letter-spacing="0.00208in"/>
    </style:style>
    <style:style style:family="text" style:name="a162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162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family="Times New Roman" style:font-family-complex="Times New Roman" fo:font-size="0.31944in" style:font-size-asian="0.31944in" style:font-size-complex="0.31944in"/>
    </style:style>
    <style:style style:family="text" style:name="a162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/>
    </style:style>
    <style:style style:family="table-cell" style:name="a1839">
      <style:table-cell-properties style:vertical-align="top" fo:border-bottom="0.00347in solid #d3dbd8" fo:padding-top="0.25555in" fo:padding-bottom="0in" fo:padding-left="0in" fo:padding-right="0in"/>
      <style:paragraph-properties style:writing-mode="lr-tb"/>
    </style:style>
    <style:style style:family="text" style:name="a100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162b21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style:tab-stop-distance="1in" fo:margin-left="0.01389in" fo:margin-right="0in" fo:text-indent="0in" fo:margin-top="0.0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45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40">
      <style:table-row-properties style:row-height="1.12778in"/>
    </style:style>
    <style:style style:family="text" style:name="a121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83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family="Times New Roman" style:font-family-complex="Times New Roman" fo:font-size="0.33333in" style:font-size-asian="0.33333in" style:font-size-complex="0.33333in"/>
    </style:style>
    <style:style style:family="text" style:name="a121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/>
    </style:style>
    <style:style style:family="text" style:name="a121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625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48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4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63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color="#1fae80" fo:font-family="Courier New" style:font-family-complex="Courier New" fo:font-size="0.375in" style:font-size-asian="0.375in" style:font-size-complex="0.375in" fo:language="it" fo:country="IT"/>
    </style:style>
    <style:style style:family="text" style:name="a163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color="#1fae80" fo:font-family="Times New Roman" style:font-family-complex="Times New Roman" fo:font-size="0.4375in" style:font-size-asian="0.4375in" style:font-size-complex="0.4375in" fo:letter-spacing="-0.00694in"/>
    </style:style>
    <style:style style:family="text" style:name="a163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margin-right="0.00347in" fo:margin-top="0.23403in">
        <style:tab-stops>
          <style:tab-stop style:position="0.775in"/>
        </style:tab-stops>
      </style:paragraph-properties>
    </style:style>
    <style:style style:family="table-cell" style:name="a1849">
      <style:table-cell-properties style:vertical-align="top" fo:border-top="0.00347in solid #d3dbd8" fo:padding-top="0.23403in" fo:padding-bottom="0in" fo:padding-left="0in" fo:padding-right="0in"/>
      <style:paragraph-properties style:writing-mode="lr-tb"/>
    </style:style>
    <style:style style:family="text" style:name="a101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32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55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111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88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family="Times New Roman" style:font-family-complex="Times New Roman" fo:font-size="0.33333in" style:font-size-asian="0.33333in" style:font-size-complex="0.33333in"/>
    </style:style>
    <style:style style:family="text" style:name="a122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/>
    </style:style>
    <style:style style:family="text" style:name="a122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180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13.9%" style:tab-stop-distance="1in" fo:margin-left="0.61875in" fo:margin-right="0.20556in" fo:text-indent="-0.56736in" fo:margin-top="0.37917in" fo:margin-bottom="0in" style:punctuation-wrap="hanging" style:vertical-align="auto">
        <style:tab-stops>
          <style:tab-stop style:position="0.00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3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22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27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64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color="#28332a" fo:font-family="Times New Roman" style:font-family-complex="Times New Roman" fo:font-size="0.31944in" style:font-size-asian="0.31944in" style:font-size-complex="0.31944in" fo:letter-spacing="0.00069in"/>
    </style:style>
    <style:style style:family="text" style:name="a164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64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7">
      <style:text-properties fo:color="#28332a" fo:font-family="Times New Roman" style:font-family-complex="Times New Roman" fo:font-size="0.31944in" style:font-size-asian="0.31944in" style:font-size-complex="0.31944in" fo:letter-spacing="0.00903in"/>
    </style:style>
    <style:style style:family="text" style:name="a1858">
      <style:text-properties fo:color="#28332a" fo:font-family="Times New Roman" style:font-family-complex="Times New Roman" fo:font-size="0.31944in" style:font-size-asian="0.31944in" style:font-size-complex="0.31944in" fo:letter-spacing="0.00972in"/>
    </style:style>
    <style:style style:family="text" style:name="a90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color="#28332a" fo:font-family="Times New Roman" style:font-family-complex="Times New Roman" fo:font-size="0.31944in" style:font-size-asian="0.31944in" style:font-size-complex="0.31944in" fo:letter-spacing="0.00069in"/>
    </style:style>
    <style:style style:family="text" style:name="a90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681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194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90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29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417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23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color="#28332a" fo:font-family="Times New Roman" style:font-family-complex="Times New Roman" fo:font-size="0.31944in" style:font-size-asian="0.31944in" style:font-size-complex="0.31944in" fo:letter-spacing="0.01319in"/>
    </style:style>
    <style:style style:family="text" style:name="a1237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2014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201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color="#28332a" fo:font-family="Times New Roman" style:font-family-complex="Times New Roman" fo:font-size="0.31944in" style:font-size-asian="0.31944in" style:font-size-complex="0.31944in" fo:letter-spacing="0.01944in"/>
    </style:style>
    <style:style style:family="text" style:name="a1238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76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239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2708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color="#28332a" fo:font-family="Times New Roman" style:font-family-complex="Times New Roman" fo:font-size="0.31944in" style:font-size-asian="0.31944in" style:font-size-complex="0.31944in" fo:letter-spacing="-0.00764in"/>
    </style:style>
    <style:style style:family="text" style:name="a165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color="#28332a" fo:font-family="Times New Roman" style:font-family-complex="Times New Roman" fo:font-size="0.31944in" style:font-size-asian="0.31944in" style:font-size-complex="0.31944in" fo:letter-spacing="0.00903in"/>
    </style:style>
    <style:style style:family="text" style:name="a165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family="Times New Roman" style:font-family-complex="Times New Roman" fo:font-size="0.31944in" style:font-size-asian="0.31944in" style:font-size-complex="0.31944in"/>
    </style:style>
    <style:style style:family="text" style:name="a165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2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margin-left="0.00278in" fo:margin-top="0.36042in">
        <style:tab-stops>
          <style:tab-stop style:position="2.45486in"/>
        </style:tab-stops>
      </style:paragraph-properties>
    </style:style>
    <style:style style:family="text" style:name="a70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8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9">
      <style:table-cell-properties style:vertical-align="top" fo:border-top="0.00347in solid #d3dbd8" fo:padding-top="0.36042in" fo:padding-bottom="0in" fo:padding-left="0in" fo:padding-right="0in"/>
      <style:paragraph-properties style:writing-mode="lr-tb"/>
    </style:style>
    <style:style style:family="text" style:name="a70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33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13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48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903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1806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246">
      <style:text-properties fo:font-variant="normal" fo:text-transform="none" fo:color="#64726b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color="#28332a" fo:font-family="Times New Roman" style:font-family-complex="Times New Roman" fo:font-size="0.31944in" style:font-size-asian="0.31944in" style:font-size-complex="0.31944in" fo:letter-spacing="0.01806in"/>
    </style:style>
    <style:style style:family="text" style:name="a1247">
      <style:text-properties fo:font-variant="normal" fo:text-transform="none" fo:color="#54524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color="#28332a" fo:font-family="Times New Roman" style:font-family-complex="Times New Roman" fo:font-size="0.31944in" style:font-size-asian="0.31944in" style:font-size-complex="0.31944in" fo:letter-spacing="0.00694in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color="#28332a" fo:font-family="Times New Roman" style:font-family-complex="Times New Roman" fo:font-size="0.31944in" style:font-size-asian="0.31944in" style:font-size-complex="0.31944in" fo:letter-spacing="0.01667in"/>
    </style:style>
    <style:style style:family="paragraph" style:name="a1249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color="#28332a" fo:font-family="Times New Roman" style:font-family-complex="Times New Roman" fo:font-size="0.31944in" style:font-size-asian="0.31944in" style:font-size-complex="0.31944in"/>
    </style:style>
    <style:style style:family="text" style:name="a166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color="#28332a" fo:font-family="Times New Roman" style:font-family-complex="Times New Roman" fo:font-size="0.31944in" style:font-size-asian="0.31944in" style:font-size-complex="0.31944in" fo:letter-spacing="-0.00694in"/>
    </style:style>
    <style:style style:family="text" style:name="a166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6">
      <style:text-properties fo:color="#28332a" fo:font-family="Times New Roman" style:font-family-complex="Times New Roman" fo:font-size="0.31944in" style:font-size-asian="0.31944in" style:font-size-complex="0.31944in" fo:letter-spacing="0.02153in"/>
    </style:style>
    <style:style style:family="text" style:name="a166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7">
      <style:text-properties fo:color="#28332a" fo:font-family="Times New Roman" style:font-family-complex="Times New Roman" fo:font-size="0.31944in" style:font-size-asian="0.31944in" style:font-size-complex="0.31944in" fo:letter-spacing="0.02708in"/>
    </style:style>
    <style:style style:family="text" style:name="a71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8">
      <style:text-properties fo:color="#28332a" fo:font-family="Times New Roman" style:font-family-complex="Times New Roman" fo:font-size="0.31944in" style:font-size-asian="0.31944in" style:font-size-complex="0.31944in" fo:letter-spacing="-0.00139in"/>
    </style:style>
    <style:style style:family="text" style:name="a71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family="Times New Roman" style:font-family-complex="Times New Roman" fo:font-size="0.31944in" style:font-size-asian="0.31944in" style:font-size-complex="0.31944in"/>
    </style:style>
    <style:style style:family="text" style:name="a71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2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2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479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18.7%" style:tab-stop-distance="1in" fo:margin-left="0.02778in" fo:margin-right="0.00556in" fo:text-indent="0.0125in" fo:margin-top="0.22361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 style:parent-style-name="Graphics">
      <style:graphic-properties draw:fill="none" draw:stroke="none"/>
    </style:style>
    <style:style style:family="text" style:name="a104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margin-left="0.01042in" fo:margin-right="0.01319in" fo:margin-top="0.36042in"/>
    </style:style>
    <style:style style:family="text" style:name="a125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2">
      <style:table-cell-properties style:vertical-align="top" fo:border-top="0.00347in solid #d3dbd8" fo:padding-top="0.36042in" fo:padding-bottom="0in" fo:padding-left="0in" fo:padding-right="0in"/>
      <style:paragraph-properties style:writing-mode="lr-tb"/>
    </style:style>
    <style:style style:family="text" style:name="a125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f463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-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family="Times New Roman" style:font-family-complex="Times New Roman" fo:font-size="0.33333in" style:font-size-asian="0.33333in" style:font-size-complex="0.33333in"/>
    </style:style>
    <style:style style:family="text" style:name="a125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86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00%"/>
    </style:style>
    <style:style style:family="text" style:name="a167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6">
      <style:table-cell-properties style:vertical-align="top" fo:border-top="0.00347in solid #d3dbd8" fo:padding-top="0in" fo:padding-bottom="0in" fo:padding-left="0in" fo:padding-right="0in"/>
      <style:paragraph-properties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7">
      <style:table-row-properties style:row-height="1.14514in"/>
    </style:style>
    <style:style style:family="graphic" style:name="a72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9">
      <style:paragraph-properties fo:line-height="113.9%" style:tab-stop-distance="1in" fo:margin-left="0.61875in" fo:margin-right="0.09722in" fo:text-indent="-0.56597in" fo:margin-top="0.30972in" fo:margin-bottom="0in" style:punctuation-wrap="hanging" style:vertical-align="auto">
        <style:tab-stops>
          <style:tab-stop style:position="0.00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family="Times New Roman" style:font-family-complex="Times New Roman" fo:font-size="0.33333in" style:font-size-asian="0.33333in" style:font-size-complex="0.33333in"/>
    </style:style>
    <style:style style:family="text" style:name="a72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/>
    </style:style>
    <style:style style:family="text" style:name="a72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34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229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26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46528in" style:font-size-asian="0.46528in" style:font-size-complex="0.4652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.03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6528in" style:font-size-asian="0.46528in" style:font-size-complex="0.465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style:tab-stop-distance="1in" fo:margin-left="0.01389in" fo:margin-right="0in" fo:text-indent="0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 style:parent-style-name="Graphics">
      <style:graphic-properties draw:fill="none" draw:stroke="none"/>
    </style:style>
    <style:style style:family="text" style:name="a105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1ab582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1">
      <style:table-cell-properties style:vertical-align="top" fo:border-bottom="0.00347in solid #d3dbd8" fo:border-left="0.01042in solid #000000" fo:padding-top="0in" fo:padding-bottom="0in" fo:padding-left="0in" fo:padding-right="0in"/>
      <style:paragraph-properties style:writing-mode="lr-tb"/>
    </style:style>
    <style:style style:family="text" style:name="a126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34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color="#1fae80" fo:font-family="Arial" style:font-family-complex="Arial" fo:font-size="0.375in" style:font-size-asian="0.375in" style:font-size-complex="0.375in" fo:letter-spacing="-0.04444in" fo:language="it" fo:country="IT" fo:font-style="italic" style:font-style-asian="italic" style:font-style-complex="italic"/>
    </style:style>
    <style:style style:family="text" style:name="a126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color="#1fae80" fo:font-family="Arial" style:font-family-complex="Arial" fo:font-size="0.22917in" style:font-size-asian="0.22917in" style:font-size-complex="0.22917in" fo:letter-spacing="-0.00347in" fo:font-style="italic" style:font-style-asian="italic" style:font-style-complex="italic"/>
    </style:style>
    <style:style style:family="text" style:name="a126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margin-right="0.00347in" fo:margin-top="0.22569in"/>
    </style:style>
    <style:style style:family="graphic" style:name="a103" style:parent-style-name="Graphics">
      <style:graphic-properties draw:fill="none" draw:stroke="none"/>
    </style:style>
    <style:style style:family="text" style:name="a168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19.2%" style:tab-stop-distance="1in" fo:margin-left="0.01875in" fo:margin-right="0.57222in" fo:text-indent="-0.00556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6">
      <style:table-cell-properties style:vertical-align="top" fo:border-bottom="0.00347in solid #d3dbd8" fo:padding-top="0.22569in" fo:padding-bottom="0in" fo:padding-left="0in" fo:padding-right="0in"/>
      <style:paragraph-properties style:writing-mode="lr-tb"/>
    </style:style>
    <style:style style:family="graphic" style:name="a105" style:parent-style-name="Graphics">
      <style:graphic-properties draw:fill="none" draw:stroke="none"/>
    </style:style>
    <style:style style:family="text" style:name="a168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625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family="Times New Roman" style:font-family-complex="Times New Roman" fo:font-size="0.33333in" style:font-size-asian="0.33333in" style:font-size-complex="0.33333in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style:tab-stop-distance="1in" fo:margin-left="0in" fo:margin-right="0in" fo:text-indent="0in" fo:margin-top="0.0263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text" style:name="a10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7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243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style:tab-stop-distance="1in" fo:margin-left="0.038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0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1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2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6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3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8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4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5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5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6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7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5417in" style:font-size-asian="0.35417in" style:font-size-complex="0.354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.038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8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5.5%" style:tab-stop-distance="1in" fo:margin-left="0.02292in" fo:margin-right="0.33611in" fo:text-indent="0.00278in" fo:margin-top="0.29792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-0.36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23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0.047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212d23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.0593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">
      <style:text-properties fo:font-variant="normal" fo:text-transform="none" fo:color="#1c312a" style:text-line-through-type="none" style:text-line-through-style="none" style:text-line-through-width="auto" style:text-line-through-color="font-color" style:text-position="43.402% 66.6667%" fo:font-family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">
      <style:paragraph-properties fo:line-height="100%" style:tab-stop-distance="1in" fo:margin-left="0.0520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3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43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7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6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8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6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5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1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0.39028in" style:tab-stop-distance="1in" fo:margin-left="0.01389in" fo:margin-right="0in" fo:text-indent="0in" fo:margin-top="0.01875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3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16.3%" style:tab-stop-distance="1in" fo:margin-left="0.61458in" fo:margin-right="0.00556in" fo:text-indent="-0.56319in" fo:margin-top="0.00069in" fo:margin-bottom="0in" style:punctuation-wrap="hanging" style:vertical-align="auto">
        <style:tab-stops>
          <style:tab-stop style:position="0.0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15b58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6">
      <style:paragraph-properties fo:line-height="100%" style:tab-stop-distance="1in" fo:margin-left="0.01389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22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212f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8">
      <style:paragraph-properties fo:line-height="129.2%" style:tab-stop-distance="1in" fo:margin-left="0.01389in" fo:margin-right="0.00556in" fo:text-indent="0.00972in" fo:margin-top="0.0131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43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3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167in" style:font-size-asian="0.29167in" style:font-size-complex="0.29167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8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31210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52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16.3%" style:tab-stop-distance="1in" fo:margin-left="0.62361in" fo:margin-right="0.97153in" fo:text-indent="-0.56944in" fo:margin-top="0.34028in" fo:margin-bottom="0in" style:punctuation-wrap="hanging" style:vertical-align="auto">
        <style:tab-stops>
          <style:tab-stop style:position="0.001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2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16.5%" style:tab-stop-distance="1in" fo:margin-left="0.01736in" fo:margin-right="0.00556in" fo:text-indent="0.00069in" fo:margin-top="0.24792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8b180" style:text-line-through-type="none" style:text-line-through-style="none" style:text-line-through-width="auto" style:text-line-through-color="font-color" style:text-position="0% 100%" fo:font-family="Arial" style:font-family-complex="Arial" fo:font-size="0.32639in" style:font-size-asian="0.32639in" style:font-size-complex="0.32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131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409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9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4028in" style:font-size-asian="0.34028in" style:font-size-complex="0.34028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25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22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736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1944in" style:font-size-asian="0.31944in" style:font-size-complex="0.31944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5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1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12d23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2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5833in" style:font-size-asian="0.45833in" style:font-size-complex="0.45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12d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12f26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0.01458in" fo:margin-right="0in" fo:text-indent="0in" fo:margin-top="0.0159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13128" style:text-line-through-type="none" style:text-line-through-style="none" style:text-line-through-width="auto" style:text-line-through-color="font-color" style:text-position="0% 100%" fo:font-size="0.32639in" style:font-size-asian="0.32639in" style:font-size-complex="0.32639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40"/>
    <text:list-style style:name="a1532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979"/>
    <text:list-style style:name="a2036"/>
    <text:list-style style:name="a347">
      <text:list-level-style-bullet text:level="1" text:bullet-char="✓">
        <style:list-level-properties text:space-before="0.05417in" text:min-label-width="0.56944in"/>
        <style:text-properties fo:color="#18b180" fo:font-family="Arial" fo:font-size="102.173%"/>
      </text:list-level-style-bullet>
      <text:list-level-style-bullet text:level="2" text:bullet-char="✓">
        <style:list-level-properties text:space-before="0.55417in" text:min-label-width="0.56944in"/>
        <style:text-properties fo:color="#18b180" fo:font-family="Arial" fo:font-size="102.173%"/>
      </text:list-level-style-bullet>
      <text:list-level-style-bullet text:level="3" text:bullet-char="✓">
        <style:list-level-properties text:space-before="1.05417in" text:min-label-width="0.56944in"/>
        <style:text-properties fo:color="#18b180" fo:font-family="Arial" fo:font-size="102.173%"/>
      </text:list-level-style-bullet>
      <text:list-level-style-bullet text:level="4" text:bullet-char="✓">
        <style:list-level-properties text:space-before="1.55417in" text:min-label-width="0.56944in"/>
        <style:text-properties fo:color="#18b180" fo:font-family="Arial" fo:font-size="102.173%"/>
      </text:list-level-style-bullet>
      <text:list-level-style-bullet text:level="5" text:bullet-char="✓">
        <style:list-level-properties text:space-before="2.05417in" text:min-label-width="0.56944in"/>
        <style:text-properties fo:color="#18b180" fo:font-family="Arial" fo:font-size="102.173%"/>
      </text:list-level-style-bullet>
      <text:list-level-style-bullet text:level="6" text:bullet-char="✓">
        <style:list-level-properties text:space-before="2.55417in" text:min-label-width="0.56944in"/>
        <style:text-properties fo:color="#18b180" fo:font-family="Arial" fo:font-size="102.173%"/>
      </text:list-level-style-bullet>
      <text:list-level-style-bullet text:level="7" text:bullet-char="✓">
        <style:list-level-properties text:space-before="3.05417in" text:min-label-width="0.56944in"/>
        <style:text-properties fo:color="#18b180" fo:font-family="Arial" fo:font-size="102.173%"/>
      </text:list-level-style-bullet>
      <text:list-level-style-bullet text:level="8" text:bullet-char="✓">
        <style:list-level-properties text:space-before="3.55417in" text:min-label-width="0.56944in"/>
        <style:text-properties fo:color="#18b180" fo:font-family="Arial" fo:font-size="102.173%"/>
      </text:list-level-style-bullet>
      <text:list-level-style-bullet text:level="9" text:bullet-char="✓">
        <style:list-level-properties text:space-before="4.05417in" text:min-label-width="0.56944in"/>
        <style:text-properties fo:color="#18b180" fo:font-family="Arial" fo:font-size="102.173%"/>
      </text:list-level-style-bullet>
    </text:list-style>
    <text:list-style style:name="a1759"/>
    <text:list-style style:name="a1945"/>
    <text:list-style style:name="a150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881"/>
    <text:list-style style:name="a1949"/>
    <text:list-style style:name="a1504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885"/>
    <text:list-style style:name="a1915"/>
    <text:list-style style:name="a1508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852"/>
    <text:list-style style:name="a1919"/>
    <text:list-style style:name="a380">
      <text:list-level-style-bullet text:level="1" text:bullet-char="✓">
        <style:list-level-properties text:space-before="0.05347in" text:min-label-width="0.57222in"/>
        <style:text-properties fo:font-size="100%"/>
      </text:list-level-style-bullet>
      <text:list-level-style-bullet text:level="2" text:bullet-char="✓">
        <style:list-level-properties text:space-before="0.55347in" text:min-label-width="0.57222in"/>
        <style:text-properties fo:font-size="100%"/>
      </text:list-level-style-bullet>
      <text:list-level-style-bullet text:level="3" text:bullet-char="✓">
        <style:list-level-properties text:space-before="1.05347in" text:min-label-width="0.57222in"/>
        <style:text-properties fo:font-size="100%"/>
      </text:list-level-style-bullet>
      <text:list-level-style-bullet text:level="4" text:bullet-char="✓">
        <style:list-level-properties text:space-before="1.55347in" text:min-label-width="0.57222in"/>
        <style:text-properties fo:font-size="100%"/>
      </text:list-level-style-bullet>
      <text:list-level-style-bullet text:level="5" text:bullet-char="✓">
        <style:list-level-properties text:space-before="2.05347in" text:min-label-width="0.57222in"/>
        <style:text-properties fo:font-size="100%"/>
      </text:list-level-style-bullet>
      <text:list-level-style-bullet text:level="6" text:bullet-char="✓">
        <style:list-level-properties text:space-before="2.55347in" text:min-label-width="0.57222in"/>
        <style:text-properties fo:font-size="100%"/>
      </text:list-level-style-bullet>
      <text:list-level-style-bullet text:level="7" text:bullet-char="✓">
        <style:list-level-properties text:space-before="3.05347in" text:min-label-width="0.57222in"/>
        <style:text-properties fo:font-size="100%"/>
      </text:list-level-style-bullet>
      <text:list-level-style-bullet text:level="8" text:bullet-char="✓">
        <style:list-level-properties text:space-before="3.55347in" text:min-label-width="0.57222in"/>
        <style:text-properties fo:font-size="100%"/>
      </text:list-level-style-bullet>
      <text:list-level-style-bullet text:level="9" text:bullet-char="✓">
        <style:list-level-properties text:space-before="4.05347in" text:min-label-width="0.57222in"/>
        <style:text-properties fo:font-size="100%"/>
      </text:list-level-style-bullet>
    </text:list-style>
    <text:list-style style:name="a411">
      <text:list-level-style-bullet text:level="1" text:bullet-char="✓">
        <style:list-level-properties text:space-before="0.05347in" text:min-label-width="0.57153in"/>
        <style:text-properties fo:font-size="100%"/>
      </text:list-level-style-bullet>
      <text:list-level-style-bullet text:level="2" text:bullet-char="✓">
        <style:list-level-properties text:space-before="0.55347in" text:min-label-width="0.57153in"/>
        <style:text-properties fo:font-size="100%"/>
      </text:list-level-style-bullet>
      <text:list-level-style-bullet text:level="3" text:bullet-char="✓">
        <style:list-level-properties text:space-before="1.05347in" text:min-label-width="0.57153in"/>
        <style:text-properties fo:font-size="100%"/>
      </text:list-level-style-bullet>
      <text:list-level-style-bullet text:level="4" text:bullet-char="✓">
        <style:list-level-properties text:space-before="1.55347in" text:min-label-width="0.57153in"/>
        <style:text-properties fo:font-size="100%"/>
      </text:list-level-style-bullet>
      <text:list-level-style-bullet text:level="5" text:bullet-char="✓">
        <style:list-level-properties text:space-before="2.05347in" text:min-label-width="0.57153in"/>
        <style:text-properties fo:font-size="100%"/>
      </text:list-level-style-bullet>
      <text:list-level-style-bullet text:level="6" text:bullet-char="✓">
        <style:list-level-properties text:space-before="2.55347in" text:min-label-width="0.57153in"/>
        <style:text-properties fo:font-size="100%"/>
      </text:list-level-style-bullet>
      <text:list-level-style-bullet text:level="7" text:bullet-char="✓">
        <style:list-level-properties text:space-before="3.05347in" text:min-label-width="0.57153in"/>
        <style:text-properties fo:font-size="100%"/>
      </text:list-level-style-bullet>
      <text:list-level-style-bullet text:level="8" text:bullet-char="✓">
        <style:list-level-properties text:space-before="3.55347in" text:min-label-width="0.57153in"/>
        <style:text-properties fo:font-size="100%"/>
      </text:list-level-style-bullet>
      <text:list-level-style-bullet text:level="9" text:bullet-char="✓">
        <style:list-level-properties text:space-before="4.05347in" text:min-label-width="0.57153in"/>
        <style:text-properties fo:font-size="100%"/>
      </text:list-level-style-bullet>
    </text:list-style>
    <text:list-style style:name="a1820"/>
    <text:list-style style:name="a1792"/>
    <text:list-style style:name="a570">
      <text:list-level-style-bullet text:level="1" text:bullet-char="✓">
        <style:list-level-properties text:space-before="0.05139in" text:min-label-width="0.57153in"/>
        <style:text-properties fo:font-size="100%"/>
      </text:list-level-style-bullet>
      <text:list-level-style-bullet text:level="2" text:bullet-char="✓">
        <style:list-level-properties text:space-before="0.55139in" text:min-label-width="0.57153in"/>
        <style:text-properties fo:font-size="100%"/>
      </text:list-level-style-bullet>
      <text:list-level-style-bullet text:level="3" text:bullet-char="✓">
        <style:list-level-properties text:space-before="1.05139in" text:min-label-width="0.57153in"/>
        <style:text-properties fo:font-size="100%"/>
      </text:list-level-style-bullet>
      <text:list-level-style-bullet text:level="4" text:bullet-char="✓">
        <style:list-level-properties text:space-before="1.55139in" text:min-label-width="0.57153in"/>
        <style:text-properties fo:font-size="100%"/>
      </text:list-level-style-bullet>
      <text:list-level-style-bullet text:level="5" text:bullet-char="✓">
        <style:list-level-properties text:space-before="2.05139in" text:min-label-width="0.57153in"/>
        <style:text-properties fo:font-size="100%"/>
      </text:list-level-style-bullet>
      <text:list-level-style-bullet text:level="6" text:bullet-char="✓">
        <style:list-level-properties text:space-before="2.55139in" text:min-label-width="0.57153in"/>
        <style:text-properties fo:font-size="100%"/>
      </text:list-level-style-bullet>
      <text:list-level-style-bullet text:level="7" text:bullet-char="✓">
        <style:list-level-properties text:space-before="3.05139in" text:min-label-width="0.57153in"/>
        <style:text-properties fo:font-size="100%"/>
      </text:list-level-style-bullet>
      <text:list-level-style-bullet text:level="8" text:bullet-char="✓">
        <style:list-level-properties text:space-before="3.55139in" text:min-label-width="0.57153in"/>
        <style:text-properties fo:font-size="100%"/>
      </text:list-level-style-bullet>
      <text:list-level-style-bullet text:level="9" text:bullet-char="✓">
        <style:list-level-properties text:space-before="4.05139in" text:min-label-width="0.57153in"/>
        <style:text-properties fo:font-size="100%"/>
      </text:list-level-style-bullet>
    </text:list-style>
    <text:list-style style:name="a600">
      <text:list-level-style-bullet text:level="1" text:bullet-char="✓">
        <style:list-level-properties text:space-before="0.05139in" text:min-label-width="0.57431in"/>
        <style:text-properties fo:font-size="100%"/>
      </text:list-level-style-bullet>
      <text:list-level-style-bullet text:level="2" text:bullet-char="✓">
        <style:list-level-properties text:space-before="0.55139in" text:min-label-width="0.57431in"/>
        <style:text-properties fo:font-size="100%"/>
      </text:list-level-style-bullet>
      <text:list-level-style-bullet text:level="3" text:bullet-char="✓">
        <style:list-level-properties text:space-before="1.05139in" text:min-label-width="0.57431in"/>
        <style:text-properties fo:font-size="100%"/>
      </text:list-level-style-bullet>
      <text:list-level-style-bullet text:level="4" text:bullet-char="✓">
        <style:list-level-properties text:space-before="1.55139in" text:min-label-width="0.57431in"/>
        <style:text-properties fo:font-size="100%"/>
      </text:list-level-style-bullet>
      <text:list-level-style-bullet text:level="5" text:bullet-char="✓">
        <style:list-level-properties text:space-before="2.05139in" text:min-label-width="0.57431in"/>
        <style:text-properties fo:font-size="100%"/>
      </text:list-level-style-bullet>
      <text:list-level-style-bullet text:level="6" text:bullet-char="✓">
        <style:list-level-properties text:space-before="2.55139in" text:min-label-width="0.57431in"/>
        <style:text-properties fo:font-size="100%"/>
      </text:list-level-style-bullet>
      <text:list-level-style-bullet text:level="7" text:bullet-char="✓">
        <style:list-level-properties text:space-before="3.05139in" text:min-label-width="0.57431in"/>
        <style:text-properties fo:font-size="100%"/>
      </text:list-level-style-bullet>
      <text:list-level-style-bullet text:level="8" text:bullet-char="✓">
        <style:list-level-properties text:space-before="3.55139in" text:min-label-width="0.57431in"/>
        <style:text-properties fo:font-size="100%"/>
      </text:list-level-style-bullet>
      <text:list-level-style-bullet text:level="9" text:bullet-char="✓">
        <style:list-level-properties text:space-before="4.05139in" text:min-label-width="0.57431in"/>
        <style:text-properties fo:font-size="100%"/>
      </text:list-level-style-bullet>
    </text:list-style>
    <text:list-style style:name="a1824"/>
    <text:list-style style:name="a1796"/>
    <text:list-style style:name="a1984"/>
    <text:list-style style:name="a2041"/>
    <text:list-style style:name="a154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763"/>
    <text:list-style style:name="a2045"/>
    <text:list-style style:name="a154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546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2049"/>
    <text:list-style style:name="a546">
      <text:list-level-style-bullet text:level="1" text:bullet-char="✓">
        <style:list-level-properties text:space-before="0.05139in" text:min-label-width="0.56319in"/>
        <style:text-properties fo:color="#15b580" fo:font-family="Arial" fo:font-size="102.173%"/>
      </text:list-level-style-bullet>
      <text:list-level-style-bullet text:level="2" text:bullet-char="✓">
        <style:list-level-properties text:space-before="0.55139in" text:min-label-width="0.56319in"/>
        <style:text-properties fo:color="#15b580" fo:font-family="Arial" fo:font-size="102.173%"/>
      </text:list-level-style-bullet>
      <text:list-level-style-bullet text:level="3" text:bullet-char="✓">
        <style:list-level-properties text:space-before="1.05139in" text:min-label-width="0.56319in"/>
        <style:text-properties fo:color="#15b580" fo:font-family="Arial" fo:font-size="102.173%"/>
      </text:list-level-style-bullet>
      <text:list-level-style-bullet text:level="4" text:bullet-char="✓">
        <style:list-level-properties text:space-before="1.55139in" text:min-label-width="0.56319in"/>
        <style:text-properties fo:color="#15b580" fo:font-family="Arial" fo:font-size="102.173%"/>
      </text:list-level-style-bullet>
      <text:list-level-style-bullet text:level="5" text:bullet-char="✓">
        <style:list-level-properties text:space-before="2.05139in" text:min-label-width="0.56319in"/>
        <style:text-properties fo:color="#15b580" fo:font-family="Arial" fo:font-size="102.173%"/>
      </text:list-level-style-bullet>
      <text:list-level-style-bullet text:level="6" text:bullet-char="✓">
        <style:list-level-properties text:space-before="2.55139in" text:min-label-width="0.56319in"/>
        <style:text-properties fo:color="#15b580" fo:font-family="Arial" fo:font-size="102.173%"/>
      </text:list-level-style-bullet>
      <text:list-level-style-bullet text:level="7" text:bullet-char="✓">
        <style:list-level-properties text:space-before="3.05139in" text:min-label-width="0.56319in"/>
        <style:text-properties fo:color="#15b580" fo:font-family="Arial" fo:font-size="102.173%"/>
      </text:list-level-style-bullet>
      <text:list-level-style-bullet text:level="8" text:bullet-char="✓">
        <style:list-level-properties text:space-before="3.55139in" text:min-label-width="0.56319in"/>
        <style:text-properties fo:color="#15b580" fo:font-family="Arial" fo:font-size="102.173%"/>
      </text:list-level-style-bullet>
      <text:list-level-style-bullet text:level="9" text:bullet-char="✓">
        <style:list-level-properties text:space-before="4.05139in" text:min-label-width="0.56319in"/>
        <style:text-properties fo:color="#15b580" fo:font-family="Arial" fo:font-size="102.173%"/>
      </text:list-level-style-bullet>
    </text:list-style>
    <text:list-style style:name="a2013"/>
    <text:list-style style:name="a1890"/>
    <text:list-style style:name="a1512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328">
      <text:list-level-style-bullet text:level="1" text:bullet-char="•">
        <style:list-level-properties text:space-before="0.45972in" text:min-label-width="0.21528in"/>
        <style:text-properties fo:font-family="Times New Roman" fo:font-size="100%"/>
      </text:list-level-style-bullet>
      <text:list-level-style-bullet text:level="2" text:bullet-char="•">
        <style:list-level-properties text:space-before="0.95972in" text:min-label-width="0.21528in"/>
        <style:text-properties fo:font-family="Times New Roman" fo:font-size="100%"/>
      </text:list-level-style-bullet>
      <text:list-level-style-bullet text:level="3" text:bullet-char="•">
        <style:list-level-properties text:space-before="1.45972in" text:min-label-width="0.21528in"/>
        <style:text-properties fo:font-family="Times New Roman" fo:font-size="100%"/>
      </text:list-level-style-bullet>
      <text:list-level-style-bullet text:level="4" text:bullet-char="•">
        <style:list-level-properties text:space-before="1.95972in" text:min-label-width="0.21528in"/>
        <style:text-properties fo:font-family="Times New Roman" fo:font-size="100%"/>
      </text:list-level-style-bullet>
      <text:list-level-style-bullet text:level="5" text:bullet-char="•">
        <style:list-level-properties text:space-before="2.45972in" text:min-label-width="0.21528in"/>
        <style:text-properties fo:font-family="Times New Roman" fo:font-size="100%"/>
      </text:list-level-style-bullet>
      <text:list-level-style-bullet text:level="6" text:bullet-char="•">
        <style:list-level-properties text:space-before="2.95972in" text:min-label-width="0.21528in"/>
        <style:text-properties fo:font-family="Times New Roman" fo:font-size="100%"/>
      </text:list-level-style-bullet>
      <text:list-level-style-bullet text:level="7" text:bullet-char="•">
        <style:list-level-properties text:space-before="3.45972in" text:min-label-width="0.21528in"/>
        <style:text-properties fo:font-family="Times New Roman" fo:font-size="100%"/>
      </text:list-level-style-bullet>
      <text:list-level-style-bullet text:level="8" text:bullet-char="•">
        <style:list-level-properties text:space-before="3.95972in" text:min-label-width="0.21528in"/>
        <style:text-properties fo:font-family="Times New Roman" fo:font-size="100%"/>
      </text:list-level-style-bullet>
      <text:list-level-style-bullet text:level="9" text:bullet-char="•">
        <style:list-level-properties text:space-before="4.45972in" text:min-label-width="0.21528in"/>
        <style:text-properties fo:font-family="Times New Roman" fo:font-size="100%"/>
      </text:list-level-style-bullet>
    </text:list-style>
    <text:list-style style:name="a1895"/>
    <text:list-style style:name="a1516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899"/>
    <text:list-style style:name="a2145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1644">
      <text:list-level-style-bullet text:level="1" text:bullet-char="✓">
        <style:list-level-properties text:space-before="0.05139in" text:min-label-width="0.56736in"/>
        <style:text-properties fo:color="#1ab582" fo:font-family="Arial" fo:font-size="106.818%"/>
      </text:list-level-style-bullet>
      <text:list-level-style-bullet text:level="2" text:bullet-char="✓">
        <style:list-level-properties text:space-before="0.55139in" text:min-label-width="0.56736in"/>
        <style:text-properties fo:color="#1ab582" fo:font-family="Arial" fo:font-size="106.818%"/>
      </text:list-level-style-bullet>
      <text:list-level-style-bullet text:level="3" text:bullet-char="✓">
        <style:list-level-properties text:space-before="1.05139in" text:min-label-width="0.56736in"/>
        <style:text-properties fo:color="#1ab582" fo:font-family="Arial" fo:font-size="106.818%"/>
      </text:list-level-style-bullet>
      <text:list-level-style-bullet text:level="4" text:bullet-char="✓">
        <style:list-level-properties text:space-before="1.55139in" text:min-label-width="0.56736in"/>
        <style:text-properties fo:color="#1ab582" fo:font-family="Arial" fo:font-size="106.818%"/>
      </text:list-level-style-bullet>
      <text:list-level-style-bullet text:level="5" text:bullet-char="✓">
        <style:list-level-properties text:space-before="2.05139in" text:min-label-width="0.56736in"/>
        <style:text-properties fo:color="#1ab582" fo:font-family="Arial" fo:font-size="106.818%"/>
      </text:list-level-style-bullet>
      <text:list-level-style-bullet text:level="6" text:bullet-char="✓">
        <style:list-level-properties text:space-before="2.55139in" text:min-label-width="0.56736in"/>
        <style:text-properties fo:color="#1ab582" fo:font-family="Arial" fo:font-size="106.818%"/>
      </text:list-level-style-bullet>
      <text:list-level-style-bullet text:level="7" text:bullet-char="✓">
        <style:list-level-properties text:space-before="3.05139in" text:min-label-width="0.56736in"/>
        <style:text-properties fo:color="#1ab582" fo:font-family="Arial" fo:font-size="106.818%"/>
      </text:list-level-style-bullet>
      <text:list-level-style-bullet text:level="8" text:bullet-char="✓">
        <style:list-level-properties text:space-before="3.55139in" text:min-label-width="0.56736in"/>
        <style:text-properties fo:color="#1ab582" fo:font-family="Arial" fo:font-size="106.818%"/>
      </text:list-level-style-bullet>
      <text:list-level-style-bullet text:level="9" text:bullet-char="✓">
        <style:list-level-properties text:space-before="4.05139in" text:min-label-width="0.56736in"/>
        <style:text-properties fo:color="#1ab582" fo:font-family="Arial" fo:font-size="106.818%"/>
      </text:list-level-style-bullet>
    </text:list-style>
    <text:list-style style:name="a1868"/>
    <text:list-style style:name="a1993"/>
    <text:list-style style:name="a1772"/>
    <text:list-style style:name="a1838"/>
    <text:list-style style:name="a1800"/>
    <text:list-style style:name="a2053"/>
    <text:list-style style:name="a1997"/>
    <text:list-style style:name="a1804"/>
    <text:list-style style:name="a2057"/>
    <text:list-style style:name="a1962"/>
    <text:list-style style:name="a152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931"/>
    <text:list-style style:name="a1680">
      <text:list-level-style-bullet text:level="1" text:bullet-char="✓">
        <style:list-level-properties text:space-before="0.05278in" text:min-label-width="0.56597in"/>
        <style:text-properties fo:color="#1ab582" fo:font-family="Arial" fo:font-size="106.818%"/>
      </text:list-level-style-bullet>
      <text:list-level-style-bullet text:level="2" text:bullet-char="✓">
        <style:list-level-properties text:space-before="0.55278in" text:min-label-width="0.56597in"/>
        <style:text-properties fo:color="#1ab582" fo:font-family="Arial" fo:font-size="106.818%"/>
      </text:list-level-style-bullet>
      <text:list-level-style-bullet text:level="3" text:bullet-char="✓">
        <style:list-level-properties text:space-before="1.05278in" text:min-label-width="0.56597in"/>
        <style:text-properties fo:color="#1ab582" fo:font-family="Arial" fo:font-size="106.818%"/>
      </text:list-level-style-bullet>
      <text:list-level-style-bullet text:level="4" text:bullet-char="✓">
        <style:list-level-properties text:space-before="1.55278in" text:min-label-width="0.56597in"/>
        <style:text-properties fo:color="#1ab582" fo:font-family="Arial" fo:font-size="106.818%"/>
      </text:list-level-style-bullet>
      <text:list-level-style-bullet text:level="5" text:bullet-char="✓">
        <style:list-level-properties text:space-before="2.05278in" text:min-label-width="0.56597in"/>
        <style:text-properties fo:color="#1ab582" fo:font-family="Arial" fo:font-size="106.818%"/>
      </text:list-level-style-bullet>
      <text:list-level-style-bullet text:level="6" text:bullet-char="✓">
        <style:list-level-properties text:space-before="2.55278in" text:min-label-width="0.56597in"/>
        <style:text-properties fo:color="#1ab582" fo:font-family="Arial" fo:font-size="106.818%"/>
      </text:list-level-style-bullet>
      <text:list-level-style-bullet text:level="7" text:bullet-char="✓">
        <style:list-level-properties text:space-before="3.05278in" text:min-label-width="0.56597in"/>
        <style:text-properties fo:color="#1ab582" fo:font-family="Arial" fo:font-size="106.818%"/>
      </text:list-level-style-bullet>
      <text:list-level-style-bullet text:level="8" text:bullet-char="✓">
        <style:list-level-properties text:space-before="3.55278in" text:min-label-width="0.56597in"/>
        <style:text-properties fo:color="#1ab582" fo:font-family="Arial" fo:font-size="106.818%"/>
      </text:list-level-style-bullet>
      <text:list-level-style-bullet text:level="9" text:bullet-char="✓">
        <style:list-level-properties text:space-before="4.05278in" text:min-label-width="0.56597in"/>
        <style:text-properties fo:color="#1ab582" fo:font-family="Arial" fo:font-size="106.818%"/>
      </text:list-level-style-bullet>
    </text:list-style>
    <text:list-style style:name="a1524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935"/>
    <text:list-style style:name="a1528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2150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1716">
      <text:list-level-style-bullet text:level="1" text:bullet-char="✓">
        <style:list-level-properties text:space-before="0.05208in" text:min-label-width="0.56389in"/>
        <style:text-properties fo:font-size="100%"/>
      </text:list-level-style-bullet>
      <text:list-level-style-bullet text:level="2" text:bullet-char="✓">
        <style:list-level-properties text:space-before="0.55208in" text:min-label-width="0.56389in"/>
        <style:text-properties fo:font-size="100%"/>
      </text:list-level-style-bullet>
      <text:list-level-style-bullet text:level="3" text:bullet-char="✓">
        <style:list-level-properties text:space-before="1.05208in" text:min-label-width="0.56389in"/>
        <style:text-properties fo:font-size="100%"/>
      </text:list-level-style-bullet>
      <text:list-level-style-bullet text:level="4" text:bullet-char="✓">
        <style:list-level-properties text:space-before="1.55208in" text:min-label-width="0.56389in"/>
        <style:text-properties fo:font-size="100%"/>
      </text:list-level-style-bullet>
      <text:list-level-style-bullet text:level="5" text:bullet-char="✓">
        <style:list-level-properties text:space-before="2.05208in" text:min-label-width="0.56389in"/>
        <style:text-properties fo:font-size="100%"/>
      </text:list-level-style-bullet>
      <text:list-level-style-bullet text:level="6" text:bullet-char="✓">
        <style:list-level-properties text:space-before="2.55208in" text:min-label-width="0.56389in"/>
        <style:text-properties fo:font-size="100%"/>
      </text:list-level-style-bullet>
      <text:list-level-style-bullet text:level="7" text:bullet-char="✓">
        <style:list-level-properties text:space-before="3.05208in" text:min-label-width="0.56389in"/>
        <style:text-properties fo:font-size="100%"/>
      </text:list-level-style-bullet>
      <text:list-level-style-bullet text:level="8" text:bullet-char="✓">
        <style:list-level-properties text:space-before="3.55208in" text:min-label-width="0.56389in"/>
        <style:text-properties fo:font-size="100%"/>
      </text:list-level-style-bullet>
      <text:list-level-style-bullet text:level="9" text:bullet-char="✓">
        <style:list-level-properties text:space-before="4.05208in" text:min-label-width="0.56389in"/>
        <style:text-properties fo:font-size="100%"/>
      </text:list-level-style-bullet>
    </text:list-style>
    <text:list-style style:name="a2154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1903"/>
    <text:list-style style:name="a2158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1843"/>
    <text:list-style style:name="a1373">
      <text:list-level-style-bullet text:level="1" text:bullet-char="•">
        <style:list-level-properties text:space-before="0.45833in" text:min-label-width="0.01042in"/>
        <style:text-properties fo:font-family="Times New Roman" fo:font-size="100%"/>
      </text:list-level-style-bullet>
      <text:list-level-style-bullet text:level="2" text:bullet-char="•">
        <style:list-level-properties text:space-before="0.95833in" text:min-label-width="0.01042in"/>
        <style:text-properties fo:font-family="Times New Roman" fo:font-size="100%"/>
      </text:list-level-style-bullet>
      <text:list-level-style-bullet text:level="3" text:bullet-char="•">
        <style:list-level-properties text:space-before="1.45833in" text:min-label-width="0.01042in"/>
        <style:text-properties fo:font-family="Times New Roman" fo:font-size="100%"/>
      </text:list-level-style-bullet>
      <text:list-level-style-bullet text:level="4" text:bullet-char="•">
        <style:list-level-properties text:space-before="1.95833in" text:min-label-width="0.01042in"/>
        <style:text-properties fo:font-family="Times New Roman" fo:font-size="100%"/>
      </text:list-level-style-bullet>
      <text:list-level-style-bullet text:level="5" text:bullet-char="•">
        <style:list-level-properties text:space-before="2.45833in" text:min-label-width="0.01042in"/>
        <style:text-properties fo:font-family="Times New Roman" fo:font-size="100%"/>
      </text:list-level-style-bullet>
      <text:list-level-style-bullet text:level="6" text:bullet-char="•">
        <style:list-level-properties text:space-before="2.95833in" text:min-label-width="0.01042in"/>
        <style:text-properties fo:font-family="Times New Roman" fo:font-size="100%"/>
      </text:list-level-style-bullet>
      <text:list-level-style-bullet text:level="7" text:bullet-char="•">
        <style:list-level-properties text:space-before="3.45833in" text:min-label-width="0.01042in"/>
        <style:text-properties fo:font-family="Times New Roman" fo:font-size="100%"/>
      </text:list-level-style-bullet>
      <text:list-level-style-bullet text:level="8" text:bullet-char="•">
        <style:list-level-properties text:space-before="3.95833in" text:min-label-width="0.01042in"/>
        <style:text-properties fo:font-family="Times New Roman" fo:font-size="100%"/>
      </text:list-level-style-bullet>
      <text:list-level-style-bullet text:level="9" text:bullet-char="•">
        <style:list-level-properties text:space-before="4.45833in" text:min-label-width="0.01042in"/>
        <style:text-properties fo:font-family="Times New Roman" fo:font-size="100%"/>
      </text:list-level-style-bullet>
    </text:list-style>
    <text:list-style style:name="a2061"/>
    <text:list-style style:name="a1848"/>
    <text:list-style style:name="a1783"/>
    <text:list-style style:name="a1787"/>
    <text:list-style style:name="a1975"/>
    <text:list-style style:name="a1344">
      <text:list-level-style-bullet text:level="1" text:bullet-char="•">
        <style:list-level-properties text:space-before="0.45972in" text:min-label-width="0.21111in"/>
        <style:text-properties fo:font-family="Times New Roman" fo:font-size="100%"/>
      </text:list-level-style-bullet>
      <text:list-level-style-bullet text:level="2" text:bullet-char="•">
        <style:list-level-properties text:space-before="0.95972in" text:min-label-width="0.21111in"/>
        <style:text-properties fo:font-family="Times New Roman" fo:font-size="100%"/>
      </text:list-level-style-bullet>
      <text:list-level-style-bullet text:level="3" text:bullet-char="•">
        <style:list-level-properties text:space-before="1.45972in" text:min-label-width="0.21111in"/>
        <style:text-properties fo:font-family="Times New Roman" fo:font-size="100%"/>
      </text:list-level-style-bullet>
      <text:list-level-style-bullet text:level="4" text:bullet-char="•">
        <style:list-level-properties text:space-before="1.95972in" text:min-label-width="0.21111in"/>
        <style:text-properties fo:font-family="Times New Roman" fo:font-size="100%"/>
      </text:list-level-style-bullet>
      <text:list-level-style-bullet text:level="5" text:bullet-char="•">
        <style:list-level-properties text:space-before="2.45972in" text:min-label-width="0.21111in"/>
        <style:text-properties fo:font-family="Times New Roman" fo:font-size="100%"/>
      </text:list-level-style-bullet>
      <text:list-level-style-bullet text:level="6" text:bullet-char="•">
        <style:list-level-properties text:space-before="2.95972in" text:min-label-width="0.21111in"/>
        <style:text-properties fo:font-family="Times New Roman" fo:font-size="100%"/>
      </text:list-level-style-bullet>
      <text:list-level-style-bullet text:level="7" text:bullet-char="•">
        <style:list-level-properties text:space-before="3.45972in" text:min-label-width="0.21111in"/>
        <style:text-properties fo:font-family="Times New Roman" fo:font-size="100%"/>
      </text:list-level-style-bullet>
      <text:list-level-style-bullet text:level="8" text:bullet-char="•">
        <style:list-level-properties text:space-before="3.95972in" text:min-label-width="0.21111in"/>
        <style:text-properties fo:font-family="Times New Roman" fo:font-size="100%"/>
      </text:list-level-style-bullet>
      <text:list-level-style-bullet text:level="9" text:bullet-char="•">
        <style:list-level-properties text:space-before="4.45972in" text:min-label-width="0.21111in"/>
        <style:text-properties fo:font-family="Times New Roman" fo:font-size="100%"/>
      </text:list-level-style-bullet>
    </text:list-style>
    <text:list-style style:name="a2032"/>
    <text:list-style style:name="a1754"/>
  </office:automatic-styles>
  <office:body>
    <office:presentation>
      <draw:page draw:name="Slide1" draw:style-name="a102" draw:master-page-name="Master1-Layout5-obj-Blank" presentation:presentation-page-layout-name="Master1-PPL5" draw:id="Slide-256">
        <draw:frame draw:id="id29" draw:style-name="a103" draw:name="object 2" svg:x="0in" svg:y="0in" svg:width="21.98611in" svg:height="12.36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104" draw:master-page-name="Master1-Layout2-obj-Title-and-Content" presentation:presentation-page-layout-name="Master1-PPL2" draw:id="Slide-257">
        <draw:frame draw:id="id30" draw:style-name="a105" draw:name="object 2" svg:x="14.84599in" svg:y="3.83765in" svg:width="6.94811in" svg:height="4.9548in" style:rel-width="scale" style:rel-height="scale">
          <draw:image xlink:href="media/image2.jpg" xlink:type="simple" xlink:show="embed" xlink:actuate="onLoad"/>
          <svg:title/>
          <svg:desc/>
        </draw:frame>
        <draw:custom-shape svg:x="1.41929in" svg:y="0.96466in" svg:width="0in" svg:height="0.80972in" draw:id="id31" draw:style-name="a108" draw:name="object 4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32" presentation:style-name="a120" draw:name="object 11" svg:x="1.7711in" svg:y="1.00244in" svg:width="15.81358in" svg:height="0.77222in" presentation:class="title" presentation:placeholder="false">
          <draw:text-box>
            <text:p text:style-name="a119" text:class-names="" text:cond-style-name=""><text:span text:style-name="a109" text:class-names="">VEGETAZIONE</text:span><text:span text:style-name="a110" text:class-names=""><text:s text:c="1"/></text:span><text:span text:style-name="a111" text:class-names="">PROCEDURALE</text:span><text:span text:style-name="a112" text:class-names=""><text:s text:c="1"/></text:span><text:span text:style-name="a113" text:class-names="">E</text:span><text:span text:style-name="a114" text:class-names=""><text:s text:c="1"/></text:span><text:span text:style-name="a115" text:class-names="">COMPLESSIT</text:span><text:span text:style-name="a116" text:class-names="">A</text:span><text:span text:style-name="a117" text:class-names="">'</text:span><text:span text:style-name="a118" text:class-names=""/></text:p>
          </draw:text-box>
          <svg:title/>
          <svg:desc>$PPTXTitle</svg:desc>
        </draw:frame>
        <draw:frame draw:id="id33" draw:style-name="a169" draw:name="object 14" svg:x="0.85848in" svg:y="9.28589in" svg:width="5.59861in" svg:height="1.48506in">
          <draw:text-box>
            <text:p text:style-name="a127" text:class-names="" text:cond-style-name=""><text:span text:style-name="a121" text:class-names="">Grandezza</text:span><text:span text:style-name="a122" text:class-names=""><text:s text:c="1"/></text:span><text:span text:style-name="a123" text:class-names="">ed</text:span><text:span text:style-name="a124" text:class-names=""><text:s text:c="1"/></text:span><text:span text:style-name="a125" text:class-names="">Economia</text:span><text:span text:style-name="a126" text:class-names=""/></text:p>
            <text:p text:style-name="a168" text:class-names="" text:cond-style-name=""><text:span text:style-name="a128" text:class-names="">Grand</text:span><text:span text:style-name="a129" text:class-names=""><text:s text:c="1"/></text:span><text:span text:style-name="a130" text:class-names="">Theft</text:span><text:span text:style-name="a131" text:class-names=""><text:s text:c="1"/></text:span><text:span text:style-name="a132" text:class-names="">Auto</text:span><text:span text:style-name="a133" text:class-names=""><text:s text:c="1"/></text:span><text:span text:style-name="a134" text:class-names="">V:</text:span><text:span text:style-name="a135" text:class-names=""><text:s text:c="1"/></text:span><text:span text:style-name="a136" text:class-names="">La scala</text:span><text:span text:style-name="a137" text:class-names=""><text:s text:c="1"/></text:span><text:span text:style-name="a138" text:class-names="">imponente</text:span><text:span text:style-name="a139" text:class-names=""><text:s text:c="1"/></text:span><text:span text:style-name="a140" text:class-names="">dei<text:s text:c="1"/></text:span><text:span text:style-name="a141" text:class-names="">mondi</text:span><text:span text:style-name="a142" text:class-names=""><text:s text:c="1"/></text:span><text:span text:style-name="a143" text:class-names="">aperti</text:span><text:span text:style-name="a144" text:class-names=""><text:s text:c="1"/></text:span><text:span text:style-name="a145" text:class-names="">moderni</text:span><text:span text:style-name="a146" text:class-names=""><text:s text:c="1"/></text:span><text:span text:style-name="a147" text:class-names="">richiede</text:span><text:span text:style-name="a148" text:class-names=""><text:s text:c="1"/></text:span><text:span text:style-name="a149" text:class-names="">milioni</text:span><text:span text:style-name="a150" text:class-names=""><text:s text:c="1"/></text:span><text:span text:style-name="a151" text:class-names="">di<text:s text:c="1"/></text:span><text:span text:style-name="a152" text:class-names="">singo</text:span><text:span text:style-name="a153" text:class-names="">li</text:span><text:span text:style-name="a154" text:class-names=""><text:s text:c="1"/></text:span><text:span text:style-name="a155" text:class-names="">arbusti</text:span><text:span text:style-name="a156" text:class-names="">,</text:span><text:span text:style-name="a157" text:class-names=""><text:s text:c="1"/></text:span><text:span text:style-name="a158" text:class-names="">erba</text:span><text:span text:style-name="a159" text:class-names=""><text:s text:c="1"/></text:span><text:span text:style-name="a160" text:class-names="">e</text:span><text:span text:style-name="a161" text:class-names=""><text:s text:c="1"/></text:span><text:span text:style-name="a162" text:class-names="">foreste</text:span><text:span text:style-name="a163" text:class-names=""><text:s text:c="1"/></text:span><text:span text:style-name="a164" text:class-names="">credibi</text:span><text:span text:style-name="a165" text:class-names="">li</text:span><text:span text:style-name="a166" text:class-names="">.</text:span><text:span text:style-name="a167" text:class-names=""/></text:p>
          </draw:text-box>
          <svg:title/>
          <svg:desc/>
        </draw:frame>
        <draw:frame draw:id="id34" draw:style-name="a208" draw:name="object 15" svg:x="7.99299in" svg:y="9.29532in" svg:width="6.0875in" svg:height="1.53958in">
          <draw:text-box>
            <text:p text:style-name="a174" text:class-names="" text:cond-style-name=""><text:span text:style-name="a170" text:class-names="">Dinamismo</text:span><text:span text:style-name="a171" text:class-names=""><text:s text:c="1"/></text:span><text:span text:style-name="a172" text:class-names="">Organico</text:span><text:span text:style-name="a173" text:class-names=""/></text:p>
            <text:p text:style-name="a207" text:class-names="" text:cond-style-name=""><text:span text:style-name="a175" text:class-names="">Far</text:span><text:span text:style-name="a176" text:class-names=""><text:s text:c="1"/></text:span><text:span text:style-name="a177" text:class-names="">Cry:</text:span><text:span text:style-name="a178" text:class-names=""><text:s text:c="1"/></text:span><text:span text:style-name="a179" text:class-names="">Giungle</text:span><text:span text:style-name="a180" text:class-names=""><text:s text:c="1"/></text:span><text:span text:style-name="a181" text:class-names="">dense</text:span><text:span text:style-name="a182" text:class-names=""><text:s text:c="1"/></text:span><text:span text:style-name="a183" text:class-names="">ed</text:span><text:span text:style-name="a184" text:class-names=""><text:s text:c="1"/></text:span><text:span text:style-name="a185" text:class-names="">ecosistemi</text:span><text:span text:style-name="a186" text:class-names=""><text:s text:c="1"/></text:span><text:span text:style-name="a187" text:class-names="">selvaggi<text:s text:c="1"/></text:span><text:span text:style-name="a188" text:class-names="">dove</text:span><text:span text:style-name="a189" text:class-names=""><text:s text:c="1"/></text:span><text:span text:style-name="a190" text:class-names="">ii</text:span><text:span text:style-name="a191" text:class-names=""><text:s text:c="1"/></text:span><text:span text:style-name="a192" text:class-names="">posizionamento</text:span><text:span text:style-name="a193" text:class-names=""><text:s text:c="1"/></text:span><text:span text:style-name="a194" text:class-names="">manuale</text:span><text:span text:style-name="a195" text:class-names=""><text:s text:c="1"/></text:span><text:span text:style-name="a196" text:class-names="">di</text:span><text:span text:style-name="a197" text:class-names=""><text:s text:c="1"/></text:span><text:span text:style-name="a198" text:class-names="">ogni</text:span><text:span text:style-name="a199" text:class-names=""><text:s text:c="1"/></text:span><text:span text:style-name="a200" text:class-names="">foglia</text:span><text:span text:style-name="a201" text:class-names=""><text:s text:c="1"/></text:span><text:span text:style-name="a202" text:class-names="">e<text:s text:c="1"/></text:span><text:span text:style-name="a203" text:class-names="">matematicamente</text:span><text:span text:style-name="a204" text:class-names=""><text:s text:c="1"/></text:span><text:span text:style-name="a205" text:class-names="">impraticabile.</text:span><text:span text:style-name="a206" text:class-names=""/></text:p>
          </draw:text-box>
          <svg:title/>
          <svg:desc/>
        </draw:frame>
        <draw:frame draw:id="id35" draw:style-name="a249" draw:name="object 16" svg:x="15.33632in" svg:y="9.23069in" svg:width="5.95486in" svg:height="1.53958in">
          <draw:text-box>
            <text:p text:style-name="a213" text:class-names="" text:cond-style-name=""><text:span text:style-name="a209" text:class-names="">Adattamento</text:span><text:span text:style-name="a210" text:class-names=""><text:s text:c="1"/></text:span><text:span text:style-name="a211" text:class-names="">Stilistico</text:span><text:span text:style-name="a212" text:class-names=""/></text:p>
            <text:p text:style-name="a226" text:class-names="" text:cond-style-name=""><text:span text:style-name="a214" text:class-names="">Borderlands</text:span><text:span text:style-name="a215" text:class-names=""><text:s text:c="1"/></text:span><text:span text:style-name="a216" text:class-names="">2:</text:span><text:span text:style-name="a217" text:class-names=""><text:s text:c="1"/></text:span><text:span text:style-name="a218" text:class-names="">L'esigenza</text:span><text:span text:style-name="a219" text:class-names=""><text:s text:c="1"/></text:span><text:span text:style-name="a220" text:class-names="">di</text:span><text:span text:style-name="a221" text:class-names=""><text:s text:c="1"/></text:span><text:span text:style-name="a222" text:class-names="">preservare</text:span><text:span text:style-name="a223" text:class-names=""><text:s text:c="1"/></text:span><text:span text:style-name="a224" text:class-names="">regole</text:span><text:span text:style-name="a225" text:class-names=""/></text:p>
            <text:p text:style-name="a248" text:class-names="" text:cond-style-name=""><text:span text:style-name="a227" text:class-names="">coerenti</text:span><text:span text:style-name="a228" text:class-names=""><text:s text:c="1"/></text:span><text:span text:style-name="a229" text:class-names="">di</text:span><text:span text:style-name="a230" text:class-names=""><text:s text:c="1"/></text:span><text:span text:style-name="a231" text:class-names="">generazione</text:span><text:span text:style-name="a232" text:class-names=""><text:s text:c="1"/></text:span><text:span text:style-name="a233" text:class-names="">persino</text:span><text:span text:style-name="a234" text:class-names=""><text:s text:c="1"/></text:span><text:span text:style-name="a235" text:class-names="">all'interno</text:span><text:span text:style-name="a236" text:class-names=""><text:s text:c="1"/></text:span><text:span text:style-name="a237" text:class-names="">di<text:s text:c="1"/></text:span><text:span text:style-name="a238" text:class-names="">stili</text:span><text:span text:style-name="a239" text:class-names=""><text:s text:c="1"/></text:span><text:span text:style-name="a240" text:class-names="">grafici</text:span><text:span text:style-name="a241" text:class-names=""><text:s text:c="1"/></text:span><text:span text:style-name="a242" text:class-names="">astratti</text:span><text:span text:style-name="a243" text:class-names=""><text:s text:c="1"/></text:span><text:span text:style-name="a244" text:class-names="">e</text:span><text:span text:style-name="a245" text:class-names=""><text:s text:c="1"/></text:span><text:span text:style-name="a246" text:class-names="">stilizzati.</text:span><text:span text:style-name="a247" text:class-names=""/></text:p>
          </draw:text-box>
          <svg:title/>
          <svg:desc/>
        </draw:frame>
        <draw:frame draw:id="id36" draw:style-name="a250" draw:name="Immagine 17" svg:x="7.43436in" svg:y="3.84002in" svg:width="7.41973in" svg:height="4.94378in" style:rel-width="scale" style:rel-height="scale">
          <draw:image xlink:href="media/image3.jpeg" xlink:type="simple" xlink:show="embed" xlink:actuate="onLoad"/>
          <svg:title/>
          <svg:desc>Immagine che contiene aria aperta, giungla, vegetazione, pianta

Il contenuto generato dall&amp;#39;IA potrebbe non essere corretto.</svg:desc>
        </draw:frame>
        <draw:frame draw:id="id37" draw:style-name="a251" draw:name="Immagine 18" svg:x="0.00917in" svg:y="3.83313in" svg:width="7.42353in" svg:height="4.95664in" style:rel-width="scale" style:rel-height="scale">
          <draw:image xlink:href="media/image4.jpeg" xlink:type="simple" xlink:show="embed" xlink:actuate="onLoad"/>
          <svg:title/>
          <svg:desc>Immagine che contiene aria aperta, nuvola, abete rosso, cielo

Il contenuto generato dall&amp;#39;IA potrebbe non essere corretto.</svg:desc>
        </draw:frame>
      </draw:page>
      <draw:page draw:name="Slide3" draw:style-name="a252" draw:master-page-name="Master1-Layout2-obj-Title-and-Content" presentation:presentation-page-layout-name="Master1-PPL2" draw:id="Slide-258">
        <draw:frame draw:id="id38" draw:style-name="a253" draw:name="object 2" svg:x="11.3371in" svg:y="2.60097in" svg:width="9.30709in" svg:height="3.80658in" style:rel-width="scale" style:rel-height="scale">
          <draw:image xlink:href="media/image5.jpg" xlink:type="simple" xlink:show="embed" xlink:actuate="onLoad"/>
          <svg:title/>
          <svg:desc/>
        </draw:frame>
        <draw:frame draw:id="id39" draw:style-name="a254" draw:name="object 3" svg:x="11.35431in" svg:y="6.90706in" svg:width="9.27268in" svg:height="3.78936in" style:rel-width="scale" style:rel-height="scale">
          <draw:image xlink:href="media/image6.jpg" xlink:type="simple" xlink:show="embed" xlink:actuate="onLoad"/>
          <svg:title/>
          <svg:desc/>
        </draw:frame>
        <draw:custom-shape svg:x="1.41929in" svg:y="0.96466in" svg:width="0in" svg:height="0.62014in" draw:id="id40" draw:style-name="a257" draw:name="object 4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type="non-primitive" svg:viewBox="0 0 0 567055" draw:enhanced-path="M 0 5669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67055"/>
            <draw:equation draw:name="f8" draw:formula="0 / ?f6"/>
            <draw:equation draw:name="f9" draw:formula="1 / ?f6"/>
            <draw:equation draw:name="f10" draw:formula="0 / ?f7"/>
            <draw:equation draw:name="f11" draw:formula="567055 / ?f7"/>
          </draw:enhanced-geometry>
        </draw:custom-shape>
        <draw:frame draw:id="id41" presentation:style-name="a270" draw:name="object 5" svg:x="1.7711in" svg:y="1.00244in" svg:width="15.81358in" svg:height="0.77222in" presentation:class="title" presentation:placeholder="false">
          <draw:text-box>
            <text:p text:style-name="a269" text:class-names="" text:cond-style-name=""><text:span text:style-name="a258" text:class-names="">ASSET</text:span><text:span text:style-name="a259" text:class-names=""><text:s text:c="1"/></text:span><text:span text:style-name="a260" text:class-names="">TRADIZIONALI</text:span><text:span text:style-name="a261" text:class-names=""><text:s text:c="1"/></text:span><text:span text:style-name="a262" text:class-names="">E</text:span><text:span text:style-name="a263" text:class-names=""><text:s text:c="1"/></text:span><text:span text:style-name="a264" text:class-names="">RIGIDI</text:span><text:span text:style-name="a265" text:class-names=""><text:s text:c="1"/></text:span><text:span text:style-name="a266" text:class-names="">NEI</text:span><text:span text:style-name="a267" text:class-names=""><text:s text:c="1"/></text:span><text:span text:style-name="a268" text:class-names="">GIOCHI</text:span></text:p>
          </draw:text-box>
          <svg:title/>
          <svg:desc>$PPTXTitle</svg:desc>
        </draw:frame>
        <draw:frame draw:id="id42" draw:style-name="a412" draw:name="object 6" svg:x="1.02643in" svg:y="3.54304in" svg:width="9.64937in" svg:height="6.15in">
          <draw:text-box>
            <text:p text:style-name="a283" text:class-names="" text:cond-style-name=""><text:span text:style-name="a271" text:class-names="">La</text:span><text:span text:style-name="a272" text:class-names=""><text:s text:c="1"/></text:span><text:span text:style-name="a273" text:class-names="">rigidita</text:span><text:span text:style-name="a274" text:class-names=""><text:s text:c="1"/></text:span><text:span text:style-name="a275" text:class-names="">del</text:span><text:span text:style-name="a276" text:class-names=""><text:s text:c="1"/></text:span><text:span text:style-name="a277" text:class-names="">modellato</text:span><text:span text:style-name="a278" text:class-names=""><text:s text:c="1"/></text:span><text:span text:style-name="a279" text:class-names="">a</text:span><text:span text:style-name="a280" text:class-names=""><text:s text:c="1"/></text:span><text:span text:style-name="a281" text:class-names="">mano</text:span><text:span text:style-name="a282" text:class-names=""/></text:p>
            <text:p text:style-name="a324" text:class-names="" text:cond-style-name=""><text:span text:style-name="a284" text:class-names="">I</text:span><text:span text:style-name="a285" text:class-names=""><text:s text:c="1"/></text:span><text:span text:style-name="a286" text:class-names="">tradizionali</text:span><text:span text:style-name="a287" text:class-names=""><text:s text:c="1"/></text:span><text:span text:style-name="a288" text:class-names="">oggetti</text:span><text:span text:style-name="a289" text:class-names=""><text:s text:c="1"/></text:span><text:span text:style-name="a290" text:class-names="">di</text:span><text:span text:style-name="a291" text:class-names=""><text:s text:c="1"/></text:span><text:span text:style-name="a292" text:class-names="">gioco</text:span><text:span text:style-name="a293" text:class-names=""><text:s text:c="1"/></text:span><text:span text:style-name="a294" text:class-names="">statici</text:span><text:span text:style-name="a295" text:class-names=""><text:s text:c="1"/></text:span><text:span text:style-name="a296" text:class-names="">(come</text:span><text:span text:style-name="a297" text:class-names=""><text:s text:c="1"/></text:span><text:span text:style-name="a298" text:class-names="">pietre</text:span><text:span text:style-name="a299" text:class-names="">,</text:span><text:span text:style-name="a300" text:class-names=""><text:s text:c="1"/></text:span><text:span text:style-name="a301" text:class-names="">veicoli</text:span><text:span text:style-name="a302" text:class-names=""><text:s text:c="1"/></text:span><text:span text:style-name="a303" text:class-names="">o<text:s text:c="1"/></text:span><text:span text:style-name="a304" text:class-names="">palazzi)</text:span><text:span text:style-name="a305" text:class-names=""><text:s text:c="1"/></text:span><text:span text:style-name="a306" text:class-names="">vengono</text:span><text:span text:style-name="a307" text:class-names=""><text:s text:c="1"/></text:span><text:span text:style-name="a308" text:class-names="">sapientemente</text:span><text:span text:style-name="a309" text:class-names=""><text:s text:c="1"/></text:span><text:span text:style-name="a310" text:class-names="">scolpiti</text:span><text:span text:style-name="a311" text:class-names=""><text:s text:c="1"/></text:span><text:span text:style-name="a312" text:class-names="">in<text:s text:c="1"/></text:span><text:span text:style-name="a313" text:class-names="">pacchetti</text:span><text:span text:style-name="a314" text:class-names=""> </text:span><text:span text:style-name="a315" text:class-names="">discreti</text:span><text:span text:style-name="a316" text:class-names=""><text:s text:c="1"/></text:span><text:span text:style-name="a317" text:class-names="">da</text:span><text:span text:style-name="a318" text:class-names=""><text:s text:c="1"/></text:span><text:span text:style-name="a319" text:class-names="">singoli</text:span><text:span text:style-name="a320" text:class-names=""><text:s text:c="1"/></text:span><text:span text:style-name="a321" text:class-names="">artisti</text:span><text:span text:style-name="a322" text:class-names="">.</text:span><text:span text:style-name="a323" text:class-names=""/></text:p>
            <text:list text:style-name="a347">
              <text:list-item>
                <text:p text:style-name="a346" text:class-names="" text:cond-style-name=""><text:span text:style-name="a325" text:class-names="">Coerenza</text:span><text:span text:style-name="a326" text:class-names=""><text:s text:c="1"/></text:span><text:span text:style-name="a327" text:class-names="">geometrica</text:span><text:span text:style-name="a328" text:class-names="">:</text:span><text:span text:style-name="a329" text:class-names=""><text:s text:c="1"/></text:span><text:span text:style-name="a330" text:class-names="">Ideale</text:span><text:span text:style-name="a331" text:class-names=""><text:s text:c="1"/></text:span><text:span text:style-name="a332" text:class-names="">per</text:span><text:span text:style-name="a333" text:class-names=""><text:s text:c="1"/></text:span><text:span text:style-name="a334" text:class-names="">forme</text:span><text:span text:style-name="a335" text:class-names=""><text:s text:c="1"/></text:span><text:span text:style-name="a336" text:class-names="">squadrate</text:span><text:span text:style-name="a337" text:class-names=""><text:s text:c="1"/></text:span><text:span text:style-name="a338" text:class-names="">e <text:tab/></text:span><text:span text:style-name="a339" text:class-names="">architetture</text:span><text:span text:style-name="a340" text:class-names=""><text:s text:c="1"/></text:span><text:span text:style-name="a341" text:class-names="">artificiali</text:span><text:span text:style-name="a342" text:class-names=""><text:s text:c="1"/></text:span><text:span text:style-name="a343" text:class-names="">ripetibili</text:span><text:span text:style-name="a344" text:class-names="">.</text:span><text:span text:style-name="a34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48" text:class-names=""><text:tab/></text:span><text:span text:style-name="a349" text:class-names="">II</text:span><text:span text:style-name="a350" text:class-names=""><text:s text:c="1"/></text:span><text:span text:style-name="a351" text:class-names="">problema</text:span><text:span text:style-name="a352" text:class-names=""><text:s text:c="1"/></text:span><text:span text:style-name="a353" text:class-names="">organico</text:span><text:span text:style-name="a354" text:class-names="">:</text:span><text:span text:style-name="a355" text:class-names=""><text:s text:c="1"/></text:span><text:span text:style-name="a356" text:class-names="">Sgretola</text:span><text:span text:style-name="a357" text:class-names=""><text:s text:c="1"/></text:span><text:span text:style-name="a358" text:class-names="">la</text:span><text:span text:style-name="a359" text:class-names=""><text:s text:c="1"/></text:span><text:span text:style-name="a360" text:class-names="">memoria</text:span><text:span text:style-name="a361" text:class-names=""><text:s text:c="1"/></text:span><text:span text:style-name="a362" text:class-names="">se</text:span><text:span text:style-name="a363" text:class-names=""><text:s text:c="1"/></text:span><text:span text:style-name="a364" text:class-names="">usato</text:span><text:span text:style-name="a365" text:class-names=""><text:s text:c="1"/></text:span><text:span text:style-name="a366" text:class-names="">per<text:s text:c="1"/></text:span><text:span text:style-name="a367" text:class-names="">duplicare</text:span><text:span text:style-name="a368" text:class-names=""><text:s text:c="1"/></text:span><text:span text:style-name="a369" text:class-names="">variazioni</text:span><text:span text:style-name="a370" text:class-names=""><text:s text:c="1"/></text:span><text:span text:style-name="a371" text:class-names="">impercettibili</text:span><text:span text:style-name="a372" text:class-names=""><text:s text:c="1"/></text:span><text:span text:style-name="a373" text:class-names="">necessarie</text:span><text:span text:style-name="a374" text:class-names=""><text:s text:c="1"/></text:span><text:span text:style-name="a375" text:class-names="">in</text:span><text:span text:style-name="a376" text:class-names=""><text:s text:c="1"/></text:span><text:span text:style-name="a377" text:class-names="">natura.</text:span><text:span text:style-name="a378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381" text:class-names=""><text:tab/></text:span><text:span text:style-name="a382" text:class-names="">II</text:span><text:span text:style-name="a383" text:class-names=""><text:s text:c="1"/></text:span><text:span text:style-name="a384" text:class-names="">collo</text:span><text:span text:style-name="a385" text:class-names=""><text:s text:c="1"/></text:span><text:span text:style-name="a386" text:class-names="">di</text:span><text:span text:style-name="a387" text:class-names=""><text:s text:c="1"/></text:span><text:span text:style-name="a388" text:class-names="">bottiglia</text:span><text:span text:style-name="a389" text:class-names="">:</text:span><text:span text:style-name="a390" text:class-names=""><text:s text:c="1"/></text:span><text:span text:style-name="a391" text:class-names="">Richiede</text:span><text:span text:style-name="a392" text:class-names=""><text:s text:c="1"/></text:span><text:span text:style-name="a393" text:class-names="">centinaia</text:span><text:span text:style-name="a394" text:class-names=""><text:s text:c="1"/></text:span><text:span text:style-name="a395" text:class-names="">di</text:span><text:span text:style-name="a396" text:class-names=""><text:s text:c="1"/></text:span><text:span text:style-name="a397" text:class-names="">ore</text:span><text:span text:style-name="a398" text:class-names=""><text:s text:c="1"/></text:span><text:span text:style-name="a399" text:class-names="">per</text:span><text:span text:style-name="a400" text:class-names=""><text:s text:c="1"/></text:span><text:span text:style-name="a401" text:class-names="">produrre</text:span><text:span text:style-name="a402" text:class-names=""><text:s text:c="1"/></text:span><text:span text:style-name="a403" text:class-names="">minime</text:span><text:span text:style-name="a404" text:class-names=""><text:s text:c="1"/></text:span><text:span text:style-name="a405" text:class-names="">varianti</text:span><text:span text:style-name="a406" text:class-names=""><text:s text:c="1"/></text:span><text:span text:style-name="a407" text:class-names="">strutturali</text:span><text:span text:style-name="a408" text:class-names="">.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16" draw:style-name="a413" draw:master-page-name="Master1-Layout2-obj-Title-and-Content" presentation:presentation-page-layout-name="Master1-PPL2" draw:id="Slide-271">
        <draw:custom-shape svg:x="1.41929in" svg:y="0.96466in" svg:width="0in" svg:height="0.62014in" draw:id="id43" draw:style-name="a416" draw:name="object 4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0 567055" draw:enhanced-path="M 0 5669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67055"/>
            <draw:equation draw:name="f8" draw:formula="0 / ?f6"/>
            <draw:equation draw:name="f9" draw:formula="1 / ?f6"/>
            <draw:equation draw:name="f10" draw:formula="0 / ?f7"/>
            <draw:equation draw:name="f11" draw:formula="567055 / ?f7"/>
          </draw:enhanced-geometry>
        </draw:custom-shape>
        <draw:frame draw:id="id44" presentation:style-name="a420" draw:name="object 5" svg:x="1.7711in" svg:y="0.9809in" svg:width="19.32705in" svg:height="0.76504in" presentation:class="title" presentation:placeholder="false">
          <draw:text-box>
            <text:p text:style-name="a419" text:class-names="" text:cond-style-name=""><text:span text:style-name="a417" text:class-names="">Minecraft e l'avvento dei videogiochi che "si autogenerano"</text:span><text:span text:style-name="a418" text:class-names=""/></text:p>
          </draw:text-box>
          <svg:title/>
          <svg:desc>$PPTXTitle</svg:desc>
        </draw:frame>
        <draw:frame draw:id="id45" draw:style-name="a432" draw:name="object 6" svg:x="0.68165in" svg:y="3.32763in" svg:width="9.64937in" svg:height="3.74385in">
          <draw:text-box>
            <text:p text:style-name="a425" text:class-names="" text:cond-style-name=""><text:span text:style-name="a421" text:class-names="">Minecraft è oggigiorno un<text:s text:c="1"/></text:span><text:span text:style-name="a422" text:class-names="">precursore</text:span><text:span text:style-name="a423" text:class-names="">, se non il primo, il più famoso</text:span><text:span text:style-name="a424" text:class-names=""/></text:p>
            <text:p text:style-name="a427" text:class-names="" text:cond-style-name=""><text:span text:style-name="a426" text:class-names=""/></text:p>
            <text:p text:style-name="a431" text:class-names="" text:cond-style-name=""><text:span text:style-name="a428" text:class-names="">La natura in questo mondo di gioco segue delle procedure, ma non è mai uguale. Seppure sia<text:s text:c="1"/></text:span><text:span text:style-name="a429" text:class-names="">pseudorandomica</text:span><text:span text:style-name="a430" text:class-names="">, rende molto bene l'idea e permette, grazie alla sua coerenza con il contesto, di immergersi nelle meraviglie in cui ci si può imbattere.</text:span></text:p>
          </draw:text-box>
          <svg:title/>
          <svg:desc/>
        </draw:frame>
        <draw:frame draw:id="id46" draw:style-name="a433" draw:name="Immagine 7" svg:x="10.98091in" svg:y="3.09613in" svg:width="10.67057in" svg:height="6in" style:rel-width="scale" style:rel-height="scale">
          <draw:image xlink:href="media/image7.jpeg" xlink:type="simple" xlink:show="embed" xlink:actuate="onLoad"/>
          <svg:title/>
          <svg:desc>Immagine che contiene barriera corallina, albero, verde, pianta

Il contenuto generato dall&amp;#39;IA potrebbe non essere corretto.</svg:desc>
        </draw:frame>
      </draw:page>
      <draw:page draw:name="Slide18" draw:style-name="a434" draw:master-page-name="Master1-Layout2-obj-Title-and-Content" presentation:presentation-page-layout-name="Master1-PPL2" draw:id="Slide-273">
        <draw:custom-shape svg:x="1.41929in" svg:y="0.96466in" svg:width="0in" svg:height="0.62014in" draw:id="id47" draw:style-name="a437" draw:name="object 4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0 567055" draw:enhanced-path="M 0 5669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67055"/>
            <draw:equation draw:name="f8" draw:formula="0 / ?f6"/>
            <draw:equation draw:name="f9" draw:formula="1 / ?f6"/>
            <draw:equation draw:name="f10" draw:formula="0 / ?f7"/>
            <draw:equation draw:name="f11" draw:formula="567055 / ?f7"/>
          </draw:enhanced-geometry>
        </draw:custom-shape>
        <draw:frame draw:id="id48" presentation:style-name="a442" draw:name="object 5" svg:x="1.7711in" svg:y="0.9809in" svg:width="19.32705in" svg:height="0.76504in" presentation:class="title" presentation:placeholder="false">
          <draw:text-box>
            <text:p text:style-name="a441" text:class-names="" text:cond-style-name=""><text:span text:style-name="a438" text:class-names="">L'avventura videolu</text:span><text:span text:style-name="a439" text:class-names="">dica infinita ed irreplicabile</text:span><text:span text:style-name="a440" text:class-names=""/></text:p>
          </draw:text-box>
          <svg:title/>
          <svg:desc>$PPTXTitle</svg:desc>
        </draw:frame>
        <draw:frame draw:id="id49" draw:style-name="a443" draw:name="Immagine 1" svg:x="2.64311in" svg:y="1.9354in" svg:width="16.6655in" svg:height="9.375in" style:rel-width="scale" style:rel-height="scale">
          <draw:image xlink:href="media/image8.jpeg" xlink:type="simple" xlink:show="embed" xlink:actuate="onLoad"/>
          <svg:title/>
          <svg:desc>Immagine che contiene testo, Animazione, Gioco per PC, nuotare

Il contenuto generato dall&amp;#39;IA potrebbe non essere corretto.</svg:desc>
        </draw:frame>
      </draw:page>
      <draw:page draw:name="Slide4" draw:style-name="a444" draw:master-page-name="Master1-Layout5-obj-Blank" presentation:presentation-page-layout-name="Master1-PPL5" draw:id="Slide-259">
        <draw:frame draw:id="id50" draw:style-name="a445" draw:name="object 2" svg:x="0in" svg:y="0in" svg:width="21.98611in" svg:height="12.36719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5" draw:style-name="a446" draw:master-page-name="Master1-Layout3-obj-Two-Content" presentation:presentation-page-layout-name="Master1-PPL3" draw:id="Slide-260">
        <draw:custom-shape svg:x="20.62697in" svg:y="3.23827in" svg:width="0in" svg:height="6.37361in" draw:id="id51" draw:style-name="a449" draw:name="object 3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0 5828030" draw:enhanced-path="M 0 5827485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828030"/>
            <draw:equation draw:name="f8" draw:formula="0 / ?f6"/>
            <draw:equation draw:name="f9" draw:formula="1 / ?f6"/>
            <draw:equation draw:name="f10" draw:formula="0 / ?f7"/>
            <draw:equation draw:name="f11" draw:formula="5828030 / ?f7"/>
          </draw:enhanced-geometry>
        </draw:custom-shape>
        <draw:frame draw:id="id52" presentation:style-name="a453" draw:name="object 5" svg:x="1.7786in" svg:y="1.00244in" svg:width="11.63179in" svg:height="0.76504in" presentation:class="title" presentation:placeholder="false">
          <draw:text-box>
            <text:p text:style-name="a452" text:class-names="" text:cond-style-name=""><text:span text:style-name="a450" text:class-names="">Lindenm</text:span><text:span text:style-name="a451" text:class-names="">ayer e la sua intuizione</text:span></text:p>
          </draw:text-box>
          <svg:title/>
          <svg:desc>$PPTXTitle</svg:desc>
        </draw:frame>
        <draw:frame draw:id="id53" draw:style-name="a459" draw:name="object 7" svg:x="1.3522in" svg:y="3.86513in" svg:width="9.33264in" svg:height="5.17421in">
          <draw:text-box>
            <text:p text:style-name="a458" text:class-names="" text:cond-style-name=""><text:span text:style-name="a454" text:class-names="">Anabaena</text:span><text:span text:style-name="a455" text:class-names=""><text:s text:c="1"/></text:span><text:span text:style-name="a456" text:class-names="">catenula</text:span><text:span text:style-name="a457" text:class-names="">, un'alga, ed i funghi erano il soggetto degli studi di un biologo ungherese, il quale si chiedeva se fosse possibile descrivere in modo matematico per descrivere come le cellule si dividono e come le piante crescono sviluppando rami e foglie. Per farlo, inventò un linguaggio matematico, L'idea geniale fu capire che la crescita della natura è intrinsecamente frattale e ricorsiva (ad esempio, un ramo piccolo ha la stessa forma dell'albero intero).</text:span></text:p>
          </draw:text-box>
          <svg:title/>
          <svg:desc/>
        </draw:frame>
        <draw:frame draw:id="id54" draw:style-name="a460" draw:name="Immagine 3" svg:x="13.62608in" svg:y="2.55949in" svg:width="6.24216in" svg:height="4.6937in" style:rel-width="scale" style:rel-height="scale">
          <draw:image xlink:href="media/image10.jpeg" xlink:type="simple" xlink:show="embed" xlink:actuate="onLoad"/>
          <svg:title/>
          <svg:desc>Immagine che contiene pianta

Il contenuto generato dall&amp;#39;IA potrebbe non essere corretto.</svg:desc>
        </draw:frame>
        <draw:frame draw:id="id55" draw:style-name="a461" draw:name="Immagine 7" svg:x="14.34111in" svg:y="7.79291in" svg:width="4.79162in" svg:height="4.10739in" style:rel-width="scale" style:rel-height="scale">
          <draw:image xlink:href="media/image11.jpeg" xlink:type="simple" xlink:show="embed" xlink:actuate="onLoad"/>
          <svg:title/>
          <svg:desc>Immagine che contiene schizzo, disegno, diagramma, bianco

Il contenuto generato dall&amp;#39;IA potrebbe non essere corretto.</svg:desc>
        </draw:frame>
      </draw:page>
      <draw:page draw:name="Slide19" draw:style-name="a462" draw:master-page-name="Master1-Layout3-obj-Two-Content" presentation:presentation-page-layout-name="Master1-PPL3" draw:id="Slide-274">
        <draw:custom-shape svg:x="20.62697in" svg:y="3.23827in" svg:width="0in" svg:height="6.37361in" draw:id="id56" draw:style-name="a465" draw:name="object 3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0 5828030" draw:enhanced-path="M 0 5827485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828030"/>
            <draw:equation draw:name="f8" draw:formula="0 / ?f6"/>
            <draw:equation draw:name="f9" draw:formula="1 / ?f6"/>
            <draw:equation draw:name="f10" draw:formula="0 / ?f7"/>
            <draw:equation draw:name="f11" draw:formula="5828030 / ?f7"/>
          </draw:enhanced-geometry>
        </draw:custom-shape>
        <draw:frame draw:id="id57" presentation:style-name="a471" draw:name="object 5" svg:x="1.7786in" svg:y="1.00244in" svg:width="1.97361in" svg:height="0.77222in" presentation:class="title" presentation:placeholder="false">
          <draw:text-box>
            <text:p text:style-name="a470" text:class-names="" text:cond-style-name=""><text:span text:style-name="a466" text:class-names="">COS'</text:span><text:span text:style-name="a467" text:class-names="">E</text:span><text:span text:style-name="a468" text:class-names="">'</text:span><text:span text:style-name="a469" text:class-names=""/></text:p>
          </draw:text-box>
          <svg:title/>
          <svg:desc>$PPTXTitle</svg:desc>
        </draw:frame>
        <draw:frame draw:id="id58" draw:style-name="a481" draw:name="object 6" svg:x="4.21597in" svg:y="1.00244in" svg:width="10.70625in" svg:height="0.77222in">
          <draw:text-box>
            <text:p text:style-name="a480" text:class-names="" text:cond-style-name=""><text:span text:style-name="a472" text:class-names="">UN</text:span><text:span text:style-name="a473" text:class-names=""><text:s text:c="1"/></text:span><text:span text:style-name="a474" text:class-names="">SISTEMA</text:span><text:span text:style-name="a475" text:class-names=""><text:s text:c="1"/></text:span><text:span text:style-name="a476" text:class-names="">DI</text:span><text:span text:style-name="a477" text:class-names=""><text:s text:c="1"/></text:span><text:span text:style-name="a478" text:class-names="">LINDENMAYER?</text:span><text:span text:style-name="a479" text:class-names=""/></text:p>
          </draw:text-box>
          <svg:title/>
          <svg:desc/>
        </draw:frame>
        <draw:frame draw:id="id59" draw:style-name="a601" draw:name="object 7" svg:x="1.3522in" svg:y="3.86513in" svg:width="9.33264in" svg:height="5.43125in">
          <draw:text-box>
            <text:p text:style-name="a520" text:class-names="" text:cond-style-name=""><text:span text:style-name="a482" text:class-names="">Sviluppati</text:span><text:span text:style-name="a483" text:class-names=""><text:s text:c="1"/></text:span><text:span text:style-name="a484" text:class-names="">nel</text:span><text:span text:style-name="a485" text:class-names=""><text:s text:c="1"/></text:span><text:span text:style-name="a486" text:class-names="">1968</text:span><text:span text:style-name="a487" text:class-names=""><text:s text:c="1"/></text:span><text:span text:style-name="a488" text:class-names="">dal</text:span><text:span text:style-name="a489" text:class-names=""><text:s text:c="1"/></text:span><text:span text:style-name="a490" text:class-names="">biologo</text:span><text:span text:style-name="a491" text:class-names=""><text:s text:c="1"/></text:span><text:span text:style-name="a492" text:class-names="">Aristid</text:span><text:span text:style-name="a493" text:class-names=""><text:s text:c="1"/></text:span><text:span text:style-name="a494" text:class-names="">Lindenmayer,<text:s text:c="1"/></text:span><text:span text:style-name="a495" text:class-names="">questi</text:span><text:span text:style-name="a496" text:class-names=""><text:s text:c="1"/></text:span><text:span text:style-name="a497" text:class-names="">sistemi</text:span><text:span text:style-name="a498" text:class-names=""><text:s text:c="1"/></text:span><text:span text:style-name="a499" text:class-names="">nascono</text:span><text:span text:style-name="a500" text:class-names=""><text:s text:c="1"/></text:span><text:span text:style-name="a501" text:class-names="">come</text:span><text:span text:style-name="a502" text:class-names=""><text:s text:c="1"/></text:span><text:span text:style-name="a503" text:class-names="">grammatiche</text:span><text:span text:style-name="a504" text:class-names=""><text:s text:c="1"/></text:span><text:span text:style-name="a505" text:class-names="">formali</text:span><text:span text:style-name="a506" text:class-names=""><text:s text:c="1"/></text:span><text:span text:style-name="a507" text:class-names="">per<text:s text:c="1"/></text:span><text:span text:style-name="a508" text:class-names="">modellare</text:span><text:span text:style-name="a509" text:class-names=""><text:s text:c="1"/></text:span><text:span text:style-name="a510" text:class-names="">lo</text:span><text:span text:style-name="a511" text:class-names=""><text:s text:c="1"/></text:span><text:span text:style-name="a512" text:class-names="">sviluppo</text:span><text:span text:style-name="a513" text:class-names=""><text:s text:c="1"/></text:span><text:span text:style-name="a514" text:class-names="">di</text:span><text:span text:style-name="a515" text:class-names=""><text:s text:c="1"/></text:span><text:span text:style-name="a516" text:class-names="">organismi</text:span><text:span text:style-name="a517" text:class-names=""><text:s text:c="1"/></text:span><text:span text:style-name="a518" text:class-names="">multicellulari.</text:span><text:span text:style-name="a519" text:class-names=""/></text:p>
            <text:p text:style-name="a522" text:class-names="" text:cond-style-name=""><text:span text:style-name="a521" text:class-names=""/></text:p>
            <text:list text:style-name="a546">
              <text:list-item>
                <text:p text:style-name="a545" text:class-names="" text:cond-style-name=""><text:span text:style-name="a523" text:class-names="">Auto-</text:span><text:span text:style-name="a524" text:class-names="">similarita:</text:span><text:span text:style-name="a525" text:class-names=""><text:s text:c="1"/></text:span><text:span text:style-name="a526" text:class-names="">Proprieta</text:span><text:span text:style-name="a527" text:class-names=""><text:s text:c="1"/></text:span><text:span text:style-name="a528" text:class-names="">tipicamente</text:span><text:span text:style-name="a529" text:class-names=""><text:s text:c="1"/></text:span><text:span text:style-name="a530" text:class-names="">frattale</text:span><text:span text:style-name="a531" text:class-names=""><text:s text:c="1"/></text:span><text:span text:style-name="a532" text:class-names="">che</text:span><text:span text:style-name="a533" text:class-names=""><text:s text:c="1"/></text:span><text:span text:style-name="a534" text:class-names="">regola</text:span><text:span text:style-name="a535" text:class-names=""><text:s text:c="1"/></text:span><text:span text:style-name="a536" text:class-names="">la <text:tab/></text:span><text:span text:style-name="a537" text:class-names="">natura</text:span><text:span text:style-name="a538" text:class-names=""><text:s text:c="1"/></text:span><text:span text:style-name="a539" text:class-names="">delle</text:span><text:span text:style-name="a540" text:class-names=""><text:s text:c="1"/></text:span><text:span text:style-name="a541" text:class-names="">strutture</text:span><text:span text:style-name="a542" text:class-names=""><text:s text:c="1"/></text:span><text:span text:style-name="a543" text:class-names="">organiche.</text:span><text:span text:style-name="a544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47" text:class-names=""><text:tab/></text:span><text:span text:style-name="a548" text:class-names="">Parallelismo:</text:span><text:span text:style-name="a549" text:class-names=""><text:s text:c="1"/></text:span><text:span text:style-name="a550" text:class-names="">Tutte</text:span><text:span text:style-name="a551" text:class-names=""><text:s text:c="1"/></text:span><text:span text:style-name="a552" text:class-names="">le</text:span><text:span text:style-name="a553" text:class-names=""><text:s text:c="1"/></text:span><text:span text:style-name="a554" text:class-names="">regole</text:span><text:span text:style-name="a555" text:class-names=""><text:s text:c="1"/></text:span><text:span text:style-name="a556" text:class-names="">di</text:span><text:span text:style-name="a557" text:class-names=""><text:s text:c="1"/></text:span><text:span text:style-name="a558" text:class-names="">sostituzione</text:span><text:span text:style-name="a559" text:class-names=""><text:s text:c="1"/></text:span><text:span text:style-name="a560" text:class-names="">vengono applicate</text:span><text:span text:style-name="a561" text:class-names=""><text:s text:c="1"/></text:span><text:span text:style-name="a562" text:class-names="">simultaneamente<text:s text:c="1"/></text:span><text:span text:style-name="a563" text:class-names="">in</text:span><text:span text:style-name="a564" text:class-names=""><text:s text:c="1"/></text:span><text:span text:style-name="a565" text:class-names="">ciascun</text:span><text:span text:style-name="a566" text:class-names=""><text:s text:c="1"/></text:span><text:span text:style-name="a567" text:class-names="">passaggio.</text:span><text:span text:style-name="a568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71" text:class-names=""><text:tab/></text:span><text:span text:style-name="a572" text:class-names="">lterazione:</text:span><text:span text:style-name="a573" text:class-names=""><text:s text:c="1"/></text:span><text:span text:style-name="a574" text:class-names="">La</text:span><text:span text:style-name="a575" text:class-names=""><text:s text:c="1"/></text:span><text:span text:style-name="a576" text:class-names="">straordinaria</text:span><text:span text:style-name="a577" text:class-names=""><text:s text:c="1"/></text:span><text:span text:style-name="a578" text:class-names="">complessita</text:span><text:span text:style-name="a579" text:class-names=""><text:s text:c="1"/></text:span><text:span text:style-name="a580" text:class-names="">naturale</text:span><text:span text:style-name="a581" text:class-names=""><text:s text:c="1"/></text:span><text:span text:style-name="a582" text:class-names="">emerge</text:span><text:span text:style-name="a583" text:class-names=""><text:s text:c="1"/></text:span><text:span text:style-name="a584" text:class-names="">da<text:s text:c="1"/></text:span><text:span text:style-name="a585" text:class-names="">un</text:span><text:span text:style-name="a586" text:class-names=""><text:s text:c="1"/></text:span><text:span text:style-name="a587" text:class-names="">insieme</text:span><text:span text:style-name="a588" text:class-names=""><text:s text:c="1"/></text:span><text:span text:style-name="a589" text:class-names="">ristretto</text:span><text:span text:style-name="a590" text:class-names=""><text:s text:c="1"/></text:span><text:span text:style-name="a591" text:class-names="">di</text:span><text:span text:style-name="a592" text:class-names=""><text:s text:c="1"/></text:span><text:span text:style-name="a593" text:class-names="">semplici</text:span><text:span text:style-name="a594" text:class-names=""><text:s text:c="1"/></text:span><text:span text:style-name="a595" text:class-names="">regole</text:span><text:span text:style-name="a596" text:class-names=""><text:s text:c="1"/></text:span><text:span text:style-name="a597" text:class-names="">ricorsive.</text:span><text:span text:style-name="a598" text:class-names=""/></text:p>
              </text:list-item>
            </text:list>
          </draw:text-box>
          <svg:title/>
          <svg:desc/>
        </draw:frame>
        <draw:frame draw:id="id60" draw:style-name="a602" draw:name="Immagine 1" svg:x="11.77701in" svg:y="3.32055in" svg:width="8.3366in" svg:height="5.97917in" style:rel-width="scale" style:rel-height="scale">
          <draw:image xlink:href="media/image12.jpeg" xlink:type="simple" xlink:show="embed" xlink:actuate="onLoad"/>
          <svg:title/>
          <svg:desc>Immagine che contiene pianta da appartamento, vaso da fiori, albero, bonsai

Il contenuto generato dall&amp;#39;IA potrebbe non essere corretto.</svg:desc>
        </draw:frame>
      </draw:page>
      <draw:page draw:name="Slide20" draw:style-name="a603" draw:master-page-name="Master1-Layout3-obj-Two-Content" presentation:presentation-page-layout-name="Master1-PPL3" draw:id="Slide-275">
        <draw:custom-shape svg:x="20.62697in" svg:y="3.23827in" svg:width="0in" svg:height="6.37361in" draw:id="id61" draw:style-name="a606" draw:name="object 3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0 5828030" draw:enhanced-path="M 0 5827485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828030"/>
            <draw:equation draw:name="f8" draw:formula="0 / ?f6"/>
            <draw:equation draw:name="f9" draw:formula="1 / ?f6"/>
            <draw:equation draw:name="f10" draw:formula="0 / ?f7"/>
            <draw:equation draw:name="f11" draw:formula="5828030 / ?f7"/>
          </draw:enhanced-geometry>
        </draw:custom-shape>
        <draw:frame draw:id="id62" presentation:style-name="a611" draw:name="object 5" svg:x="1.7786in" svg:y="0.89774in" svg:width="13.39854in" svg:height="0.76504in" presentation:class="title" presentation:placeholder="false">
          <draw:text-box>
            <text:p text:style-name="a610" text:class-names="" text:cond-style-name=""><text:span text:style-name="a607" text:class-names="">Il<text:s text:c="1"/></text:span><text:span text:style-name="a608" text:class-names="">parallelismo: la differenza chiave</text:span><text:span text:style-name="a609" text:class-names=""/></text:p>
          </draw:text-box>
          <svg:title/>
          <svg:desc>$PPTXTitle</svg:desc>
        </draw:frame>
        <draw:frame draw:id="id63" draw:style-name="a630" draw:name="object 7" svg:x="1.3522in" svg:y="3.86513in" svg:width="9.33264in" svg:height="6.2217in">
          <draw:text-box>
            <text:p text:style-name="a615" text:class-names="" text:cond-style-name=""><text:span text:style-name="a612" text:class-names="">Gli L-Systems sono una <text:s text:c="1"/>grammatica formale, come quelle di Chomsky che si studiano per i compilatori, ma hanno<text:s text:c="1"/></text:span><text:span text:style-name="a613" text:class-names="">una differenza fondamentale: il parallelismo.</text:span><text:span text:style-name="a614" text:class-names=""/></text:p>
            <text:p text:style-name="a617" text:class-names="" text:cond-style-name=""><text:span text:style-name="a616" text:class-names=""/></text:p>
            <text:p text:style-name="a621" text:class-names="" text:cond-style-name=""><text:span text:style-name="a618" text:class-names="">Nelle grammatiche classiche si prende una stringa e si applica una regola di sostituzione a un solo simbolo per<text:s text:c="1"/></text:span><text:span text:style-name="a619" text:class-names="">volta.</text:span><text:span text:style-name="a620" text:class-names=""/></text:p>
            <text:p text:style-name="a626" text:class-names="" text:cond-style-name=""><text:span text:style-name="a622" text:class-names="">Negli L-Systems si applicano le regole a tutti i simboli<text:s text:c="1"/></text:span><text:span text:style-name="a623" text:class-names="">contemporaneamente in un singolo passaggio<text:s text:c="1"/></text:span><text:span text:style-name="a624" text:class-names="">(generazione).<text:s text:c="1"/></text:span><text:span text:style-name="a625" text:class-names=""/></text:p>
            <text:p text:style-name="a629" text:class-names="" text:cond-style-name=""><text:span text:style-name="a627" text:class-names="">Questo perché in natura tutte le cellule di una pianta si dividono e crescono simultaneamente, non una alla volta!</text:span><text:span text:style-name="a628" text:class-names=""/></text:p>
          </draw:text-box>
          <svg:title/>
          <svg:desc/>
        </draw:frame>
        <draw:frame draw:id="id64" draw:style-name="a631" draw:name="Immagine 3" svg:x="13.90168in" svg:y="2.88478in" svg:width="5.39042in" svg:height="7.59568in" style:rel-width="scale" style:rel-height="scale">
          <draw:image xlink:href="media/image13.png" xlink:type="simple" xlink:show="embed" xlink:actuate="onLoad"/>
          <svg:title/>
          <svg:desc>Immagine che contiene schermata, diagramma, linea, design

Il contenuto generato dall&amp;#39;IA potrebbe non essere corretto.</svg:desc>
        </draw:frame>
      </draw:page>
      <draw:page draw:name="Slide21" draw:style-name="a632" draw:master-page-name="Master1-Layout3-obj-Two-Content" presentation:presentation-page-layout-name="Master1-PPL3" draw:id="Slide-276">
        <draw:custom-shape svg:x="20.62697in" svg:y="3.23827in" svg:width="0in" svg:height="6.37361in" draw:id="id65" draw:style-name="a635" draw:name="object 3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0 5828030" draw:enhanced-path="M 0 5827485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828030"/>
            <draw:equation draw:name="f8" draw:formula="0 / ?f6"/>
            <draw:equation draw:name="f9" draw:formula="1 / ?f6"/>
            <draw:equation draw:name="f10" draw:formula="0 / ?f7"/>
            <draw:equation draw:name="f11" draw:formula="5828030 / ?f7"/>
          </draw:enhanced-geometry>
        </draw:custom-shape>
        <draw:frame draw:id="id66" presentation:style-name="a639" draw:name="object 5" svg:x="1.67494in" svg:y="0.9755in" svg:width="13.39854in" svg:height="0.76504in" presentation:class="title" presentation:placeholder="false">
          <draw:text-box>
            <text:p text:style-name="a638" text:class-names="" text:cond-style-name=""><text:span text:style-name="a636" text:class-names="">Anatomia di un L-System</text:span><text:span text:style-name="a637" text:class-names=""/></text:p>
          </draw:text-box>
          <svg:title/>
          <svg:desc>$PPTXTitle</svg:desc>
        </draw:frame>
        <draw:frame draw:id="id67" draw:style-name="a664" draw:name="object 7" svg:x="1.3522in" svg:y="3.86513in" svg:width="20.1163in" svg:height="4.06992in">
          <draw:text-box>
            <text:p text:style-name="a643" text:class-names="" text:cond-style-name=""><text:span text:style-name="a640" text:class-names="">Matematicamente, un L-System è definito da una<text:s text:c="1"/></text:span><text:span text:style-name="a641" text:class-names="">tupla</text:span><text:span text:style-name="a642" text:class-names=""><text:s text:c="1"/>(un insieme) di tre elementi principali:</text:span></text:p>
            <text:p text:style-name="a645" text:class-names="" text:cond-style-name=""><text:span text:style-name="a644" text:class-names=""/></text:p>
            <text:p text:style-name="a649" text:class-names="" text:cond-style-name=""><text:span text:style-name="a646" text:class-names="">1)L'Alfabeto (V): L'insieme di tutti i simboli validi (es. `F`, `+`, `-`, `[`, `]`). Alcuni simboli sono variabili (vengono<text:s text:c="1"/></text:span><text:span text:style-name="a647" text:class-names="">sostituiti dalle regole), <text:s text:c="1"/>altri sono costanti (rimangono uguali, servono solo per la grafica).</text:span><text:span text:style-name="a648" text:class-names=""/></text:p>
            <text:p text:style-name="a651" text:class-names="" text:cond-style-name=""><text:span text:style-name="a650" text:class-names=""/></text:p>
            <text:p text:style-name="a657" text:class-names="" text:cond-style-name=""><text:span text:style-name="a652" text:class-names="">2)L'Assioma (</text:span><text:span text:style-name="a653" text:class-names="">w</text:span><text:span text:style-name="a654" text:class-names="">): Lo stato iniziale del sistema. Il "seme" da<text:s text:c="1"/></text:span><text:span text:style-name="a655" text:class-names="">cui parte la simulazione al tempo iniziale o 0.</text:span><text:span text:style-name="a656" text:class-names=""/></text:p>
            <text:p text:style-name="a659" text:class-names="" text:cond-style-name=""><text:span text:style-name="a658" text:class-names=""/></text:p>
            <text:p text:style-name="a663" text:class-names="" text:cond-style-name=""><text:span text:style-name="a660" text:class-names="">3)Le Regole di Produzione P: Le istruzioni che dicono come ogni carattere dell'alfabeto si trasforma nella generazione<text:s text:c="1"/></text:span><text:span text:style-name="a661" text:class-names="">successiva, ad esempio quella proposta.</text:span><text:span text:style-name="a662" text:class-names=""/></text:p>
          </draw:text-box>
          <svg:title/>
          <svg:desc/>
        </draw:frame>
      </draw:page>
      <draw:page draw:name="Slide6" draw:style-name="a665" draw:master-page-name="Master1-Layout3-obj-Two-Content" presentation:presentation-page-layout-name="Master1-PPL3" draw:id="Slide-261">
        <draw:custom-shape svg:x="1.41929in" svg:y="0.95604in" svg:width="0in" svg:height="0.79236in" draw:id="id68" draw:style-name="a668" draw:name="object 2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0 724535" draw:enhanced-path="M 0 7244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24535"/>
            <draw:equation draw:name="f8" draw:formula="0 / ?f6"/>
            <draw:equation draw:name="f9" draw:formula="1 / ?f6"/>
            <draw:equation draw:name="f10" draw:formula="0 / ?f7"/>
            <draw:equation draw:name="f11" draw:formula="724535 / ?f7"/>
          </draw:enhanced-geometry>
        </draw:custom-shape>
        <draw:frame draw:id="id69" presentation:style-name="a675" draw:name="object 3" svg:x="1.7711in" svg:y="1.00244in" svg:width="15.81358in" svg:height="0.77222in" presentation:class="title" presentation:placeholder="false">
          <draw:text-box>
            <text:p text:style-name="a674" text:class-names="" text:cond-style-name=""><text:span text:style-name="a669" text:class-names="">LA</text:span><text:span text:style-name="a670" text:class-names=""><text:s text:c="1"/></text:span><text:span text:style-name="a671" text:class-names="">GRAMMATICA</text:span><text:span text:style-name="a672" text:class-names=""><text:s text:c="1"/></text:span><text:span text:style-name="a673" text:class-names="">FORMALE</text:span></text:p>
          </draw:text-box>
          <svg:title/>
          <svg:desc>$PPTXTitle</svg:desc>
        </draw:frame>
        <draw:frame draw:id="id70" draw:style-name="a720" draw:name="object 4" svg:x="2.03998in" svg:y="3.39232in" svg:width="7.85625in" svg:height="2.2in">
          <draw:text-box>
            <text:p text:style-name="a682" text:class-names="" text:cond-style-name=""><text:span text:style-name="a676" text:class-names="">1.</text:span><text:span text:style-name="a677" text:class-names=""><text:s text:c="1"/></text:span><text:span text:style-name="a678" text:class-names="">Alfabeto</text:span><text:span text:style-name="a679" text:class-names=""><text:s text:c="1"/>(</text:span><text:span text:style-name="a680" text:class-names="">V)</text:span><text:span text:style-name="a681" text:class-names=""/></text:p>
            <text:p text:style-name="a719" text:class-names="" text:cond-style-name=""><text:span text:style-name="a683" text:class-names="">Insieme</text:span><text:span text:style-name="a684" text:class-names=""><text:s text:c="1"/></text:span><text:span text:style-name="a685" text:class-names="">finito</text:span><text:span text:style-name="a686" text:class-names=""><text:s text:c="1"/></text:span><text:span text:style-name="a687" text:class-names="">di</text:span><text:span text:style-name="a688" text:class-names=""><text:s text:c="1"/></text:span><text:span text:style-name="a689" text:class-names="">simboli</text:span><text:span text:style-name="a690" text:class-names=""><text:s text:c="1"/></text:span><text:span text:style-name="a691" text:class-names="">contenente</text:span><text:span text:style-name="a692" text:class-names=""><text:s text:c="1"/></text:span><text:span text:style-name="a693" text:class-names="">sia</text:span><text:span text:style-name="a694" text:class-names=""><text:s text:c="1"/></text:span><text:span text:style-name="a695" text:class-names="">variabili</text:span><text:span text:style-name="a696" text:class-names=""><text:s text:c="1"/></text:span><text:span text:style-name="a697" text:class-names="">(</text:span><text:span text:style-name="a698" text:class-names="">che</text:span><text:span text:style-name="a699" text:class-names=""><text:s text:c="1"/></text:span><text:span text:style-name="a700" text:class-names="">possono</text:span><text:span text:style-name="a701" text:class-names=""><text:s text:c="1"/></text:span><text:span text:style-name="a702" text:class-names="">essere</text:span><text:span text:style-name="a703" text:class-names=""><text:s text:c="1"/></text:span><text:span text:style-name="a704" text:class-names="">sostituite</text:span><text:span text:style-name="a705" text:class-names="">)</text:span><text:span text:style-name="a706" text:class-names=""><text:s text:c="1"/></text:span><text:span text:style-name="a707" text:class-names="">sia</text:span><text:span text:style-name="a708" text:class-names=""><text:s text:c="1"/></text:span><text:span text:style-name="a709" text:class-names="">costanti</text:span><text:span text:style-name="a710" text:class-names=""><text:s text:c="1"/></text:span><text:span text:style-name="a711" text:class-names="">(</text:span><text:span text:style-name="a712" text:class-names="">che</text:span><text:span text:style-name="a713" text:class-names=""><text:s text:c="1"/></text:span><text:span text:style-name="a714" text:class-names="">rimangono</text:span><text:span text:style-name="a715" text:class-names=""><text:s text:c="1"/></text:span><text:span text:style-name="a716" text:class-names="">fisse</text:span><text:span text:style-name="a717" text:class-names="">).</text:span><text:span text:style-name="a718" text:class-names=""/></text:p>
          </draw:text-box>
          <svg:title/>
          <svg:desc/>
        </draw:frame>
        <draw:frame draw:id="id71" draw:style-name="a765" draw:name="object 5" svg:x="12.04286in" svg:y="3.61193in" svg:width="7.89792in" svg:height="1.74792in">
          <draw:text-box>
            <text:p text:style-name="a727" text:class-names="" text:cond-style-name=""><text:span text:style-name="a721" text:class-names="">2.</text:span><text:span text:style-name="a722" text:class-names=""><text:s text:c="1"/></text:span><text:span text:style-name="a723" text:class-names="">Assioma</text:span><text:span text:style-name="a724" text:class-names=""> (</text:span><text:span text:style-name="a725" text:class-names="">w)</text:span><text:span text:style-name="a726" text:class-names=""/></text:p>
            <text:p text:style-name="a764" text:class-names="" text:cond-style-name=""><text:span text:style-name="a728" text:class-names="">La</text:span><text:span text:style-name="a729" text:class-names=""><text:s text:c="1"/></text:span><text:span text:style-name="a730" text:class-names="">stringa</text:span><text:span text:style-name="a731" text:class-names=""><text:s text:c="1"/></text:span><text:span text:style-name="a732" text:class-names="">iniziale</text:span><text:span text:style-name="a733" text:class-names=""><text:s text:c="1"/></text:span><text:span text:style-name="a734" text:class-names="">di</text:span><text:span text:style-name="a735" text:class-names=""><text:s text:c="1"/></text:span><text:span text:style-name="a736" text:class-names="">partenza</text:span><text:span text:style-name="a737" text:class-names="">,</text:span><text:span text:style-name="a738" text:class-names=""><text:s text:c="1"/></text:span><text:span text:style-name="a739" text:class-names="">che</text:span><text:span text:style-name="a740" text:class-names=""><text:s text:c="1"/></text:span><text:span text:style-name="a741" text:class-names="">definisce</text:span><text:span text:style-name="a742" text:class-names=""><text:s text:c="1"/></text:span><text:span text:style-name="a743" text:class-names="">lo</text:span><text:span text:style-name="a744" text:class-names=""><text:s text:c="1"/></text:span><text:span text:style-name="a745" text:class-names="">stato</text:span><text:span text:style-name="a746" text:class-names=""><text:s text:c="1"/></text:span><text:span text:style-name="a747" text:class-names="">di<text:s text:c="1"/></text:span><text:span text:style-name="a748" text:class-names="">base</text:span><text:span text:style-name="a749" text:class-names=""><text:s text:c="1"/></text:span><text:span text:style-name="a750" text:class-names="">originario</text:span><text:span text:style-name="a751" text:class-names="">,</text:span><text:span text:style-name="a752" text:class-names=""><text:s text:c="1"/></text:span><text:span text:style-name="a753" text:class-names="">o</text:span><text:span text:style-name="a754" text:class-names=""><text:s text:c="1"/></text:span><text:span text:style-name="a755" text:class-names="">"seme"</text:span><text:span text:style-name="a756" text:class-names=""><text:s text:c="1"/></text:span><text:span text:style-name="a757" text:class-names="">biologico</text:span><text:span text:style-name="a758" text:class-names=""><text:s text:c="1"/></text:span><text:span text:style-name="a759" text:class-names="">dell</text:span><text:span text:style-name="a760" text:class-names="">'</text:span><text:span text:style-name="a761" text:class-names="">organismo</text:span><text:span text:style-name="a762" text:class-names="">.</text:span><text:span text:style-name="a763" text:class-names=""/></text:p>
          </draw:text-box>
          <svg:title/>
          <svg:desc/>
        </draw:frame>
        <draw:frame draw:id="id72" draw:style-name="a806" draw:name="object 6" svg:x="2.0578in" svg:y="7.75009in" svg:width="7.59722in" svg:height="2.2in">
          <draw:text-box>
            <text:p text:style-name="a776" text:class-names="" text:cond-style-name=""><text:span text:style-name="a766" text:class-names="">3.</text:span><text:span text:style-name="a767" text:class-names=""><text:s text:c="1"/></text:span><text:span text:style-name="a768" text:class-names="">Regole</text:span><text:span text:style-name="a769" text:class-names=""><text:s text:c="1"/></text:span><text:span text:style-name="a770" text:class-names="">di</text:span><text:span text:style-name="a771" text:class-names=""><text:s text:c="1"/></text:span><text:span text:style-name="a772" text:class-names="">Produzione</text:span><text:span text:style-name="a773" text:class-names=""> (</text:span><text:span text:style-name="a774" text:class-names="">P)</text:span><text:span text:style-name="a775" text:class-names=""/></text:p>
            <text:p text:style-name="a805" text:class-names="" text:cond-style-name=""><text:span text:style-name="a777" text:class-names="">Definiscono</text:span><text:span text:style-name="a778" text:class-names=""><text:s text:c="1"/></text:span><text:span text:style-name="a779" text:class-names="">matematicamente</text:span><text:span text:style-name="a780" text:class-names=""><text:s text:c="1"/></text:span><text:span text:style-name="a781" text:class-names="">le</text:span><text:span text:style-name="a782" text:class-names=""><text:s text:c="1"/></text:span><text:span text:style-name="a783" text:class-names="">transizioni</text:span><text:span text:style-name="a784" text:class-names=""><text:s text:c="1"/></text:span><text:span text:style-name="a785" text:class-names="">con</text:span><text:span text:style-name="a786" text:class-names=""><text:s text:c="1"/></text:span><text:span text:style-name="a787" text:class-names="">cui<text:s text:c="1"/></text:span><text:span text:style-name="a788" text:class-names="">ciascuna</text:span><text:span text:style-name="a789" text:class-names=""><text:s text:c="1"/></text:span><text:span text:style-name="a790" text:class-names="">variabile</text:span><text:span text:style-name="a791" text:class-names=""><text:s text:c="1"/></text:span><text:span text:style-name="a792" text:class-names="">viene</text:span><text:span text:style-name="a793" text:class-names=""><text:s text:c="1"/></text:span><text:span text:style-name="a794" text:class-names="">rimpiazzata</text:span><text:span text:style-name="a795" text:class-names=""><text:s text:c="1"/></text:span><text:span text:style-name="a796" text:class-names="">ad</text:span><text:span text:style-name="a797" text:class-names=""><text:s text:c="1"/></text:span><text:span text:style-name="a798" text:class-names="">ogni</text:span><text:span text:style-name="a799" text:class-names=""><text:s text:c="1"/></text:span><text:span text:style-name="a800" text:class-names="">nuova</text:span><text:span text:style-name="a801" text:class-names=""><text:s text:c="1"/></text:span><text:span text:style-name="a802" text:class-names="">iterazione</text:span><text:span text:style-name="a803" text:class-names="">.</text:span><text:span text:style-name="a804" text:class-names=""/></text:p>
          </draw:text-box>
          <svg:title/>
          <svg:desc/>
        </draw:frame>
        <draw:frame draw:id="id73" draw:style-name="a812" draw:name="object 7" svg:x="12.05422in" svg:y="7.7443in" svg:width="4.18958in" svg:height="0.58125in">
          <draw:text-box>
            <text:p text:style-name="a811" text:class-names="" text:cond-style-name=""><text:span text:style-name="a807" text:class-names="">4.</text:span><text:span text:style-name="a808" text:class-names=""><text:s text:c="1"/></text:span><text:span text:style-name="a809" text:class-names="">Esempio</text:span><text:span text:style-name="a810" text:class-names=""/></text:p>
          </draw:text-box>
          <svg:title/>
          <svg:desc/>
        </draw:frame>
        <draw:frame draw:id="id74" draw:style-name="a828" draw:name="object 8" svg:x="12.03669in" svg:y="8.62559in" svg:width="7.60069in" svg:height="0.41372in">
          <draw:text-box>
            <text:p text:style-name="a827" text:class-names="" text:cond-style-name=""><text:span text:style-name="a813" text:class-names="">Regola</text:span><text:span text:style-name="a814" text:class-names=""><text:s text:c="1"/></text:span><text:span text:style-name="a815" text:class-names="">di</text:span><text:span text:style-name="a816" text:class-names=""><text:s text:c="1"/></text:span><text:span text:style-name="a817" text:class-names="">riscrittura</text:span><text:span text:style-name="a818" text:class-names=""><text:s text:c="1"/></text:span><text:span text:style-name="a819" text:class-names="">per</text:span><text:span text:style-name="a820" text:class-names=""><text:s text:c="1"/></text:span><text:span text:style-name="a821" text:class-names="">la</text:span><text:span text:style-name="a822" text:class-names=""><text:s text:c="1"/></text:span><text:span text:style-name="a823" text:class-names="">crescita</text:span><text:span text:style-name="a824" text:class-names=""><text:s text:c="1"/></text:span><text:span text:style-name="a825" text:class-names="">vegetale</text:span><text:span text:style-name="a826" text:class-names="">:</text:span></text:p>
          </draw:text-box>
          <svg:title/>
          <svg:desc/>
        </draw:frame>
        <draw:frame draw:id="id75" draw:style-name="a829" draw:name="Immagine 8" svg:x="13.49867in" svg:y="9.39956in" svg:width="4.09002in" svg:height="0.5788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2" draw:style-name="a830" draw:master-page-name="Master1-Layout3-obj-Two-Content" presentation:presentation-page-layout-name="Master1-PPL3" draw:id="Slide-277">
        <draw:custom-shape svg:x="1.41929in" svg:y="0.95604in" svg:width="0in" svg:height="0.79236in" draw:id="id76" draw:style-name="a833" draw:name="object 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0 724535" draw:enhanced-path="M 0 7244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24535"/>
            <draw:equation draw:name="f8" draw:formula="0 / ?f6"/>
            <draw:equation draw:name="f9" draw:formula="1 / ?f6"/>
            <draw:equation draw:name="f10" draw:formula="0 / ?f7"/>
            <draw:equation draw:name="f11" draw:formula="724535 / ?f7"/>
          </draw:enhanced-geometry>
        </draw:custom-shape>
        <draw:frame draw:id="id77" presentation:style-name="a837" draw:name="object 3" svg:x="1.7711in" svg:y="1.00244in" svg:width="15.81358in" svg:height="0.77222in" presentation:class="title" presentation:placeholder="false">
          <draw:text-box>
            <text:p text:style-name="a836" text:class-names="" text:cond-style-name=""><text:span text:style-name="a834" text:class-names="">Da testo a pianta</text:span><text:span text:style-name="a835" text:class-names=""/></text:p>
          </draw:text-box>
          <svg:title/>
          <svg:desc>$PPTXTitle</svg:desc>
        </draw:frame>
        <draw:frame draw:id="id78" draw:style-name="a940" draw:name="object 4" svg:x="2.03998in" svg:y="3.39232in" svg:width="12.96017in" svg:height="4.73678in">
          <draw:text-box>
            <text:p text:style-name="a841" text:class-names="" text:cond-style-name=""><text:span text:style-name="a838" text:class-names="">L'intuizione di<text:s text:c="1"/></text:span><text:span text:style-name="a839" text:class-names="">Prusinkiewicz</text:span><text:span text:style-name="a840" text:class-names=""/></text:p>
            <text:p text:style-name="a856" text:class-names="" text:cond-style-name=""><text:span text:style-name="a842" text:class-names="">Lindenmayer<text:s text:c="1"/></text:span><text:span text:style-name="a843" text:class-names="">aveva</text:span><text:span text:style-name="a844" text:class-names=""><text:s text:c="1"/></text:span><text:span text:style-name="a845" text:class-names="">inventato</text:span><text:span text:style-name="a846" text:class-names=""><text:s text:c="1"/>solo la<text:s text:c="1"/></text:span><text:span text:style-name="a847" text:class-names="">parte</text:span><text:span text:style-name="a848" text:class-names=""><text:s text:c="1"/></text:span><text:span text:style-name="a849" text:class-names="">testuale</text:span><text:span text:style-name="a850" text:class-names="">, ma come<text:s text:c="1"/></text:span><text:span text:style-name="a851" text:class-names="">siamo</text:span><text:span text:style-name="a852" text:class-names=""><text:s text:c="1"/></text:span><text:span text:style-name="a853" text:class-names="">arrivati</text:span><text:span text:style-name="a854" text:class-names=""><text:s text:c="1"/>al 3D?</text:span><text:span text:style-name="a855" text:class-names=""/></text:p>
            <text:p text:style-name="a858" text:class-names="" text:cond-style-name=""><text:span text:style-name="a857" text:class-names=""/></text:p>
            <text:p text:style-name="a892" text:class-names="" text:cond-style-name=""><text:span text:style-name="a859" text:class-names="">Negli</text:span><text:span text:style-name="a860" text:class-names=""><text:s text:c="1"/>anni '80, un<text:s text:c="1"/></text:span><text:span text:style-name="a861" text:class-names="">informatico</text:span><text:span text:style-name="a862" text:class-names=""><text:s text:c="1"/>di<text:s text:c="1"/></text:span><text:span text:style-name="a863" text:class-names="">nome</text:span><text:span text:style-name="a864" text:class-names=""><text:s text:c="1"/></text:span><text:span text:style-name="a865" text:class-names="">Pshe-mì-suav</text:span><text:span text:style-name="a866" text:class-names=""><text:s text:c="1"/>Pru-shin-</text:span><text:span text:style-name="a867" text:class-names="">chiè</text:span><text:span text:style-name="a868" text:class-names="">-</text:span><text:span text:style-name="a869" text:class-names="">vitch</text:span><text:span text:style-name="a870" text:class-names=""><text:s text:c="1"/>(</text:span><text:span text:style-name="a871" text:class-names="">scritto</text:span><text:span text:style-name="a872" text:class-names=""><text:s text:c="1"/>come<text:s text:c="1"/></text:span><text:span text:style-name="a873" text:class-names="">si</text:span><text:span text:style-name="a874" text:class-names=""><text:s text:c="1"/></text:span><text:span text:style-name="a875" text:class-names="">dovrebbe</text:span><text:span text:style-name="a876" text:class-names=""><text:s text:c="1"/></text:span><text:span text:style-name="a877" text:class-names="">leggere</text:span><text:span text:style-name="a878" text:class-names="">) prese il<text:s text:c="1"/></text:span><text:span text:style-name="a879" text:class-names="">lavoro</text:span><text:span text:style-name="a880" text:class-names=""><text:s text:c="1"/>di Lindenmayer e<text:s text:c="1"/></text:span><text:span text:style-name="a881" text:class-names="">decise</text:span><text:span text:style-name="a882" text:class-names=""><text:s text:c="1"/>di dare un'<text:s text:c="1"/></text:span><text:span text:style-name="a883" text:class-names="">interpretazione</text:span><text:span text:style-name="a884" text:class-names=""><text:s text:c="1"/></text:span><text:span text:style-name="a885" text:class-names="">geometrica</text:span><text:span text:style-name="a886" text:class-names=""><text:s text:c="1"/>alle<text:s text:c="1"/></text:span><text:span text:style-name="a887" text:class-names="">stringhe</text:span><text:span text:style-name="a888" text:class-names=""><text:s text:c="1"/></text:span><text:span text:style-name="a889" text:class-names="">usando</text:span><text:span text:style-name="a890" text:class-names=""><text:s text:c="1"/>la Turtle Graphics.</text:span><text:span text:style-name="a891" text:class-names=""/></text:p>
            <text:p text:style-name="a894" text:class-names="" text:cond-style-name=""><text:span text:style-name="a893" text:class-names=""/></text:p>
            <text:p text:style-name="a916" text:class-names="" text:cond-style-name=""><text:span text:style-name="a895" text:class-names="">Prusinkiewicz</text:span><text:span text:style-name="a896" text:class-names=""><text:s text:c="1"/></text:span><text:span text:style-name="a897" text:class-names="">decise</text:span><text:span text:style-name="a898" text:class-names=""><text:s text:c="1"/></text:span><text:span text:style-name="a899" text:class-names="">che</text:span><text:span text:style-name="a900" text:class-names=""><text:s text:c="1"/>la<text:s text:c="1"/></text:span><text:span text:style-name="a901" text:class-names="">stringa</text:span><text:span text:style-name="a902" text:class-names=""><text:s text:c="1"/></text:span><text:span text:style-name="a903" text:class-names="">generata</text:span><text:span text:style-name="a904" text:class-names=""><text:s text:c="1"/></text:span><text:span text:style-name="a905" text:class-names="">dall'L</text:span><text:span text:style-name="a906" text:class-names="">-System non era solo testo, ma un<text:s text:c="1"/></text:span><text:span text:style-name="a907" text:class-names="">elenco</text:span><text:span text:style-name="a908" text:class-names=""><text:s text:c="1"/>di<text:s text:c="1"/></text:span><text:span text:style-name="a909" text:class-names="">istruzioni</text:span><text:span text:style-name="a910" text:class-names=""><text:s text:c="1"/>di<text:s text:c="1"/></text:span><text:span text:style-name="a911" text:class-names="">navigazione</text:span><text:span text:style-name="a912" text:class-names=""><text:s text:c="1"/></text:span><text:span text:style-name="a913" text:class-names="">spaziale</text:span><text:span text:style-name="a914" text:class-names="">.</text:span><text:span text:style-name="a915" text:class-names=""/></text:p>
            <text:p text:style-name="a918" text:class-names="" text:cond-style-name=""><text:span text:style-name="a917" text:class-names=""/></text:p>
            <text:p text:style-name="a939" text:class-names="" text:cond-style-name=""><text:span text:style-name="a919" text:class-names="">Il<text:s text:c="1"/></text:span><text:span text:style-name="a920" text:class-names="">libro</text:span><text:span text:style-name="a921" text:class-names=""><text:s text:c="1"/></text:span><text:span text:style-name="a922" text:class-names="">che</text:span><text:span text:style-name="a923" text:class-names=""><text:s text:c="1"/></text:span><text:span text:style-name="a924" text:class-names="">scrisse</text:span><text:span text:style-name="a925" text:class-names="">, "The Algorithmic Beauty of Plants", è<text:s text:c="1"/></text:span><text:span text:style-name="a926" text:class-names="">tutt'ora</text:span><text:span text:style-name="a927" text:class-names=""><text:s text:c="1"/>la<text:s text:c="1"/></text:span><text:span text:style-name="a928" text:class-names="">bibbia</text:span><text:span text:style-name="a929" text:class-names=""><text:s text:c="1"/>della<text:s text:c="1"/></text:span><text:span text:style-name="a930" text:class-names="">generazione</text:span><text:span text:style-name="a931" text:class-names=""><text:s text:c="1"/></text:span><text:span text:style-name="a932" text:class-names="">procedurale</text:span><text:span text:style-name="a933" text:class-names=""><text:s text:c="1"/></text:span><text:span text:style-name="a934" text:class-names="">nei</text:span><text:span text:style-name="a935" text:class-names=""><text:s text:c="1"/></text:span><text:span text:style-name="a936" text:class-names="">videogiochi</text:span><text:span text:style-name="a937" text:class-names="">.</text:span><text:span text:style-name="a938" text:class-names=""/></text:p>
          </draw:text-box>
          <svg:title/>
          <svg:desc/>
        </draw:frame>
        <draw:frame draw:id="id79" draw:style-name="a941" draw:name="Immagine 9" svg:x="15.9573in" svg:y="3.24366in" svg:width="4.36804in" svg:height="5.82883in" style:rel-width="scale" style:rel-height="scale">
          <draw:image xlink:href="media/image15.jpeg" xlink:type="simple" xlink:show="embed" xlink:actuate="onLoad"/>
          <svg:title/>
          <svg:desc>Immagine che contiene testo, pianta, fiore, petalo

Il contenuto generato dall&amp;#39;IA potrebbe non essere corretto.</svg:desc>
        </draw:frame>
      </draw:page>
      <draw:page draw:name="Slide23" draw:style-name="a942" draw:master-page-name="Master1-Layout3-obj-Two-Content" presentation:presentation-page-layout-name="Master1-PPL3" draw:id="Slide-278">
        <draw:custom-shape svg:x="1.41929in" svg:y="0.95604in" svg:width="0in" svg:height="0.79236in" draw:id="id80" draw:style-name="a945" draw:name="object 2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0 724535" draw:enhanced-path="M 0 72449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24535"/>
            <draw:equation draw:name="f8" draw:formula="0 / ?f6"/>
            <draw:equation draw:name="f9" draw:formula="1 / ?f6"/>
            <draw:equation draw:name="f10" draw:formula="0 / ?f7"/>
            <draw:equation draw:name="f11" draw:formula="724535 / ?f7"/>
          </draw:enhanced-geometry>
        </draw:custom-shape>
        <draw:frame draw:id="id81" presentation:style-name="a949" draw:name="object 3" svg:x="1.7711in" svg:y="1.00244in" svg:width="15.81358in" svg:height="0.77222in" presentation:class="title" presentation:placeholder="false">
          <draw:text-box>
            <text:p text:style-name="a948" text:class-names="" text:cond-style-name=""><text:span text:style-name="a946" text:class-names="">I tipi di L-Systems</text:span><text:span text:style-name="a947" text:class-names=""/></text:p>
          </draw:text-box>
          <svg:title/>
          <svg:desc>$PPTXTitle</svg:desc>
        </draw:frame>
        <draw:frame draw:id="id82" draw:style-name="a1145" draw:name="object 4" svg:x="1.41799in" svg:y="3.05539in" svg:width="19.00635in" svg:height="7.44632in">
          <draw:text-box>
            <text:p text:style-name="a966" text:class-names="" text:cond-style-name=""><text:span text:style-name="a950" text:class-names="">Non<text:s text:c="1"/></text:span><text:span text:style-name="a951" text:class-names="">esiste</text:span><text:span text:style-name="a952" text:class-names=""><text:s text:c="1"/>un solo<text:s text:c="1"/></text:span><text:span text:style-name="a953" text:class-names="">tipo</text:span><text:span text:style-name="a954" text:class-names=""><text:s text:c="1"/>di L-System. Ecco<text:s text:c="1"/></text:span><text:span text:style-name="a955" text:class-names="">i</text:span><text:span text:style-name="a956" text:class-names=""><text:s text:c="1"/></text:span><text:span text:style-name="a957" text:class-names="">principali</text:span><text:span text:style-name="a958" text:class-names="">, dal<text:s text:c="1"/></text:span><text:span text:style-name="a959" text:class-names="">più</text:span><text:span text:style-name="a960" text:class-names=""><text:s text:c="1"/>semplice al<text:s text:c="1"/></text:span><text:span text:style-name="a961" text:class-names="">più</text:span><text:span text:style-name="a962" text:class-names=""><text:s text:c="1"/></text:span><text:span text:style-name="a963" text:class-names="">complesso</text:span><text:span text:style-name="a964" text:class-names="">:</text:span><text:span text:style-name="a965" text:class-names=""/></text:p>
            <text:p text:style-name="a968" text:class-names="" text:cond-style-name=""><text:span text:style-name="a967" text:class-names=""/></text:p>
            <text:p text:style-name="a970" text:class-names="" text:cond-style-name=""><text:span text:style-name="a969" text:class-names=""/></text:p>
            <text:p text:style-name="a1016" text:class-names="" text:cond-style-name=""><text:span text:style-name="a971" text:class-names="">D0L-Systems (Deterministic 0-context L-Systems):</text:span><text:span text:style-name="a972" text:class-names=""><text:s text:c="1"/>È<text:s text:c="1"/></text:span><text:span text:style-name="a973" text:class-names="">quello</text:span><text:span text:style-name="a974" text:class-names=""><text:s text:c="1"/></text:span><text:span text:style-name="a975" text:class-names="">preso</text:span><text:span text:style-name="a976" text:class-names=""><text:s text:c="1"/>in<text:s text:c="1"/></text:span><text:span text:style-name="a977" text:class-names="">esame</text:span><text:span text:style-name="a978" text:class-names=""><text:s text:c="1"/>per<text:s text:c="1"/></text:span><text:span text:style-name="a979" text:class-names="">questa</text:span><text:span text:style-name="a980" text:class-names=""><text:s text:c="1"/></text:span><text:span text:style-name="a981" text:class-names="">tesina</text:span><text:span text:style-name="a982" text:class-names="">. E'<text:s text:c="1"/></text:span><text:span text:style-name="a983" text:class-names="">deterministico</text:span><text:span text:style-name="a984" text:class-names="">,<text:s text:c="1"/></text:span><text:span text:style-name="a985" text:class-names="">significa</text:span><text:span text:style-name="a986" text:class-names=""><text:s text:c="1"/></text:span><text:span text:style-name="a987" text:class-names="">che</text:span><text:span text:style-name="a988" text:class-names=""><text:s text:c="1"/></text:span><text:span text:style-name="a989" text:class-names="">c'è</text:span><text:span text:style-name="a990" text:class-names=""><text:s text:c="1"/>sempre un solo<text:s text:c="1"/></text:span><text:span text:style-name="a991" text:class-names="">risultato</text:span><text:span text:style-name="a992" text:class-names=""><text:s text:c="1"/></text:span><text:span text:style-name="a993" text:class-names="">possibile</text:span><text:span text:style-name="a994" text:class-names="">. 0-context:<text:s text:c="1"/></text:span><text:span text:style-name="a995" text:class-names="">significa</text:span><text:span text:style-name="a996" text:class-names=""><text:s text:c="1"/></text:span><text:span text:style-name="a997" text:class-names="">che</text:span><text:span text:style-name="a998" text:class-names=""><text:s text:c="1"/>la<text:s text:c="1"/></text:span><text:span text:style-name="a999" text:class-names="">regola</text:span><text:span text:style-name="a1000" text:class-names=""><text:s text:c="1"/></text:span><text:span text:style-name="a1001" text:class-names="">guarda</text:span><text:span text:style-name="a1002" text:class-names=""><text:s text:c="1"/>solo la<text:s text:c="1"/></text:span><text:span text:style-name="a1003" text:class-names="">lettera</text:span><text:span text:style-name="a1004" text:class-names=""><text:s text:c="1"/></text:span><text:span text:style-name="a1005" text:class-names="">corrente</text:span><text:span text:style-name="a1006" text:class-names=""><text:s text:c="1"/>(</text:span><text:span text:style-name="a1007" text:class-names="">esempio</text:span><text:span text:style-name="a1008" text:class-names="">: se<text:s text:c="1"/></text:span><text:span text:style-name="a1009" text:class-names="">legge</text:span><text:span text:style-name="a1010" text:class-names=""><text:s text:c="1"/>F, la cambia senza<text:s text:c="1"/></text:span><text:span text:style-name="a1011" text:class-names="">curarsi</text:span><text:span text:style-name="a1012" text:class-names=""><text:s text:c="1"/>delle<text:s text:c="1"/></text:span><text:span text:style-name="a1013" text:class-names="">lettere</text:span><text:span text:style-name="a1014" text:class-names=""><text:s text:c="1"/>prima o dopo).</text:span><text:span text:style-name="a1015" text:class-names=""/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/></text:p>
            <text:p text:style-name="a1040" text:class-names="" text:cond-style-name=""><text:span text:style-name="a1021" text:class-names="">L-Systems<text:s text:c="1"/></text:span><text:span text:style-name="a1022" text:class-names="">Stocastici</text:span><text:span text:style-name="a1023" text:class-names="">:</text:span><text:span text:style-name="a1024" text:class-names=""><text:s text:c="1"/></text:span><text:span text:style-name="a1025" text:class-names="">Introducono</text:span><text:span text:style-name="a1026" text:class-names=""><text:s text:c="1"/>la<text:s text:c="1"/></text:span><text:span text:style-name="a1027" text:class-names="">probabilità</text:span><text:span text:style-name="a1028" text:class-names="">.<text:s text:c="1"/></text:span><text:span text:style-name="a1029" text:class-names="">Invece</text:span><text:span text:style-name="a1030" text:class-names=""><text:s text:c="1"/>di<text:s text:c="1"/></text:span><text:span text:style-name="a1031" text:class-names="">avere</text:span><text:span text:style-name="a1032" text:class-names=""><text:s text:c="1"/></text:span><text:span text:style-name="a1033" text:class-names="">una</text:span><text:span text:style-name="a1034" text:class-names=""><text:s text:c="1"/>sola<text:s text:c="1"/></text:span><text:span text:style-name="a1035" text:class-names="">regola</text:span><text:span text:style-name="a1036" text:class-names=""><text:s text:c="1"/>per F se ne<text:s text:c="1"/></text:span><text:span text:style-name="a1037" text:class-names="">hanno</text:span><text:span text:style-name="a1038" text:class-names=""><text:s text:c="1"/>due.<text:s text:c="1"/></text:span><text:span text:style-name="a1039" text:class-names=""/></text:p>
            <text:p text:style-name="a1060" text:class-names="" text:cond-style-name=""><text:span text:style-name="a1041" text:class-names="">Esempio</text:span><text:span text:style-name="a1042" text:class-names="">: F -&gt; F[+F] al 33% e F-&gt; F[-F] al 67%. In<text:s text:c="1"/></text:span><text:span text:style-name="a1043" text:class-names="">questo</text:span><text:span text:style-name="a1044" text:class-names=""><text:s text:c="1"/>modo<text:s text:c="1"/></text:span><text:span text:style-name="a1045" text:class-names="">vengono</text:span><text:span text:style-name="a1046" text:class-names=""><text:s text:c="1"/></text:span><text:span text:style-name="a1047" text:class-names="">generati</text:span><text:span text:style-name="a1048" text:class-names=""><text:s text:c="1"/></text:span><text:span text:style-name="a1049" text:class-names="">alberi</text:span><text:span text:style-name="a1050" text:class-names=""><text:s text:c="1"/></text:span><text:span text:style-name="a1051" text:class-names="">asimmetrici</text:span><text:span text:style-name="a1052" text:class-names=""><text:s text:c="1"/>e<text:s text:c="1"/></text:span><text:span text:style-name="a1053" text:class-names="">dall'aspetto</text:span><text:span text:style-name="a1054" text:class-names=""><text:s text:c="1"/>molto<text:s text:c="1"/></text:span><text:span text:style-name="a1055" text:class-names="">più</text:span><text:span text:style-name="a1056" text:class-names=""><text:s text:c="1"/></text:span><text:span text:style-name="a1057" text:class-names="">naturale</text:span><text:span text:style-name="a1058" text:class-names="">.</text:span><text:span text:style-name="a1059" text:class-names=""/></text:p>
            <text:p text:style-name="a1062" text:class-names="" text:cond-style-name=""><text:span text:style-name="a1061" text:class-names=""/></text:p>
            <text:p text:style-name="a1064" text:class-names="" text:cond-style-name=""><text:span text:style-name="a1063" text:class-names=""/></text:p>
            <text:p text:style-name="a1086" text:class-names="" text:cond-style-name=""><text:span text:style-name="a1065" text:class-names="">L-Systems<text:s text:c="1"/></text:span><text:span text:style-name="a1066" text:class-names="">Sensibili</text:span><text:span text:style-name="a1067" text:class-names=""><text:s text:c="1"/>al<text:s text:c="1"/></text:span><text:span text:style-name="a1068" text:class-names="">Contesto</text:span><text:span text:style-name="a1069" text:class-names=""><text:s text:c="1"/>(Context-sensitive):</text:span><text:span text:style-name="a1070" text:class-names=""><text:s text:c="1"/>La<text:s text:c="1"/></text:span><text:span text:style-name="a1071" text:class-names="">regola</text:span><text:span text:style-name="a1072" text:class-names=""><text:s text:c="1"/>cambia a<text:s text:c="1"/></text:span><text:span text:style-name="a1073" text:class-names="">seconda</text:span><text:span text:style-name="a1074" text:class-names=""><text:s text:c="1"/>di<text:s text:c="1"/></text:span><text:span text:style-name="a1075" text:class-names="">ciò</text:span><text:span text:style-name="a1076" text:class-names=""><text:s text:c="1"/></text:span><text:span text:style-name="a1077" text:class-names="">che</text:span><text:span text:style-name="a1078" text:class-names=""><text:s text:c="1"/></text:span><text:span text:style-name="a1079" text:class-names="">sta</text:span><text:span text:style-name="a1080" text:class-names=""><text:s text:c="1"/></text:span><text:span text:style-name="a1081" text:class-names="">intorno</text:span><text:span text:style-name="a1082" text:class-names=""><text:s text:c="1"/>alla<text:s text:c="1"/></text:span><text:span text:style-name="a1083" text:class-names="">lettera</text:span><text:span text:style-name="a1084" text:class-names="">.<text:s text:c="1"/></text:span><text:span text:style-name="a1085" text:class-names=""/></text:p>
            <text:p text:style-name="a1108" text:class-names="" text:cond-style-name=""><text:span text:style-name="a1087" text:class-names="">Esempio</text:span><text:span text:style-name="a1088" text:class-names="">: F<text:s text:c="1"/></text:span><text:span text:style-name="a1089" text:class-names="">diventa</text:span><text:span text:style-name="a1090" text:class-names=""><text:s text:c="1"/>un<text:s text:c="1"/></text:span><text:span text:style-name="a1091" text:class-names="">ramo</text:span><text:span text:style-name="a1092" text:class-names=""><text:s text:c="1"/></text:span><text:span text:style-name="a1093" text:class-names="">lungo</text:span><text:span text:style-name="a1094" text:class-names=""><text:s text:c="1"/>solo se la<text:s text:c="1"/></text:span><text:span text:style-name="a1095" text:class-names="">lettera</text:span><text:span text:style-name="a1096" text:class-names=""><text:s text:c="1"/>prima non è un<text:s text:c="1"/></text:span><text:span text:style-name="a1097" text:class-names="">altro</text:span><text:span text:style-name="a1098" text:class-names=""><text:s text:c="1"/></text:span><text:span text:style-name="a1099" text:class-names="">ramo</text:span><text:span text:style-name="a1100" text:class-names="">. Simula<text:s text:c="1"/></text:span><text:span text:style-name="a1101" text:class-names="">l'ombra</text:span><text:span text:style-name="a1102" text:class-names=""><text:s text:c="1"/>o la<text:s text:c="1"/></text:span><text:span text:style-name="a1103" text:class-names="">mancanza</text:span><text:span text:style-name="a1104" text:class-names=""><text:s text:c="1"/>di<text:s text:c="1"/></text:span><text:span text:style-name="a1105" text:class-names="">nutrienti</text:span><text:span text:style-name="a1106" text:class-names="">.</text:span><text:span text:style-name="a1107" text:class-names=""/></text:p>
            <text:p text:style-name="a1110" text:class-names="" text:cond-style-name=""><text:span text:style-name="a1109" text:class-names=""/></text:p>
            <text:p text:style-name="a1112" text:class-names="" text:cond-style-name=""><text:span text:style-name="a1111" text:class-names=""/></text:p>
            <text:p text:style-name="a1144" text:class-names="" text:cond-style-name=""><text:span text:style-name="a1113" text:class-names="">Parametric L-Systems:</text:span><text:span text:style-name="a1114" text:class-names=""><text:s text:c="1"/></text:span><text:span text:style-name="a1115" text:class-names="">Invece</text:span><text:span text:style-name="a1116" text:class-names=""><text:s text:c="1"/>di<text:s text:c="1"/></text:span><text:span text:style-name="a1117" text:class-names="">avere</text:span><text:span text:style-name="a1118" text:class-names=""><text:s text:c="1"/>solo F<text:s text:c="1"/></text:span><text:span text:style-name="a1119" text:class-names="">si</text:span><text:span text:style-name="a1120" text:class-names=""><text:s text:c="1"/>ha F(x), dove x è la<text:s text:c="1"/></text:span><text:span text:style-name="a1121" text:class-names="">lunghezza</text:span><text:span text:style-name="a1122" text:class-names=""><text:s text:c="1"/>del<text:s text:c="1"/></text:span><text:span text:style-name="a1123" text:class-names="">ramo</text:span><text:span text:style-name="a1124" text:class-names="">. Ad ogni<text:s text:c="1"/></text:span><text:span text:style-name="a1125" text:class-names="">generazione</text:span><text:span text:style-name="a1126" text:class-names="">, x<text:s text:c="1"/></text:span><text:span text:style-name="a1127" text:class-names="">può</text:span><text:span text:style-name="a1128" text:class-names=""><text:s text:c="1"/></text:span><text:span text:style-name="a1129" text:class-names="">diminuire</text:span><text:span text:style-name="a1130" text:class-names="">,<text:s text:c="1"/></text:span><text:span text:style-name="a1131" text:class-names="">simulando</text:span><text:span text:style-name="a1132" text:class-names=""><text:s text:c="1"/></text:span><text:span text:style-name="a1133" text:class-names="">i</text:span><text:span text:style-name="a1134" text:class-names=""><text:s text:c="1"/>rami<text:s text:c="1"/></text:span><text:span text:style-name="a1135" text:class-names="">che</text:span><text:span text:style-name="a1136" text:class-names=""><text:s text:c="1"/></text:span><text:span text:style-name="a1137" text:class-names="">si</text:span><text:span text:style-name="a1138" text:class-names=""><text:s text:c="1"/></text:span><text:span text:style-name="a1139" text:class-names="">assottigliano</text:span><text:span text:style-name="a1140" text:class-names=""><text:s text:c="1"/>verso le<text:s text:c="1"/></text:span><text:span text:style-name="a1141" text:class-names="">punte</text:span><text:span text:style-name="a1142" text:class-names="">.</text:span><text:span text:style-name="a1143" text:class-names=""/></text:p>
          </draw:text-box>
          <svg:title/>
          <svg:desc/>
        </draw:frame>
      </draw:page>
      <draw:page draw:name="Slide7" draw:style-name="a1146" draw:master-page-name="Master1-Layout2-obj-Title-and-Content" presentation:presentation-page-layout-name="Master1-PPL2" draw:id="Slide-262">
        <draw:frame draw:id="id83" draw:style-name="a1147" draw:name="object 2" svg:x="3.64714in" svg:y="4.30619in" svg:width="15.24229in" svg:height="3.80658in" style:rel-width="scale" style:rel-height="scale">
          <draw:image xlink:href="media/image16.jpg" xlink:type="simple" xlink:show="embed" xlink:actuate="onLoad"/>
          <svg:title/>
          <svg:desc/>
        </draw:frame>
        <draw:custom-shape svg:x="1.41929in" svg:y="0.96466in" svg:width="0in" svg:height="0.80972in" draw:id="id84" draw:style-name="a1150" draw:name="object 3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85" presentation:style-name="a1160" draw:name="object 4" svg:x="1.7711in" svg:y="1.00244in" svg:width="15.81358in" svg:height="0.77222in" presentation:class="title" presentation:placeholder="false">
          <draw:text-box>
            <text:p text:style-name="a1159" text:class-names="" text:cond-style-name=""><text:span text:style-name="a1151" text:class-names="">CRESCITA</text:span><text:span text:style-name="a1152" text:class-names=""><text:s text:c="1"/></text:span><text:span text:style-name="a1153" text:class-names="">DELLA</text:span><text:span text:style-name="a1154" text:class-names=""><text:s text:c="1"/></text:span><text:span text:style-name="a1155" text:class-names="">COMPLESSIT</text:span><text:span text:style-name="a1156" text:class-names="">A</text:span><text:span text:style-name="a1157" text:class-names="">'</text:span><text:span text:style-name="a1158" text:class-names=""/></text:p>
          </draw:text-box>
          <svg:title/>
          <svg:desc>$PPTXTitle</svg:desc>
        </draw:frame>
        <draw:frame draw:id="id86" draw:style-name="a1190" draw:name="object 5" svg:x="2.99633in" svg:y="4.27938in" svg:width="0.47222in" svg:height="3.84653in">
          <draw:text-box>
            <text:p text:style-name="a1163" text:class-names="" text:cond-style-name=""><text:span text:style-name="a1161" text:class-names="">65k</text:span><text:span text:style-name="a1162" text:class-names=""/></text:p>
            <text:p text:style-name="a1165" text:class-names="" text:cond-style-name=""><text:span text:style-name="a1164" text:class-names=""/></text:p>
            <text:p text:style-name="a1168" text:class-names="" text:cond-style-name=""><text:span text:style-name="a1166" text:class-names="">4k</text:span><text:span text:style-name="a1167" text:class-names=""/></text:p>
            <text:p text:style-name="a1170" text:class-names="" text:cond-style-name=""><text:span text:style-name="a1169" text:class-names=""/></text:p>
            <text:p text:style-name="a1172" text:class-names="" text:cond-style-name=""><text:span text:style-name="a1171" text:class-names=""/></text:p>
            <text:p text:style-name="a1175" text:class-names="" text:cond-style-name=""><text:span text:style-name="a1173" text:class-names="">256</text:span><text:span text:style-name="a1174" text:class-names=""/></text:p>
            <text:p text:style-name="a1177" text:class-names="" text:cond-style-name=""><text:span text:style-name="a1176" text:class-names=""/></text:p>
            <text:p text:style-name="a1179" text:class-names="" text:cond-style-name=""><text:span text:style-name="a1178" text:class-names=""/></text:p>
            <text:p text:style-name="a1182" text:class-names="" text:cond-style-name=""><text:span text:style-name="a1180" text:class-names="">16</text:span><text:span text:style-name="a1181" text:class-names=""/></text:p>
            <text:p text:style-name="a1184" text:class-names="" text:cond-style-name=""><text:span text:style-name="a1183" text:class-names=""/></text:p>
            <text:p text:style-name="a1186" text:class-names="" text:cond-style-name=""><text:span text:style-name="a1185" text:class-names=""/></text:p>
            <text:p text:style-name="a1189" text:class-names="" text:cond-style-name=""><text:span text:style-name="a1187" text:class-names="">l</text:span><text:span text:style-name="a1188" text:class-names=""/></text:p>
          </draw:text-box>
          <svg:title/>
          <svg:desc/>
        </draw:frame>
        <draw:frame draw:id="id87" draw:style-name="a1194" draw:name="object 6" svg:x="3.41701in" svg:y="8.17208in" svg:width="0.72639in" svg:height="0.38472in">
          <draw:text-box>
            <text:p text:style-name="a1193" text:class-names="" text:cond-style-name=""><text:span text:style-name="a1191" text:class-names="">Geno</text:span><text:span text:style-name="a1192" text:class-names=""/></text:p>
          </draw:text-box>
          <svg:title/>
          <svg:desc/>
        </draw:frame>
        <draw:frame draw:id="id88" draw:style-name="a1198" draw:name="object 7" svg:x="6.45343in" svg:y="8.17208in" svg:width="0.64097in" svg:height="0.38472in">
          <draw:text-box>
            <text:p text:style-name="a1197" text:class-names="" text:cond-style-name=""><text:span text:style-name="a1195" text:class-names="">Genl</text:span><text:span text:style-name="a1196" text:class-names=""/></text:p>
          </draw:text-box>
          <svg:title/>
          <svg:desc/>
        </draw:frame>
        <draw:frame draw:id="id89" draw:style-name="a1202" draw:name="object 8" svg:x="9.42103in" svg:y="8.17208in" svg:width="0.71181in" svg:height="0.38472in">
          <draw:text-box>
            <text:p text:style-name="a1201" text:class-names="" text:cond-style-name=""><text:span text:style-name="a1199" text:class-names="">Gen2</text:span><text:span text:style-name="a1200" text:class-names=""/></text:p>
          </draw:text-box>
          <svg:title/>
          <svg:desc/>
        </draw:frame>
        <draw:frame draw:id="id90" draw:style-name="a1206" draw:name="object 9" svg:x="12.40583in" svg:y="8.17208in" svg:width="0.71181in" svg:height="0.38472in">
          <draw:text-box>
            <text:p text:style-name="a1205" text:class-names="" text:cond-style-name=""><text:span text:style-name="a1203" text:class-names="">Gen3</text:span><text:span text:style-name="a1204" text:class-names=""/></text:p>
          </draw:text-box>
          <svg:title/>
          <svg:desc/>
        </draw:frame>
        <draw:frame draw:id="id91" draw:style-name="a1210" draw:name="object 10" svg:x="15.39924in" svg:y="8.17208in" svg:width="0.73333in" svg:height="0.38472in">
          <draw:text-box>
            <text:p text:style-name="a1209" text:class-names="" text:cond-style-name=""><text:span text:style-name="a1207" text:class-names="">Gen4</text:span><text:span text:style-name="a1208" text:class-names=""/></text:p>
          </draw:text-box>
          <svg:title/>
          <svg:desc/>
        </draw:frame>
        <draw:frame draw:id="id92" draw:style-name="a1214" draw:name="object 11" svg:x="18.39265in" svg:y="8.17208in" svg:width="0.71181in" svg:height="0.38472in">
          <draw:text-box>
            <text:p text:style-name="a1213" text:class-names="" text:cond-style-name=""><text:span text:style-name="a1211" text:class-names="">Gens</text:span><text:span text:style-name="a1212" text:class-names=""/></text:p>
          </draw:text-box>
          <svg:title/>
          <svg:desc/>
        </draw:frame>
        <draw:frame draw:id="id93" draw:style-name="a1250" draw:name="object 12" svg:x="3.73823in" svg:y="9.76103in" svg:width="14.57778in" svg:height="0.41042in">
          <draw:text-box>
            <text:p text:style-name="a1249" text:class-names="" text:cond-style-name=""><text:span text:style-name="a1215" text:class-names="">La</text:span><text:span text:style-name="a1216" text:class-names=""><text:s text:c="1"/></text:span><text:span text:style-name="a1217" text:class-names="">crescita</text:span><text:span text:style-name="a1218" text:class-names=""><text:s text:c="1"/>della</text:span><text:span text:style-name="a1219" text:class-names=""><text:s text:c="1"/></text:span><text:span text:style-name="a1220" text:class-names="">complessita</text:span><text:span text:style-name="a1221" text:class-names=""><text:s text:c="1"/></text:span><text:span text:style-name="a1222" text:class-names="">segue</text:span><text:span text:style-name="a1223" text:class-names=""><text:s text:c="1"/></text:span><text:span text:style-name="a1224" text:class-names="">un</text:span><text:span text:style-name="a1225" text:class-names=""><text:s text:c="1"/></text:span><text:span text:style-name="a1226" text:class-names="">trend</text:span><text:span text:style-name="a1227" text:class-names=""><text:s text:c="1"/></text:span><text:span text:style-name="a1228" text:class-names="">esponenziale</text:span><text:span text:style-name="a1229" text:class-names=""><text:s text:c="1"/></text:span><text:span text:style-name="a1230" text:class-names="">in</text:span><text:span text:style-name="a1231" text:class-names=""><text:s text:c="1"/></text:span><text:span text:style-name="a1232" text:class-names="">relazione</text:span><text:span text:style-name="a1233" text:class-names=""><text:s text:c="1"/></text:span><text:span text:style-name="a1234" text:class-names="">al</text:span><text:span text:style-name="a1235" text:class-names=""><text:s text:c="1"/></text:span><text:span text:style-name="a1236" text:class-names="">numero</text:span><text:span text:style-name="a1237" text:class-names=""><text:s text:c="1"/></text:span><text:span text:style-name="a1238" text:class-names="">di</text:span><text:span text:style-name="a1239" text:class-names=""><text:s text:c="1"/></text:span><text:span text:style-name="a1240" text:class-names="">iterazioni</text:span><text:span text:style-name="a1241" text:class-names=""><text:s text:c="1"/></text:span><text:span text:style-name="a1242" text:class-names="">di</text:span><text:span text:style-name="a1243" text:class-names=""><text:s text:c="1"/></text:span><text:span text:style-name="a1244" text:class-names="">riscrittura</text:span><text:span text:style-name="a1245" text:class-names=""><text:s text:c="1"/></text:span><text:span text:style-name="a1246" text:class-names="">(N)</text:span><text:span text:style-name="a1247" text:class-names="">.</text:span><text:span text:style-name="a1248" text:class-names=""/></text:p>
          </draw:text-box>
          <svg:title/>
          <svg:desc/>
        </draw:frame>
      </draw:page>
      <draw:page draw:name="Slide8" draw:style-name="a1251" draw:master-page-name="Master1-Layout5-obj-Blank" presentation:presentation-page-layout-name="Master1-PPL5" draw:id="Slide-263">
        <draw:frame draw:id="id94" draw:style-name="a1252" draw:name="object 2" svg:x="0in" svg:y="0in" svg:width="21.98611in" svg:height="12.36719in" style:rel-width="scale" style:rel-height="scale">
          <draw:image xlink:href="media/image17.jpg" xlink:type="simple" xlink:show="embed" xlink:actuate="onLoad"/>
          <svg:title/>
          <svg:desc/>
        </draw:frame>
      </draw:page>
      <draw:page draw:name="Slide9" draw:style-name="a1253" draw:master-page-name="Master1-Layout3-obj-Two-Content" presentation:presentation-page-layout-name="Master1-PPL3" draw:id="Slide-264">
        <draw:frame draw:id="id95" presentation:style-name="a1262" draw:name="object 4" svg:x="1.7711in" svg:y="1.00244in" svg:width="15.81358in" svg:height="0.77222in" presentation:class="title" presentation:placeholder="false">
          <draw:text-box>
            <text:p text:style-name="a1261" text:class-names="" text:cond-style-name=""><text:span text:style-name="a1254" text:class-names="">VISUALIZZAZIONE:</text:span><text:span text:style-name="a1255" text:class-names=""><text:s text:c="1"/></text:span><text:span text:style-name="a1256" text:class-names="">LA</text:span><text:span text:style-name="a1257" text:class-names=""><text:s text:c="1"/></text:span><text:span text:style-name="a1258" text:class-names="">TARTARUGA</text:span><text:span text:style-name="a1259" text:class-names=""><text:s text:c="1"/></text:span><text:span text:style-name="a1260" text:class-names="">3D</text:span></text:p>
          </draw:text-box>
          <svg:title/>
          <svg:desc>$PPTXTitle</svg:desc>
        </draw:frame>
        <draw:frame draw:id="id96" draw:style-name="a1263" draw:name="Immagine 1" svg:x="12.34404in" svg:y="3.09382in" svg:width="6.25245in" svg:height="6.25in" style:rel-width="scale" style:rel-height="scale">
          <draw:image xlink:href="media/image18.jpeg" xlink:type="simple" xlink:show="embed" xlink:actuate="onLoad"/>
          <svg:title/>
          <svg:desc>Immagine che contiene Viso umano, persona, Fronte, vestiti

Il contenuto generato dall&amp;#39;IA potrebbe non essere corretto.</svg:desc>
        </draw:frame>
        <draw:frame draw:id="id97" draw:style-name="a1374" draw:name="object 5" svg:x="1.5184in" svg:y="4.05879in" svg:width="8.84028in" svg:height="5.24722in">
          <draw:text-box>
            <text:p text:style-name="a1298" text:class-names="" text:cond-style-name=""><text:span text:style-name="a1264" text:class-names="">L'interprete</text:span><text:span text:style-name="a1265" text:class-names=""><text:s text:c="1"/></text:span><text:span text:style-name="a1266" text:class-names="">traduce</text:span><text:span text:style-name="a1267" text:class-names=""><text:s text:c="1"/></text:span><text:span text:style-name="a1268" text:class-names="">geometricamente</text:span><text:span text:style-name="a1269" text:class-names=""><text:s text:c="1"/></text:span><text:span text:style-name="a1270" text:class-names="">i</text:span><text:span text:style-name="a1271" text:class-names=""><text:s text:c="1"/></text:span><text:span text:style-name="a1272" text:class-names="">simboli</text:span><text:span text:style-name="a1273" text:class-names=""><text:s text:c="1"/></text:span><text:span text:style-name="a1274" text:class-names="">accumulati</text:span><text:span text:style-name="a1275" text:class-names=""><text:s text:c="1"/></text:span><text:span text:style-name="a1276" text:class-names="">nella</text:span><text:span text:style-name="a1277" text:class-names=""><text:s text:c="1"/></text:span><text:span text:style-name="a1278" text:class-names="">stringa</text:span><text:span text:style-name="a1279" text:class-names=""><text:s text:c="1"/></text:span><text:span text:style-name="a1280" text:class-names="">finale</text:span><text:span text:style-name="a1281" text:class-names=""><text:s text:c="1"/></text:span><text:span text:style-name="a1282" text:class-names="">guidando</text:span><text:span text:style-name="a1283" text:class-names=""><text:s text:c="1"/></text:span><text:span text:style-name="a1284" text:class-names="">una</text:span><text:span text:style-name="a1285" text:class-names=""><text:s text:c="1"/></text:span><text:span text:style-name="a1286" text:class-names="">tartaruga</text:span><text:span text:style-name="a1287" text:class-names=""><text:s text:c="1"/></text:span><text:span text:style-name="a1288" text:class-names="">virtuale</text:span><text:span text:style-name="a1289" text:class-names=""><text:s text:c="1"/></text:span><text:span text:style-name="a1290" text:class-names="">nello</text:span><text:span text:style-name="a1291" text:class-names=""><text:s text:c="1"/></text:span><text:span text:style-name="a1292" text:class-names="">spazio</text:span><text:span text:style-name="a1293" text:class-names=""><text:s text:c="1"/></text:span><text:span text:style-name="a1294" text:class-names="">euclideo</text:span><text:span text:style-name="a1295" text:class-names=""><text:s text:c="1"/></text:span><text:span text:style-name="a1296" text:class-names="">3D.</text:span><text:span text:style-name="a1297" text:class-names=""/></text:p>
            <text:p text:style-name="a1300" text:class-names="" text:cond-style-name=""><text:span text:style-name="a1299" text:class-names=""/></text:p>
            <text:p text:style-name="a1302" text:class-names="" text:cond-style-name=""><text:span text:style-name="a1301" text:class-names=""/></text:p>
            <text:p text:style-name="a1310" text:class-names="" text:cond-style-name=""><text:span text:style-name="a1303" text:class-names="">Stato</text:span><text:span text:style-name="a1304" text:class-names=""><text:s text:c="1"/></text:span><text:span text:style-name="a1305" text:class-names="">della</text:span><text:span text:style-name="a1306" text:class-names=""><text:s text:c="1"/></text:span><text:span text:style-name="a1307" text:class-names="">Tartaruga</text:span><text:span text:style-name="a1308" text:class-names="">:</text:span><text:span text:style-name="a1309" text:class-names=""/></text:p>
            <text:list text:style-name="a1328">
              <text:list-item>
                <text:p text:style-name="a1327" text:class-names="" text:cond-style-name=""><text:span text:style-name="a1311" text:class-names="">Posizione</text:span><text:span text:style-name="a1312" text:class-names="">:</text:span><text:span text:style-name="a1313" text:class-names=""><text:tab/></text:span><text:span text:style-name="a1314" text:class-names="">(</text:span><text:span text:style-name="a1315" text:class-names=""><text:s text:c="1"/></text:span><text:span text:style-name="a1316" text:class-names="">x</text:span><text:span text:style-name="a1317" text:class-names=""><text:s text:c="1"/></text:span><text:span text:style-name="a1318" text:class-names="">,</text:span><text:span text:style-name="a1319" text:class-names=""><text:s text:c="1"/>y</text:span><text:span text:style-name="a1320" text:class-names=""><text:s text:c="1"/></text:span><text:span text:style-name="a1321" text:class-names="">,</text:span><text:span text:style-name="a1322" text:class-names=""><text:s text:c="1"/></text:span><text:span text:style-name="a1323" text:class-names="">z</text:span><text:span text:style-name="a1324" text:class-names=""><text:s text:c="1"/></text:span><text:span text:style-name="a1325" text:class-names="">)</text:span><text:span text:style-name="a1326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29" text:class-names="">Orientamento</text:span><text:span text:style-name="a1330" text:class-names="">:</text:span><text:span text:style-name="a1331" text:class-names=""><text:s text:c="1"/></text:span><text:span text:style-name="a1332" text:class-names="">Matrice</text:span><text:span text:style-name="a1333" text:class-names=""><text:s text:c="1"/></text:span><text:span text:style-name="a1334" text:class-names="">3</text:span><text:span text:style-name="a1335" text:class-names=""><text:s text:c="1"/></text:span><text:span text:style-name="a1336" text:class-names="">x</text:span><text:span text:style-name="a1337" text:class-names=""><text:s text:c="1"/></text:span><text:span text:style-name="a1338" text:class-names="">3<text:s text:c="1"/></text:span><text:span text:style-name="a1339" text:class-names="">o</text:span><text:span text:style-name="a1340" text:class-names=""><text:s text:c="1"/></text:span><text:span text:style-name="a1341" text:class-names="">Quaternione</text:span><text:span text:style-name="a1342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45" text:class-names=""><text:tab/>Vettori:</text:span><text:span text:style-name="a1346" text:class-names=""><text:s text:c="1"/></text:span><text:span text:style-name="a1347" text:class-names="">Heading</text:span><text:span text:style-name="a1348" text:class-names=""><text:s text:c="1"/></text:span><text:span text:style-name="a1349" text:class-names="">(H),</text:span><text:span text:style-name="a1350" text:class-names=""><text:s text:c="1"/></text:span><text:span text:style-name="a1351" text:class-names="">Up</text:span><text:span text:style-name="a1352" text:class-names=""><text:s text:c="1"/></text:span><text:span text:style-name="a1353" text:class-names="">(U),</text:span><text:span text:style-name="a1354" text:class-names=""><text:s text:c="1"/></text:span><text:span text:style-name="a1355" text:class-names="">Left</text:span><text:span text:style-name="a1356" text:class-names=""><text:s text:c="1"/></text:span><text:span text:style-name="a1357" text:class-names="">(L)</text:span><text:span text:style-name="a1358" text:class-names=""><text:s text:c="1"/></text:span><text:span text:style-name="a1359" text:class-names="">per</text:span><text:span text:style-name="a1360" text:class-names=""><text:tab/></text:span><text:span text:style-name="a1361" text:class-names="">calcolare</text:span><text:span text:style-name="a1362" text:class-names=""><text:s text:c="1"/></text:span><text:span text:style-name="a1363" text:class-names="">rollio</text:span><text:span text:style-name="a1364" text:class-names="">,<text:s text:c="1"/></text:span><text:span text:style-name="a1365" text:class-names="">beccheggio</text:span><text:span text:style-name="a1366" text:class-names=""><text:s text:c="1"/></text:span><text:span text:style-name="a1367" text:class-names="">e</text:span><text:span text:style-name="a1368" text:class-names=""><text:s text:c="1"/></text:span><text:span text:style-name="a1369" text:class-names="">imbardata</text:span><text:span text:style-name="a1370" text:class-names="">.</text:span><text:span text:style-name="a1371" text:class-names=""/></text:p>
              </text:list-item>
            </text:list>
          </draw:text-box>
          <svg:title/>
          <svg:desc/>
        </draw:frame>
        <draw:frame draw:id="id98" draw:style-name="a1383" draw:name="object 12" svg:x="12.34384in" svg:y="9.85235in" svg:width="14.57778in" svg:height="0.8015in">
          <draw:text-box>
            <text:p text:style-name="a1380" text:class-names="" text:cond-style-name=""><text:span text:style-name="a1375" text:class-names="">L'ideatore della<text:s text:c="1"/></text:span><text:span text:style-name="a1376" text:class-names="">turtle</text:span><text:span text:style-name="a1377" text:class-names=""><text:s text:c="1"/>graphics,<text:s text:c="1"/></text:span><text:span text:style-name="a1378" text:class-names=""><text:a xlink:href="https://en.wikipedia.org/wiki/Przemys%C5%82aw_Prusinkiewicz" text:style-name="" text:visited-style-name="">Przemysław Prusinkiewicz</text:a></text:span><text:span text:style-name="a1379" text:class-names=""/></text:p>
            <text:p text:style-name="a1382" text:class-names="" text:cond-style-name=""><text:span text:style-name="a1381" text:class-names=""/></text:p>
          </draw:text-box>
          <svg:title/>
          <svg:desc/>
        </draw:frame>
      </draw:page>
      <draw:page draw:name="Slide24" draw:style-name="a1384" draw:master-page-name="Master1-Layout3-obj-Two-Content" presentation:presentation-page-layout-name="Master1-PPL3" draw:id="Slide-279">
        <draw:frame draw:id="id99" presentation:style-name="a1388" draw:name="object 4" svg:x="1.7711in" svg:y="1.00244in" svg:width="15.81358in" svg:height="0.77222in" presentation:class="title" presentation:placeholder="false">
          <draw:text-box>
            <text:p text:style-name="a1387" text:class-names="" text:cond-style-name=""><text:span text:style-name="a1385" text:class-names="">Complessità effettiva</text:span><text:span text:style-name="a1386" text:class-names=""/></text:p>
          </draw:text-box>
          <svg:title/>
          <svg:desc>$PPTXTitle</svg:desc>
        </draw:frame>
        <draw:frame draw:id="id100" draw:style-name="a1549" draw:name="object 5" svg:x="1.38882in" svg:y="3.07365in" svg:width="19.89877in" svg:height="8.39438in">
          <draw:text-box>
            <text:p text:style-name="a1398" text:class-names="" text:cond-style-name=""><text:span text:style-name="a1389" text:class-names="">La<text:s text:c="1"/></text:span><text:span text:style-name="a1390" text:class-names="">Progressione</text:span><text:span text:style-name="a1391" text:class-names=""><text:s text:c="1"/></text:span><text:span text:style-name="a1392" text:class-names="">Esponenziale</text:span><text:span text:style-name="a1393" text:class-names=""><text:s text:c="1"/></text:span><text:span text:style-name="a1394" text:class-names="">nella</text:span><text:span text:style-name="a1395" text:class-names=""><text:s text:c="1"/></text:span><text:span text:style-name="a1396" text:class-names="">Pratica</text:span><text:span text:style-name="a1397" text:class-names=""/></text:p>
            <text:p text:style-name="a1400" text:class-names="" text:cond-style-name=""><text:span text:style-name="a1399" text:class-names=""/></text:p>
            <text:p text:style-name="a1423" text:class-names="" text:cond-style-name=""><text:span text:style-name="a1401" text:class-names="">Tutto<text:s text:c="1"/></text:span><text:span text:style-name="a1402" text:class-names="">ruota</text:span><text:span text:style-name="a1403" text:class-names=""><text:s text:c="1"/></text:span><text:span text:style-name="a1404" text:class-names="">attorno</text:span><text:span text:style-name="a1405" text:class-names=""><text:s text:c="1"/>alla<text:s text:c="1"/></text:span><text:span text:style-name="a1406" text:class-names="">tua</text:span><text:span text:style-name="a1407" text:class-names=""><text:s text:c="1"/></text:span><text:span text:style-name="a1408" text:class-names="">regola</text:span><text:span text:style-name="a1409" text:class-names=""><text:s text:c="1"/>di<text:s text:c="1"/></text:span><text:span text:style-name="a1410" text:class-names="">produzione</text:span><text:span text:style-name="a1411" text:class-names="">, ad<text:s text:c="1"/></text:span><text:span text:style-name="a1412" text:class-names="">esempio</text:span><text:span text:style-name="a1413" text:class-names=""><text:s text:c="1"/>F -&gt; FF+[+F-F]<text:s text:c="1"/></text:span><text:span text:style-name="a1414" text:class-names="">proposta</text:span><text:span text:style-name="a1415" text:class-names=""><text:s text:c="1"/>in<text:s text:c="1"/></text:span><text:span text:style-name="a1416" text:class-names="">esempio</text:span><text:span text:style-name="a1417" text:class-names=""><text:s text:c="1"/></text:span><text:span text:style-name="a1418" text:class-names="">nella</text:span><text:span text:style-name="a1419" text:class-names=""><text:s text:c="1"/></text:span><text:span text:style-name="a1420" text:class-names="">traccia</text:span><text:span text:style-name="a1421" text:class-names="">.</text:span><text:span text:style-name="a1422" text:class-names=""/></text:p>
            <text:p text:style-name="a1459" text:class-names="" text:cond-style-name=""><text:span text:style-name="a1424" text:class-names="">Se ci<text:s text:c="1"/></text:span><text:span text:style-name="a1425" text:class-names="">si</text:span><text:span text:style-name="a1426" text:class-names=""><text:s text:c="1"/>fa<text:s text:c="1"/></text:span><text:span text:style-name="a1427" text:class-names="">caso</text:span><text:span text:style-name="a1428" text:class-names="">, ogni volta<text:s text:c="1"/></text:span><text:span text:style-name="a1429" text:class-names="">che</text:span><text:span text:style-name="a1430" text:class-names=""><text:s text:c="1"/></text:span><text:span text:style-name="a1431" text:class-names="">l'algoritmo</text:span><text:span text:style-name="a1432" text:class-names=""><text:s text:c="1"/></text:span><text:span text:style-name="a1433" text:class-names="">incontra</text:span><text:span text:style-name="a1434" text:class-names=""><text:s text:c="1"/></text:span><text:span text:style-name="a1435" text:class-names="">una</text:span><text:span text:style-name="a1436" text:class-names=""><text:s text:c="1"/></text:span><text:span text:style-name="a1437" text:class-names="">singola</text:span><text:span text:style-name="a1438" text:class-names=""><text:s text:c="1"/></text:span><text:span text:style-name="a1439" text:class-names="">lettera</text:span><text:span text:style-name="a1440" text:class-names=""><text:s text:c="1"/>`F` (</text:span><text:span text:style-name="a1441" text:class-names="">che</text:span><text:span text:style-name="a1442" text:class-names=""><text:s text:c="1"/></text:span><text:span text:style-name="a1443" text:class-names="">corrisponde</text:span><text:span text:style-name="a1444" text:class-names=""><text:s text:c="1"/>a un<text:s text:c="1"/></text:span><text:span text:style-name="a1445" text:class-names="">cilindro</text:span><text:span text:style-name="a1446" text:class-names=""><text:s text:c="1"/>3D), la<text:s text:c="1"/></text:span><text:span text:style-name="a1447" text:class-names="">sostituisce</text:span><text:span text:style-name="a1448" text:class-names=""><text:s text:c="1"/>con<text:s text:c="1"/></text:span><text:span text:style-name="a1449" text:class-names="">una</text:span><text:span text:style-name="a1450" text:class-names=""><text:s text:c="1"/></text:span><text:span text:style-name="a1451" text:class-names="">stringa</text:span><text:span text:style-name="a1452" text:class-names=""><text:s text:c="1"/></text:span><text:span text:style-name="a1453" text:class-names="">che</text:span><text:span text:style-name="a1454" text:class-names=""><text:s text:c="1"/></text:span><text:span text:style-name="a1455" text:class-names="">contiene</text:span><text:span text:style-name="a1456" text:class-names=""><text:s text:c="1"/>ben quattro<text:s text:c="1"/></text:span><text:span text:style-name="a1457" text:class-names="">lettere</text:span><text:span text:style-name="a1458" text:class-names=""><text:s text:c="1"/>F.</text:span></text:p>
            <text:p text:style-name="a1481" text:class-names="" text:cond-style-name=""><text:span text:style-name="a1460" text:class-names="">Questo</text:span><text:span text:style-name="a1461" text:class-names=""><text:s text:c="1"/></text:span><text:span text:style-name="a1462" text:class-names="">significa</text:span><text:span text:style-name="a1463" text:class-names=""><text:s text:c="1"/></text:span><text:span text:style-name="a1464" text:class-names="">che</text:span><text:span text:style-name="a1465" text:class-names=""><text:s text:c="1"/>a ogni<text:s text:c="1"/></text:span><text:span text:style-name="a1466" text:class-names="">iterazione</text:span><text:span text:style-name="a1467" text:class-names=""><text:s text:c="1"/>(o<text:s text:c="1"/></text:span><text:span text:style-name="a1468" text:class-names="">Generazione</text:span><text:span text:style-name="a1469" text:class-names="">), il<text:s text:c="1"/></text:span><text:span text:style-name="a1470" text:class-names="">numero</text:span><text:span text:style-name="a1471" text:class-names=""><text:s text:c="1"/>di rami della<text:s text:c="1"/></text:span><text:span text:style-name="a1472" text:class-names="">tua</text:span><text:span text:style-name="a1473" text:class-names=""><text:s text:c="1"/></text:span><text:span text:style-name="a1474" text:class-names="">pianta</text:span><text:span text:style-name="a1475" text:class-names=""><text:s text:c="1"/></text:span><text:span text:style-name="a1476" text:class-names="">si</text:span><text:span text:style-name="a1477" text:class-names=""><text:s text:c="1"/></text:span><text:span text:style-name="a1478" text:class-names="">moltiplica</text:span><text:span text:style-name="a1479" text:class-names=""><text:s text:c="1"/>per quattro alla N.<text:s text:c="1"/></text:span><text:span text:style-name="a1480" text:class-names=""/></text:p>
            <text:p text:style-name="a1490" text:class-names="" text:cond-style-name=""><text:span text:style-name="a1482" text:class-names="">Esemplifichiamo</text:span><text:span text:style-name="a1483" text:class-names=""><text:s text:c="1"/>con </text:span><text:span text:style-name="a1484" text:class-names="">i</text:span><text:span text:style-name="a1485" text:class-names=""><text:s text:c="1"/>numer</text:span><text:span text:style-name="a1486" text:class-names="">i</text:span><text:span text:style-name="a1487" text:class-names=""><text:s text:c="1"/></text:span><text:span text:style-name="a1488" text:class-names="">reali</text:span><text:span text:style-name="a1489" text:class-names="">:</text:span></text:p>
            <text:p text:style-name="a1492" text:class-names="" text:cond-style-name=""><text:span text:style-name="a1491" text:class-names=""/></text:p>
            <text:list text:style-name="a1500">
              <text:list-item>
                <text:p text:style-name="a1499" text:class-names="" text:cond-style-name=""><text:span text:style-name="a1493" text:class-names="">Generazione</text:span><text:span text:style-name="a1494" text:class-names=""><text:s text:c="1"/>0 (</text:span><text:span text:style-name="a1495" text:class-names="">Assioma</text:span><text:span text:style-name="a1496" text:class-names="">): 1<text:s text:c="1"/></text:span><text:span text:style-name="a1497" text:class-names="">ramo</text:span><text:span text:style-name="a1498" text:class-names="">.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1" text:class-names="">Generazione</text:span><text:span text:style-name="a1502" text:class-names=""><text:s text:c="1"/>1: 4 rami.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5" text:class-names="">Generazione</text:span><text:span text:style-name="a1506" text:class-names=""><text:s text:c="1"/>2: 16 rami (4x4).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09" text:class-names="">Generazione</text:span><text:span text:style-name="a1510" text:class-names=""><text:s text:c="1"/>3: 64 rami (16x4).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3" text:class-names="">Generazione</text:span><text:span text:style-name="a1514" text:class-names=""><text:s text:c="1"/>4: 256 rami (64x4).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Generazione</text:span><text:span text:style-name="a1518" text:class-names=""><text:s text:c="1"/>5: 1.024 rami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1" text:class-names="">….</text:span><text:span text:style-name="a1522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5" text:class-names="">….</text:span><text:span text:style-name="a1526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29" text:class-names="">….</text:span><text:span text:style-name="a1530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3" text:class-names="">Generazione</text:span><text:span text:style-name="a1534" text:class-names=""><text:s text:c="1"/>10:<text:s text:c="1"/></text:span><text:span text:style-name="a1535" text:class-names="">Più</text:span><text:span text:style-name="a1536" text:class-names=""><text:s text:c="1"/>di 1<text:s text:c="1"/></text:span><text:span text:style-name="a1537" text:class-names="">milione</text:span><text:span text:style-name="a1538" text:class-names=""><text:s text:c="1"/>di rami!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p text:style-name="a1548" text:class-names="" text:cond-style-name=""><text:span text:style-name="a1547" text:class-names=""/></text:p>
          </draw:text-box>
          <svg:title/>
          <svg:desc/>
        </draw:frame>
      </draw:page>
      <draw:page draw:name="Slide10" draw:style-name="a1550" draw:master-page-name="Master1-Layout3-obj-Two-Content" presentation:presentation-page-layout-name="Master1-PPL3" draw:id="Slide-265">
        <draw:custom-shape svg:x="1.41929in" svg:y="0.96466in" svg:width="0in" svg:height="0.80972in" draw:id="id101" draw:style-name="a1553" draw:name="object 3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02" presentation:style-name="a1566" draw:name="object 10" svg:x="1.7711in" svg:y="1.00244in" svg:width="15.81358in" svg:height="0.77222in" presentation:class="title" presentation:placeholder="false">
          <draw:text-box>
            <text:p text:style-name="a1565" text:class-names="" text:cond-style-name=""><text:span text:style-name="a1554" text:class-names="">LA</text:span><text:span text:style-name="a1555" text:class-names=""><text:s text:c="1"/></text:span><text:span text:style-name="a1556" text:class-names="">GESTIONE</text:span><text:span text:style-name="a1557" text:class-names=""><text:s text:c="1"/></text:span><text:span text:style-name="a1558" text:class-names="">DEI</text:span><text:span text:style-name="a1559" text:class-names=""><text:s text:c="1"/></text:span><text:span text:style-name="a1560" text:class-names="">RAMI:</text:span><text:span text:style-name="a1561" text:class-names=""><text:s text:c="1"/></text:span><text:span text:style-name="a1562" text:class-names="">LO</text:span><text:span text:style-name="a1563" text:class-names=""><text:s text:c="1"/></text:span><text:span text:style-name="a1564" text:class-names="">STACK</text:span></text:p>
          </draw:text-box>
          <svg:title/>
          <svg:desc>$PPTXTitle</svg:desc>
        </draw:frame>
        <draw:frame draw:id="id103" draw:style-name="a1717" draw:name="object 11" svg:x="1.35186in" svg:y="3.77987in" svg:width="9.19653in" svg:height="5.72431in">
          <draw:text-box>
            <text:p text:style-name="a1610" text:class-names="" text:cond-style-name=""><text:span text:style-name="a1567" text:class-names="">Per</text:span><text:span text:style-name="a1568" text:class-names=""><text:s text:c="1"/></text:span><text:span text:style-name="a1569" text:class-names="">supportare</text:span><text:span text:style-name="a1570" text:class-names=""><text:s text:c="1"/></text:span><text:span text:style-name="a1571" text:class-names="">biforcazioni</text:span><text:span text:style-name="a1572" text:class-names=""><text:s text:c="1"/></text:span><text:span text:style-name="a1573" text:class-names="">strutturate</text:span><text:span text:style-name="a1574" text:class-names=""><text:s text:c="1"/></text:span><text:span text:style-name="a1575" text:class-names="">e</text:span><text:span text:style-name="a1576" text:class-names=""><text:s text:c="1"/></text:span><text:span text:style-name="a1577" text:class-names="">la</text:span><text:span text:style-name="a1578" text:class-names=""><text:s text:c="1"/></text:span><text:span text:style-name="a1579" text:class-names="">creazione</text:span><text:span text:style-name="a1580" text:class-names=""><text:s text:c="1"/></text:span><text:span text:style-name="a1581" text:class-names="">di</text:span><text:span text:style-name="a1582" text:class-names=""><text:s text:c="1"/></text:span><text:span text:style-name="a1583" text:class-names="">rami<text:s text:c="1"/></text:span><text:span text:style-name="a1584" text:class-names="">reali</text:span><text:span text:style-name="a1585" text:class-names="">,</text:span><text:span text:style-name="a1586" text:class-names=""> è</text:span><text:span text:style-name="a1587" text:class-names=""> </text:span><text:span text:style-name="a1588" text:class-names="">indispensabile</text:span><text:span text:style-name="a1589" text:class-names=""><text:s text:c="1"/></text:span><text:span text:style-name="a1590" text:class-names="">salvare</text:span><text:span text:style-name="a1591" text:class-names=""><text:s text:c="1"/></text:span><text:span text:style-name="a1592" text:class-names="">e</text:span><text:span text:style-name="a1593" text:class-names=""><text:s text:c="1"/></text:span><text:span text:style-name="a1594" text:class-names="">successivamente</text:span><text:span text:style-name="a1595" text:class-names=""><text:s text:c="1"/></text:span><text:span text:style-name="a1596" text:class-names="">ripristinare<text:s text:c="1"/></text:span><text:span text:style-name="a1597" text:class-names="">la</text:span><text:span text:style-name="a1598" text:class-names=""><text:s text:c="1"/></text:span><text:span text:style-name="a1599" text:class-names="">posizione</text:span><text:span text:style-name="a1600" text:class-names=""><text:s text:c="1"/></text:span><text:span text:style-name="a1601" text:class-names="">e</text:span><text:span text:style-name="a1602" text:class-names=""><text:s text:c="1"/></text:span><text:span text:style-name="a1603" text:class-names="">la</text:span><text:span text:style-name="a1604" text:class-names=""><text:s text:c="1"/></text:span><text:span text:style-name="a1605" text:class-names="">rotazione</text:span><text:span text:style-name="a1606" text:class-names=""><text:s text:c="1"/>di</text:span><text:span text:style-name="a1607" text:class-names=""><text:s text:c="1"/></text:span><text:span text:style-name="a1608" text:class-names="">disegno.</text:span><text:span text:style-name="a1609" text:class-names=""/></text:p>
            <text:list text:style-name="a1644">
              <text:list-item>
                <text:p text:style-name="a1643" text:class-names="" text:cond-style-name=""><text:span text:style-name="a1611" text:class-names="">Simbolo</text:span><text:span text:style-name="a1612" text:class-names=""><text:s text:c="1"/></text:span><text:span text:style-name="a1613" text:class-names="">'['</text:span><text:span text:style-name="a1614" text:class-names=""><text:s text:c="1"/></text:span><text:span text:style-name="a1615" text:class-names="">(PUSH):</text:span><text:span text:style-name="a1616" text:class-names=""><text:s text:c="1"/></text:span><text:span text:style-name="a1617" text:class-names="">Memorizza</text:span><text:span text:style-name="a1618" text:class-names=""><text:s text:c="1"/></text:span><text:span text:style-name="a1619" text:class-names="">temporaneamente</text:span><text:span text:style-name="a1620" text:class-names=""><text:s text:c="1"/></text:span><text:span text:style-name="a1621" text:class-names="">lo</text:span><text:span text:style-name="a1622" text:class-names=""><text:s text:c="1"/></text:span><text:span text:style-name="a1623" text:class-names="">stato</text:span><text:span text:style-name="a1624" text:class-names=""><text:s text:c="1"/><text:tab/></text:span><text:span text:style-name="a1625" text:class-names="">corrente</text:span><text:span text:style-name="a1626" text:class-names=""><text:s text:c="1"/></text:span><text:span text:style-name="a1627" text:class-names="">della</text:span><text:span text:style-name="a1628" text:class-names=""><text:s text:c="1"/></text:span><text:span text:style-name="a1629" text:class-names="">tartaruga</text:span><text:span text:style-name="a1630" text:class-names=""><text:s text:c="1"/></text:span><text:span text:style-name="a1631" text:class-names="">sulla</text:span><text:span text:style-name="a1632" text:class-names=""><text:s text:c="1"/></text:span><text:span text:style-name="a1633" text:class-names="">cima</text:span><text:span text:style-name="a1634" text:class-names=""><text:s text:c="1"/></text:span><text:span text:style-name="a1635" text:class-names="">della</text:span><text:span text:style-name="a1636" text:class-names=""><text:s text:c="1"/></text:span><text:span text:style-name="a1637" text:class-names="">pila</text:span><text:span text:style-name="a1638" text:class-names=""><text:s text:c="1"/></text:span><text:span text:style-name="a1639" text:class-names="">di</text:span><text:span text:style-name="a1640" text:class-names=""><text:s text:c="1"/></text:span><text:span text:style-name="a1641" text:class-names="">memoria.</text:span><text:span text:style-name="a1642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45" text:class-names="">Simbolo</text:span><text:span text:style-name="a1646" text:class-names=""><text:s text:c="1"/></text:span><text:span text:style-name="a1647" text:class-names="">']'</text:span><text:span text:style-name="a1648" text:class-names=""><text:s text:c="1"/></text:span><text:span text:style-name="a1649" text:class-names="">(POP):</text:span><text:span text:style-name="a1650" text:class-names=""><text:s text:c="1"/></text:span><text:span text:style-name="a1651" text:class-names="">Estrae</text:span><text:span text:style-name="a1652" text:class-names=""><text:s text:c="1"/></text:span><text:span text:style-name="a1653" text:class-names="">l</text:span><text:span text:style-name="a1654" text:class-names="">'ultimo</text:span><text:span text:style-name="a1655" text:class-names=""><text:s text:c="1"/></text:span><text:span text:style-name="a1656" text:class-names="">stato</text:span><text:span text:style-name="a1657" text:class-names=""><text:s text:c="1"/></text:span><text:span text:style-name="a1658" text:class-names="">salvato</text:span><text:span text:style-name="a1659" text:class-names=""><text:s text:c="1"/></text:span><text:span text:style-name="a1660" text:class-names="">dallo</text:span><text:span text:style-name="a1661" text:class-names=""><text:s text:c="1"/></text:span><text:span text:style-name="a1662" text:class-names="">Stack</text:span><text:span text:style-name="a1663" text:class-names=""><text:s text:c="1"/></text:span><text:span text:style-name="a1664" text:class-names="">e <text:tab/></text:span><text:span text:style-name="a1665" text:class-names="">teletrasporta</text:span><text:span text:style-name="a1666" text:class-names=""><text:s text:c="1"/></text:span><text:span text:style-name="a1667" text:class-names="">indietro</text:span><text:span text:style-name="a1668" text:class-names=""><text:s text:c="1"/></text:span><text:span text:style-name="a1669" text:class-names="">la</text:span><text:span text:style-name="a1670" text:class-names=""><text:s text:c="1"/></text:span><text:span text:style-name="a1671" text:class-names="">tartaruga</text:span><text:span text:style-name="a1672" text:class-names=""><text:s text:c="1"/></text:span><text:span text:style-name="a1673" text:class-names="">al<text:s text:c="1"/></text:span><text:span text:style-name="a1674" text:class-names="">bivio</text:span><text:span text:style-name="a1675" text:class-names=""><text:s text:c="1"/></text:span><text:span text:style-name="a1676" text:class-names="">originale</text:span><text:span text:style-name="a1677" text:class-names="">.</text:span><text:span text:style-name="a1678" text:class-names=""/></text:p>
              </text:list-item>
            </text:list>
            <text:list text:style-name="a1716">
              <text:list-item>
                <text:p text:style-name="a1715" text:class-names="" text:cond-style-name=""><text:span text:style-name="a1681" text:class-names=""><text:tab/></text:span><text:span text:style-name="a1682" text:class-names="">Struttura</text:span><text:span text:style-name="a1683" text:class-names=""><text:s text:c="1"/></text:span><text:span text:style-name="a1684" text:class-names="">LIFO:</text:span><text:span text:style-name="a1685" text:class-names=""><text:s text:c="1"/></text:span><text:span text:style-name="a1686" text:class-names="">Senza</text:span><text:span text:style-name="a1687" text:class-names=""><text:s text:c="1"/></text:span><text:span text:style-name="a1688" text:class-names="">questa</text:span><text:span text:style-name="a1689" text:class-names=""><text:s text:c="1"/></text:span><text:span text:style-name="a1690" text:class-names="">gestione</text:span><text:span text:style-name="a1691" text:class-names=""><text:s text:c="1"/></text:span><text:span text:style-name="a1692" text:class-names="">dinamica</text:span><text:span text:style-name="a1693" text:class-names=""><text:s text:c="1"/></text:span><text:span text:style-name="a1694" text:class-names="">dei</text:span><text:span text:style-name="a1695" text:class-names=""><text:s text:c="1"/></text:span><text:span text:style-name="a1696" text:class-names="">dati</text:span><text:span text:style-name="a1697" text:class-names="">,<text:s text:c="1"/></text:span><text:span text:style-name="a1698" text:class-names="">l'algoritmo</text:span><text:span text:style-name="a1699" text:class-names=""><text:s text:c="1"/></text:span><text:span text:style-name="a1700" text:class-names="">non</text:span><text:span text:style-name="a1701" text:class-names=""><text:s text:c="1"/></text:span><text:span text:style-name="a1702" text:class-names="">potrebbe</text:span><text:span text:style-name="a1703" text:class-names=""><text:s text:c="1"/></text:span><text:span text:style-name="a1704" text:class-names="">generare</text:span><text:span text:style-name="a1705" text:class-names=""><text:s text:c="1"/></text:span><text:span text:style-name="a1706" text:class-names="">strutture</text:span><text:span text:style-name="a1707" text:class-names=""><text:s text:c="1"/></text:span><text:span text:style-name="a1708" text:class-names="">ad</text:span><text:span text:style-name="a1709" text:class-names=""><text:s text:c="1"/></text:span><text:span text:style-name="a1710" text:class-names="">albero</text:span><text:span text:style-name="a1711" text:class-names=""><text:s text:c="1"/></text:span><text:span text:style-name="a1712" text:class-names="">gerarchiche</text:span><text:span text:style-name="a1713" text:class-names="">.</text:span><text:span text:style-name="a1714" text:class-names=""/></text:p>
              </text:list-item>
            </text:list>
          </draw:text-box>
          <svg:title/>
          <svg:desc/>
        </draw:frame>
        <draw:frame draw:id="id104" draw:style-name="a1718" draw:name="Immagine 1" svg:x="10.88317in" svg:y="2.77382in" svg:width="10.6555in" svg:height="7.75in" style:rel-width="scale" style:rel-height="scale">
          <draw:image xlink:href="media/image19.png" xlink:type="simple" xlink:show="embed" xlink:actuate="onLoad"/>
          <svg:title/>
          <svg:desc>Immagine che contiene verde, disegno, Elementi grafici, arte

Il contenuto generato dall&amp;#39;IA potrebbe non essere corretto.</svg:desc>
        </draw:frame>
      </draw:page>
      <draw:page draw:name="Slide11" draw:style-name="a1719" draw:master-page-name="Master1-Layout2-obj-Title-and-Content" presentation:presentation-page-layout-name="Master1-PPL2" draw:id="Slide-266">
        <draw:custom-shape svg:x="1.41929in" svg:y="0.96466in" svg:width="0in" svg:height="0.80972in" draw:id="id105" draw:style-name="a1722" draw:name="object 2">
          <svg:title/>
          <svg:desc/>
          <text:p text:style-name="a1721" text:class-names="" text:cond-style-name=""><text:span text:style-name="a1720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custom-shape svg:x="13.05744in" svg:y="10.17108in" svg:width="7.41528in" svg:height="0in" draw:id="id106" draw:style-name="a1725" draw:name="object 3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type="non-primitive" svg:viewBox="0 0 6780530 0" draw:enhanced-path="M 0 0 L 678000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80530"/>
            <draw:equation draw:name="f7" draw:formula="?f4 / 0"/>
            <draw:equation draw:name="f8" draw:formula="0 / ?f6"/>
            <draw:equation draw:name="f9" draw:formula="6780530 / ?f6"/>
            <draw:equation draw:name="f10" draw:formula="0 / ?f7"/>
            <draw:equation draw:name="f11" draw:formula="1 / ?f7"/>
          </draw:enhanced-geometry>
        </draw:custom-shape>
        <draw:custom-shape svg:x="10.51133in" svg:y="10.17108in" svg:width="2.28819in" svg:height="0in" draw:id="id107" draw:style-name="a1728" draw:name="object 4">
          <svg:title/>
          <svg:desc/>
          <text:p text:style-name="a1727" text:class-names="" text:cond-style-name=""><text:span text:style-name="a1726" text:class-names=""/></text:p>
          <draw:enhanced-geometry xmlns:dr3d="urn:oasis:names:tc:opendocument:xmlns:dr3d:1.0" draw:type="non-primitive" svg:viewBox="0 0 2092325 0" draw:enhanced-path="M 0 0 L 20922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2325"/>
            <draw:equation draw:name="f7" draw:formula="?f4 / 0"/>
            <draw:equation draw:name="f8" draw:formula="0 / ?f6"/>
            <draw:equation draw:name="f9" draw:formula="2092325 / ?f6"/>
            <draw:equation draw:name="f10" draw:formula="0 / ?f7"/>
            <draw:equation draw:name="f11" draw:formula="1 / ?f7"/>
          </draw:enhanced-geometry>
        </draw:custom-shape>
        <draw:custom-shape svg:x="1.54831in" svg:y="10.17108in" svg:width="8.63681in" svg:height="0in" draw:id="id108" draw:style-name="a1731" draw:name="object 5">
          <svg:title/>
          <svg:desc/>
          <text:p text:style-name="a1730" text:class-names="" text:cond-style-name=""><text:span text:style-name="a1729" text:class-names=""/></text:p>
          <draw:enhanced-geometry xmlns:dr3d="urn:oasis:names:tc:opendocument:xmlns:dr3d:1.0" draw:type="non-primitive" svg:viewBox="0 0 7897495 0" draw:enhanced-path="M 0 0 L 7896892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897495"/>
            <draw:equation draw:name="f7" draw:formula="?f4 / 0"/>
            <draw:equation draw:name="f8" draw:formula="0 / ?f6"/>
            <draw:equation draw:name="f9" draw:formula="7897495 / ?f6"/>
            <draw:equation draw:name="f10" draw:formula="0 / ?f7"/>
            <draw:equation draw:name="f11" draw:formula="1 / ?f7"/>
          </draw:enhanced-geometry>
        </draw:custom-shape>
        <draw:frame draw:id="id109" presentation:style-name="a1740" draw:name="object 6" svg:x="1.7711in" svg:y="1.00244in" svg:width="15.81358in" svg:height="0.77222in" presentation:class="title" presentation:placeholder="false">
          <draw:text-box>
            <text:p text:style-name="a1739" text:class-names="" text:cond-style-name=""><text:span text:style-name="a1732" text:class-names="">GRAMMATICA</text:span><text:span text:style-name="a1733" text:class-names=""><text:s text:c="1"/></text:span><text:span text:style-name="a1734" text:class-names="">PER</text:span><text:span text:style-name="a1735" text:class-names=""><text:s text:c="1"/></text:span><text:span text:style-name="a1736" text:class-names="">TARTARUGA</text:span><text:span text:style-name="a1737" text:class-names=""><text:s text:c="1"/></text:span><text:span text:style-name="a1738" text:class-names="">3D</text:span></text:p>
          </draw:text-box>
          <svg:title/>
          <svg:desc>$PPTXTitle</svg:desc>
        </draw:frame>
        <draw:custom-shape svg:x="4.72235in" svg:y="3.77219in" svg:width="4.22986in" svg:height="0.44444in" draw:id="id110" draw:style-name="a1743" draw:name="object 7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3867784 406400" draw:enhanced-path="M 3867747 406007 L 0 406007 0 0 3867747 0 3867747 40600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67784"/>
            <draw:equation draw:name="f7" draw:formula="?f4 / 406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1" draw:name="object 8" svg:x="1.37198in" svg:y="3.77219in" svg:width="19.28194in" svg:height="6.28403in">
          <table:table table:style-name="a174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45" table:default-cell-style-name=""/>
            <table:table-column table:style-name="a1746" table:default-cell-style-name=""/>
            <table:table-column table:style-name="a1747" table:default-cell-style-name=""/>
            <table:table-column table:style-name="a1748" table:default-cell-style-name=""/>
            <table:table-column table:style-name="a1749" table:default-cell-style-name=""/>
            <table:table-column table:style-name="a1750" table:default-cell-style-name=""/>
            <table:table-row table:style-name="a1751" table:default-cell-style-name="">
              <table:table-cell table:style-name="a1755" table:number-rows-spanned="2">
                <text:list text:style-name="a1754">
                  <text:list-item>
                    <text:p text:style-name="a1753" text:class-names="" text:cond-style-name=""><text:span text:style-name="a1752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SIMBOLO</text:span><text:span text:style-name="a1757" text:class-names=""/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1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65" text:class-names="">AZIONE</text:span><text:span text:style-name="a1766" text:class-names=""><text:s text:c="1"/></text:span><text:span text:style-name="a1767" text:class-names="">GRAFICA</text:span><text:span text:style-name="a1768" text:class-names=""><text:s text:c="1"/></text:span><text:span text:style-name="a1769" text:class-names="">SVOLTA</text:span><text:span text:style-name="a1770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74" text:class-names="">TIPO</text:span><text:span text:style-name="a1775" text:class-names=""><text:s text:c="1"/></text:span><text:span text:style-name="a1776" text:class-names="">DI</text:span><text:span text:style-name="a1777" text:class-names=""><text:s text:c="1"/></text:span><text:span text:style-name="a1778" text:class-names="">TRASFORMAZIONE</text:span><text:span text:style-name="a1779" text:class-names=""><text:s text:c="1"/></text:span><text:span text:style-name="a1780" text:class-names="">GEOMETRICA</text:span><text:span text:style-name="a1781" text:class-names=""/></text:p>
                  </text:list-item>
                </text:list>
              </table:table-cell>
              <table:table-cell table:style-name="a1788" table:number-rows-spanned="2">
                <text:list text:style-name="a1787">
                  <text:list-item>
                    <text:p text:style-name="a1786" text:class-names="" text:cond-style-name=""><text:span text:style-name="a1785" text:class-names=""/></text:p>
                  </text:list-item>
                </text:list>
              </table:table-cell>
            </table:table-row>
            <table:table-row table:style-name="a1789" table:default-cell-style-name="">
              <table:covered-table-cell table:style-name=""/>
              <table:table-cell table:style-name="a1797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  <text:list text:style-name="a1796">
                  <text:list-item>
                    <text:p text:style-name="a1795" text:class-names="" text:cond-style-name=""><text:span text:style-name="a1793" text:class-names="">F</text:span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21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  <text:list text:style-name="a1820">
                  <text:list-item>
                    <text:p text:style-name="a1819" text:class-names="" text:cond-style-name=""><text:span text:style-name="a1805" text:class-names="">Avanza</text:span><text:span text:style-name="a1806" text:class-names=""><text:s text:c="1"/></text:span><text:span text:style-name="a1807" text:class-names="">e</text:span><text:span text:style-name="a1808" text:class-names=""><text:s text:c="1"/></text:span><text:span text:style-name="a1809" text:class-names="">traccia</text:span><text:span text:style-name="a1810" text:class-names=""><text:s text:c="1"/></text:span><text:span text:style-name="a1811" text:class-names="">la</text:span><text:span text:style-name="a1812" text:class-names=""><text:s text:c="1"/></text:span><text:span text:style-name="a1813" text:class-names="">mesh</text:span><text:span text:style-name="a1814" text:class-names=""><text:s text:c="1"/></text:span><text:span text:style-name="a1815" text:class-names="">del</text:span><text:span text:style-name="a1816" text:class-names=""><text:s text:c="1"/></text:span><text:span text:style-name="a1817" text:class-names="">segmento</text:span><text:span text:style-name="a1818" text:class-names=""/></text:p>
                  </text:list-item>
                </text:list>
              </table:table-cell>
              <table:table-cell table:style-name="a1839">
                <text:list text:style-name="a1824">
                  <text:list-item>
                    <text:p text:style-name="a1823" text:class-names="" text:cond-style-name=""><text:span text:style-name="a1822" text:class-names=""/></text:p>
                  </text:list-item>
                </text:list>
                <text:list text:style-name="a1838">
                  <text:list-item>
                    <text:p text:style-name="a1837" text:class-names="" text:cond-style-name=""><text:span text:style-name="a1825" text:class-names="">Traslazione</text:span><text:span text:style-name="a1826" text:class-names=""><text:s text:c="1"/></text:span><text:span text:style-name="a1827" text:class-names="">lineare</text:span><text:span text:style-name="a1828" text:class-names=""><text:s text:c="1"/></text:span><text:span text:style-name="a1829" text:class-names="">+</text:span><text:span text:style-name="a1830" text:class-names=""><text:s text:c="1"/></text:span><text:span text:style-name="a1831" text:class-names="">Costruzione</text:span><text:span text:style-name="a1832" text:class-names=""><text:s text:c="1"/></text:span><text:span text:style-name="a1833" text:class-names="">Mesh</text:span><text:span text:style-name="a1834" text:class-names=""><text:s text:c="1"/></text:span><text:span text:style-name="a1835" text:class-names="">Cilindrica</text:span><text:span text:style-name="a1836" text:class-names=""/></text:p>
                  </text:list-item>
                </text:list>
              </table:table-cell>
              <table:covered-table-cell table:style-name=""/>
            </table:table-row>
            <table:table-row table:style-name="a1840" table:default-cell-style-name="">
              <table:table-cell table:style-name="a1844">
                <text:list text:style-name="a1843">
                  <text:list-item>
                    <text:p text:style-name="a1842" text:class-names="" text:cond-style-name=""><text:span text:style-name="a1841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+/-</text:span><text:span text:style-name="a1846" text:class-names=""/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50" text:class-names=""/></text:p>
                  </text:list-item>
                </text:list>
              </table:table-cell>
              <table:table-cell table:style-name="a1869">
                <text:list text:style-name="a1868">
                  <text:list-item>
                    <text:p text:style-name="a1867" text:class-names="" text:cond-style-name=""><text:span text:style-name="a1854" text:class-names="">Ruota</text:span><text:span text:style-name="a1855" text:class-names=""><text:s text:c="1"/></text:span><text:span text:style-name="a1856" text:class-names="">a</text:span><text:span text:style-name="a1857" text:class-names=""><text:s text:c="1"/></text:span><text:span text:style-name="a1858" text:class-names="">sinistra<text:s text:c="1"/></text:span><text:span text:style-name="a1859" text:class-names="">/</text:span><text:span text:style-name="a1860" text:class-names=""><text:tab/></text:span><text:span text:style-name="a1861" text:class-names="">destra</text:span><text:span text:style-name="a1862" text:class-names=""><text:s text:c="1"/></text:span><text:span text:style-name="a1863" text:class-names="">nello</text:span><text:span text:style-name="a1864" text:class-names=""><text:s text:c="1"/></text:span><text:span text:style-name="a1865" text:class-names="">spazio</text:span><text:span text:style-name="a1866" text:class-names=""/></text:p>
                  </text:list-item>
                </text:list>
              </table:table-cell>
              <table:table-cell table:style-name="a1882">
                <text:list text:style-name="a1881">
                  <text:list-item>
                    <text:p text:style-name="a1880" text:class-names="" text:cond-style-name=""><text:span text:style-name="a1870" text:class-names="">Rotazione</text:span><text:span text:style-name="a1871" text:class-names=""><text:s text:c="1"/></text:span><text:span text:style-name="a1872" text:class-names="">sull'asse</text:span><text:span text:style-name="a1873" text:class-names=""><text:s text:c="1"/></text:span><text:span text:style-name="a1874" text:class-names="">Up</text:span><text:span text:style-name="a1875" text:class-names=""><text:s text:c="1"/></text:span><text:span text:style-name="a1876" text:class-names="">(Yaw/</text:span><text:span text:style-name="a1877" text:class-names=""><text:s text:c="1"/></text:span><text:span text:style-name="a1878" text:class-names="">Imbardata)</text:span><text:span text:style-name="a1879" text:class-names=""/></text:p>
                  </text:list-item>
                </text:list>
              </table:table-cell>
              <table:table-cell table:style-name="a1886">
                <text:list text:style-name="a1885">
                  <text:list-item>
                    <text:p text:style-name="a1884" text:class-names="" text:cond-style-name=""><text:span text:style-name="a1883" text:class-names=""/></text:p>
                  </text:list-item>
                </text:list>
              </table:table-cell>
            </table:table-row>
            <table:table-row table:style-name="a1887" table:default-cell-style-name=""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able:table-cell>
              <table:table-cell table:style-name="a1896">
                <text:list text:style-name="a1895">
                  <text:list-item>
                    <text:p text:style-name="a1894" text:class-names="" text:cond-style-name=""><text:span text:style-name="a1892" text:class-names="">&amp; <text:s text:c="1"/>/ <text:s text:c="1"/>^</text:span><text:span text:style-name="a1893" text:class-names=""/></text:p>
                  </text:list-item>
                </text:list>
              </table:table-cell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/></text:p>
                  </text:list-item>
                </text:list>
              </table:table-cell>
              <table:table-cell table:style-name="a1916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  <text:list text:style-name="a1915">
                  <text:list-item>
                    <text:p text:style-name="a1914" text:class-names="" text:cond-style-name=""><text:span text:style-name="a1904" text:class-names="">Inclinati</text:span><text:span text:style-name="a1905" text:class-names=""><text:s text:c="1"/></text:span><text:span text:style-name="a1906" text:class-names="">in</text:span><text:span text:style-name="a1907" text:class-names=""><text:s text:c="1"/></text:span><text:span text:style-name="a1908" text:class-names="">basso/</text:span><text:span text:style-name="a1909" text:class-names=""><text:s text:c="1"/></text:span><text:span text:style-name="a1910" text:class-names="">in</text:span><text:span text:style-name="a1911" text:class-names=""><text:s text:c="1"/></text:span><text:span text:style-name="a1912" text:class-names="">alto</text:span><text:span text:style-name="a1913" text:class-names=""/></text:p>
                  </text:list-item>
                </text:list>
              </table:table-cell>
              <table:table-cell table:style-name="a1932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  <text:list text:style-name="a1931">
                  <text:list-item>
                    <text:p text:style-name="a1930" text:class-names="" text:cond-style-name=""><text:span text:style-name="a1920" text:class-names="">Rotazione</text:span><text:span text:style-name="a1921" text:class-names=""><text:s text:c="1"/></text:span><text:span text:style-name="a1922" text:class-names="">sull'asse</text:span><text:span text:style-name="a1923" text:class-names=""><text:s text:c="1"/></text:span><text:span text:style-name="a1924" text:class-names="">Left</text:span><text:span text:style-name="a1925" text:class-names=""><text:s text:c="1"/></text:span><text:span text:style-name="a1926" text:class-names="">(Pitch/</text:span><text:span text:style-name="a1927" text:class-names=""><text:s text:c="1"/></text:span><text:span text:style-name="a1928" text:class-names="">Beccheggio)</text:span><text:span text:style-name="a1929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3" text:class-names=""/></text:p>
                  </text:list-item>
                </text:list>
              </table:table-cell>
            </table:table-row>
            <table:table-row table:style-name="a1937" table:default-cell-style-name="">
              <table:table-cell table:style-name="a1941">
                <text:list text:style-name="a1940">
                  <text:list-item>
                    <text:p text:style-name="a1939" text:class-names="" text:cond-style-name=""><text:span text:style-name="a1938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2" text:class-names="">\ e /</text:span><text:span text:style-name="a1943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51" text:class-names="">Ruota</text:span><text:span text:style-name="a1952" text:class-names=""><text:s text:c="1"/></text:span><text:span text:style-name="a1953" text:class-names="">attomo</text:span><text:span text:style-name="a1954" text:class-names=""><text:s text:c="1"/></text:span><text:span text:style-name="a1955" text:class-names="">all'asse</text:span><text:span text:style-name="a1956" text:class-names=""><text:s text:c="1"/></text:span><text:span text:style-name="a1957" text:class-names="">di</text:span><text:span text:style-name="a1958" text:class-names=""><text:s text:c="1"/></text:span><text:span text:style-name="a1959" text:class-names="">disegno</text:span><text:span text:style-name="a1960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64" text:class-names="">Rotazione</text:span><text:span text:style-name="a1965" text:class-names=""><text:s text:c="1"/></text:span><text:span text:style-name="a1966" text:class-names="">sull'asse</text:span><text:span text:style-name="a1967" text:class-names=""><text:s text:c="1"/></text:span><text:span text:style-name="a1968" text:class-names="">Heading</text:span><text:span text:style-name="a1969" text:class-names=""><text:s text:c="1"/></text:span><text:span text:style-name="a1970" text:class-names="">(Roll/</text:span><text:span text:style-name="a1971" text:class-names=""><text:s text:c="1"/></text:span><text:span text:style-name="a1972" text:class-names="">Rollio)</text:span><text:span text:style-name="a1973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/></text:p>
                  </text:list-item>
                </text:list>
              </table:table-cell>
            </table:table-row>
            <table:table-row table:style-name="a1981" table:default-cell-style-name="">
              <table:table-cell table:style-name="a1985">
                <text:list text:style-name="a1984">
                  <text:list-item>
                    <text:p text:style-name="a1983" text:class-names="" text:cond-style-name=""><text:span text:style-name="a1982" text:class-names=""/></text:p>
                  </text:list-item>
                </text:list>
              </table:table-cell>
              <table:table-cell table:style-name="a1994">
                <text:list text:style-name="a1993">
                  <text:list-item>
                    <text:p text:style-name="a1992" text:class-names="" text:cond-style-name=""><text:span text:style-name="a1986" text:class-names="">[</text:span><text:span text:style-name="a1987" text:class-names=""><text:tab/></text:span><text:span text:style-name="a1988" text:class-names="">/</text:span><text:span text:style-name="a1989" text:class-names=""><text:tab/></text:span><text:span text:style-name="a1990" text:class-names="">]</text:span><text:span text:style-name="a1991" text:class-names=""/></text:p>
                  </text:list-item>
                </text:list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/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1999" text:class-names="">Inizia</text:span><text:span text:style-name="a2000" text:class-names=""><text:s text:c="1"/></text:span><text:span text:style-name="a2001" text:class-names="">nuovo</text:span><text:span text:style-name="a2002" text:class-names=""><text:s text:c="1"/></text:span><text:span text:style-name="a2003" text:class-names="">ramo</text:span><text:span text:style-name="a2004" text:class-names=""><text:s text:c="1"/></text:span><text:span text:style-name="a2005" text:class-names="">/</text:span><text:span text:style-name="a2006" text:class-names=""><text:tab/>Ritorna</text:span><text:span text:style-name="a2007" text:class-names=""><text:s text:c="1"/></text:span><text:span text:style-name="a2008" text:class-names="">al</text:span><text:span text:style-name="a2009" text:class-names=""><text:s text:c="1"/></text:span><text:span text:style-name="a2010" text:class-names="">bivio</text:span><text:span text:style-name="a2011" text:class-names=""/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15" text:class-names="">Gestione</text:span><text:span text:style-name="a2016" text:class-names=""><text:s text:c="1"/></text:span><text:span text:style-name="a2017" text:class-names="">della</text:span><text:span text:style-name="a2018" text:class-names=""><text:s text:c="1"/></text:span><text:span text:style-name="a2019" text:class-names="">Pila</text:span><text:span text:style-name="a2020" text:class-names=""><text:s text:c="1"/></text:span><text:span text:style-name="a2021" text:class-names="">di</text:span><text:span text:style-name="a2022" text:class-names=""><text:s text:c="1"/></text:span><text:span text:style-name="a2023" text:class-names="">Memoria</text:span><text:span text:style-name="a2024" text:class-names=""><text:s text:c="1"/></text:span><text:span text:style-name="a2025" text:class-names="">(LIFO</text:span><text:span text:style-name="a2026" text:class-names=""><text:s text:c="1"/></text:span><text:span text:style-name="a2027" text:class-names="">State</text:span><text:span text:style-name="a2028" text:class-names=""><text:s text:c="1"/></text:span><text:span text:style-name="a2029" text:class-names="">Stack)</text:span><text:span text:style-name="a2030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/></text:p>
                  </text:list-item>
                </text:list>
              </table:table-cell>
            </table:table-row>
            <table:table-row table:style-name="a2038" table:default-cell-style-name=""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/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/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/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1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5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/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</draw:page>
      <draw:page draw:name="Slide25" draw:style-name="a2063" draw:master-page-name="Master1-Layout3-obj-Two-Content" presentation:presentation-page-layout-name="Master1-PPL3" draw:id="Slide-280">
        <draw:custom-shape svg:x="1.41929in" svg:y="0.96466in" svg:width="0in" svg:height="0.80972in" draw:id="id112" draw:style-name="a2066" draw:name="object 3">
          <svg:title/>
          <svg:desc/>
          <text:p text:style-name="a2065" text:class-names="" text:cond-style-name=""><text:span text:style-name="a2064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13" presentation:style-name="a2072" draw:name="object 10" svg:x="1.7711in" svg:y="1.00244in" svg:width="15.81358in" svg:height="0.77222in" presentation:class="title" presentation:placeholder="false">
          <draw:text-box>
            <text:p text:style-name="a2071" text:class-names="" text:cond-style-name=""><text:span text:style-name="a2067" text:class-names="">FreeGlut</text:span><text:span text:style-name="a2068" text:class-names=""><text:s text:c="1"/>e<text:s text:c="1"/></text:span><text:span text:style-name="a2069" text:class-names="">openGL</text:span><text:span text:style-name="a2070" text:class-names=""/></text:p>
          </draw:text-box>
          <svg:title/>
          <svg:desc>$PPTXTitle</svg:desc>
        </draw:frame>
        <draw:frame draw:id="id114" draw:style-name="a2094" draw:name="object 11" svg:x="1.15555in" svg:y="3.77987in" svg:width="9.39283in" svg:height="4.11059in">
          <draw:text-box>
            <text:p text:style-name="a2076" text:class-names="" text:cond-style-name=""><text:span text:style-name="a2073" text:class-names="">Si è scelto di utilizzare le nozioni imparate nel corso per creare un esempio di parser per la generazione di piante tramite<text:s text:c="1"/></text:span><text:span text:style-name="a2074" text:class-names="">procedure.</text:span><text:span text:style-name="a2075" text:class-names=""/></text:p>
            <text:p text:style-name="a2078" text:class-names="" text:cond-style-name=""><text:span text:style-name="a2077" text:class-names=""/></text:p>
            <text:p text:style-name="a2090" text:class-names="" text:cond-style-name=""><text:span text:style-name="a2079" text:class-names="">Molte nozioni della<text:s text:c="1"/></text:span><text:span text:style-name="a2080" text:class-names="">turtle</text:span><text:span text:style-name="a2081" text:class-names=""><text:s text:c="1"/>graphics sono contenute in librerie quali l'omonima libreria per<text:s text:c="1"/></text:span><text:span text:style-name="a2082" text:class-names="">python</text:span><text:span text:style-name="a2083" text:class-names="">, o Go-</text:span><text:span text:style-name="a2084" text:class-names="">turtle</text:span><text:span text:style-name="a2085" text:class-names="">, ma come richiesto si sono prese queste basilari nozioni quali l'orientamento e la scrittura e si sono applicate anche grazie all'utilizzo delle funzioni<text:s text:c="1"/></text:span><text:span text:style-name="a2086" text:class-names="">built</text:span><text:span text:style-name="a2087" text:class-names="">-in di<text:s text:c="1"/></text:span><text:span text:style-name="a2088" text:class-names="">freeGlut</text:span><text:span text:style-name="a2089" text:class-names="">.</text:span></text:p>
            <text:p text:style-name="a2093" text:class-names="" text:cond-style-name=""><text:span text:style-name="a2091" text:class-names="">Anche la pila è gestita nel medesimo modo.</text:span><text:span text:style-name="a2092" text:class-names=""/></text:p>
          </draw:text-box>
          <svg:title/>
          <svg:desc/>
        </draw:frame>
        <draw:frame draw:id="id115" draw:style-name="a2095" draw:name="Immagine 3" svg:x="11.59785in" svg:y="1.7616in" svg:width="9.82223in" svg:height="9.4375in" style:rel-width="scale" style:rel-height="scale">
          <draw:image xlink:href="media/image21.png" xlink:type="simple" xlink:show="embed" xlink:actuate="onLoad"/>
          <svg:title/>
          <svg:desc>Immagine che contiene testo, schermata, software, schermo

Il contenuto generato dall&amp;#39;IA potrebbe non essere corretto.</svg:desc>
        </draw:frame>
      </draw:page>
      <draw:page draw:name="Slide26" draw:style-name="a2096" draw:master-page-name="Master1-Layout3-obj-Two-Content" presentation:presentation-page-layout-name="Master1-PPL3" draw:id="Slide-281">
        <draw:custom-shape svg:x="1.41929in" svg:y="0.96466in" svg:width="0in" svg:height="0.80972in" draw:id="id116" draw:style-name="a2099" draw:name="object 3">
          <svg:title/>
          <svg:desc/>
          <text:p text:style-name="a2098" text:class-names="" text:cond-style-name=""><text:span text:style-name="a2097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17" presentation:style-name="a2105" draw:name="object 10" svg:x="1.7711in" svg:y="1.00244in" svg:width="15.81358in" svg:height="0.77222in" presentation:class="title" presentation:placeholder="false">
          <draw:text-box>
            <text:p text:style-name="a2104" text:class-names="" text:cond-style-name=""><text:span text:style-name="a2100" text:class-names="">FreeGlut</text:span><text:span text:style-name="a2101" text:class-names=""><text:s text:c="1"/>e<text:s text:c="1"/></text:span><text:span text:style-name="a2102" text:class-names="">openGL</text:span><text:span text:style-name="a2103" text:class-names=""/></text:p>
          </draw:text-box>
          <svg:title/>
          <svg:desc>$PPTXTitle</svg:desc>
        </draw:frame>
        <draw:frame draw:id="id118" draw:style-name="a2121" draw:name="object 11" svg:x="1.10372in" svg:y="4.28527in" svg:width="9.39283in" svg:height="2.48262in">
          <draw:text-box>
            <text:p text:style-name="a2109" text:class-names="" text:cond-style-name=""><text:span text:style-name="a2106" text:class-names="">Push e pop per gli stati, cosi da utilizzare la tartaruga come previsto dalla<text:s text:c="1"/></text:span><text:span text:style-name="a2107" text:class-names="">turtle</text:span><text:span text:style-name="a2108" text:class-names=""><text:s text:c="1"/>graphics.</text:span></text:p>
            <text:p text:style-name="a2111" text:class-names="" text:cond-style-name=""><text:span text:style-name="a2110" text:class-names=""/></text:p>
            <text:p text:style-name="a2120" text:class-names="" text:cond-style-name=""><text:span text:style-name="a2112" text:class-names="">La libreria<text:s text:c="1"/></text:span><text:span text:style-name="a2113" text:class-names="">freeGlut</text:span><text:span text:style-name="a2114" text:class-names=""><text:s text:c="1"/>fornisce già una gestione del<text:s text:c="1"/></text:span><text:span text:style-name="a2115" text:class-names="">push</text:span><text:span text:style-name="a2116" text:class-names=""><text:s text:c="1"/>e del pop per le matrici, ma questa nozione viene espansa per il controllo degli stati tramite<text:s text:c="1"/></text:span><text:span text:style-name="a2117" text:class-names="">push</text:span><text:span text:style-name="a2118" text:class-names=""><text:s text:c="1"/>e pop adibite appositamente.</text:span><text:span text:style-name="a2119" text:class-names=""/></text:p>
          </draw:text-box>
          <svg:title/>
          <svg:desc/>
        </draw:frame>
        <draw:frame draw:id="id119" draw:style-name="a2122" draw:name="Immagine 1" svg:x="10.88596in" svg:y="2.53137in" svg:width="10.57217in" svg:height="7.25in" style:rel-width="scale" style:rel-height="scale">
          <draw:image xlink:href="media/image22.png" xlink:type="simple" xlink:show="embed" xlink:actuate="onLoad"/>
          <svg:title/>
          <svg:desc>Immagine che contiene testo, schermata, schermo, software

Il contenuto generato dall&amp;#39;IA potrebbe non essere corretto.</svg:desc>
        </draw:frame>
      </draw:page>
      <draw:page draw:name="Slide27" draw:style-name="a2123" draw:master-page-name="Master1-Layout3-obj-Two-Content" presentation:presentation-page-layout-name="Master1-PPL3" draw:id="Slide-282">
        <draw:custom-shape svg:x="1.41929in" svg:y="0.96466in" svg:width="0in" svg:height="0.80972in" draw:id="id120" draw:style-name="a2126" draw:name="object 3">
          <svg:title/>
          <svg:desc/>
          <text:p text:style-name="a2125" text:class-names="" text:cond-style-name=""><text:span text:style-name="a2124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21" presentation:style-name="a2132" draw:name="object 10" svg:x="1.7711in" svg:y="1.00244in" svg:width="15.81358in" svg:height="0.77222in" presentation:class="title" presentation:placeholder="false">
          <draw:text-box>
            <text:p text:style-name="a2131" text:class-names="" text:cond-style-name=""><text:span text:style-name="a2127" text:class-names="">FreeGlut</text:span><text:span text:style-name="a2128" text:class-names=""><text:s text:c="1"/>e<text:s text:c="1"/></text:span><text:span text:style-name="a2129" text:class-names="">openGL</text:span><text:span text:style-name="a2130" text:class-names=""/></text:p>
          </draw:text-box>
          <svg:title/>
          <svg:desc>$PPTXTitle</svg:desc>
        </draw:frame>
        <draw:frame draw:id="id122" draw:style-name="a2159" draw:name="object 11" svg:x="1.10372in" svg:y="4.28527in" svg:width="9.39283in" svg:height="3.81607in">
          <draw:text-box>
            <text:p text:style-name="a2135" text:class-names="" text:cond-style-name=""><text:span text:style-name="a2133" text:class-names="">La stringa viene iterativamente creata tramite la regola<text:s text:c="1"/></text:span><text:span text:style-name="a2134" text:class-names="">predisposta.</text:span></text:p>
            <text:p text:style-name="a2137" text:class-names="" text:cond-style-name=""><text:span text:style-name="a2136" text:class-names=""/></text:p>
            <text:p text:style-name="a2141" text:class-names="" text:cond-style-name=""><text:span text:style-name="a2138" text:class-names="">Si mostreranno i seguenti<text:s text:c="1"/></text:span><text:span text:style-name="a2139" text:class-names="">esempi di regole e risultati a scopo esemplificativo:</text:span><text:span text:style-name="a2140" text:class-names=""/></text:p>
            <text:list text:style-name="a2145">
              <text:list-item>
                <text:p text:style-name="a2144" text:class-names="" text:cond-style-name=""><text:span text:style-name="a2142" text:class-names="">F[+F][-F] alberello;</text:span><text:span text:style-name="a2143" text:class-names=""/></text:p>
              </text:list-item>
            </text:list>
            <text:list text:style-name="a2150">
              <text:list-item>
                <text:p text:style-name="a2149" text:class-names="" text:cond-style-name=""><text:span text:style-name="a2146" text:class-names="">FF[+F][-F] alberello lungo (da notare la<text:s text:c="1"/></text:span><text:span text:style-name="a2147" text:class-names="">doppia F;</text:span><text:span text:style-name="a2148" text:class-names=""/></text:p>
              </text:list-item>
            </text:list>
            <text:list text:style-name="a2154">
              <text:list-item>
                <text:p text:style-name="a2153" text:class-names="" text:cond-style-name=""><text:span text:style-name="a2151" text:class-names="">FF+[+F-F] viticcio (quella proposta nella traccia);</text:span><text:span text:style-name="a2152" text:class-names=""/></text:p>
              </text:list-item>
            </text:list>
            <text:list text:style-name="a2158">
              <text:list-item>
                <text:p text:style-name="a2157" text:class-names="" text:cond-style-name=""><text:span text:style-name="a2155" text:class-names="">F+[+F-F]-F rampicante;</text:span><text:span text:style-name="a2156" text:class-names=""/></text:p>
              </text:list-item>
            </text:list>
          </draw:text-box>
          <svg:title/>
          <svg:desc/>
        </draw:frame>
        <draw:frame draw:id="id123" draw:style-name="a2160" draw:name="Immagine 3" svg:x="11.20074in" svg:y="2.2991in" svg:width="10.07221in" svg:height="6.83333in" style:rel-width="scale" style:rel-height="scale">
          <draw:image xlink:href="media/image23.png" xlink:type="simple" xlink:show="embed" xlink:actuate="onLoad"/>
          <svg:title/>
          <svg:desc>Immagine che contiene testo, schermata, software

Il contenuto generato dall&amp;#39;IA potrebbe non essere corretto.</svg:desc>
        </draw:frame>
      </draw:page>
      <draw:page draw:name="Slide28" draw:style-name="a2161" draw:master-page-name="Master1-Layout3-obj-Two-Content" presentation:presentation-page-layout-name="Master1-PPL3" draw:id="Slide-283">
        <draw:custom-shape svg:x="1.41929in" svg:y="0.96466in" svg:width="0in" svg:height="0.80972in" draw:id="id124" draw:style-name="a2164" draw:name="object 3">
          <svg:title/>
          <svg:desc/>
          <text:p text:style-name="a2163" text:class-names="" text:cond-style-name=""><text:span text:style-name="a2162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25" presentation:style-name="a2170" draw:name="object 10" svg:x="1.7711in" svg:y="1.00244in" svg:width="15.81358in" svg:height="0.77222in" presentation:class="title" presentation:placeholder="false">
          <draw:text-box>
            <text:p text:style-name="a2169" text:class-names="" text:cond-style-name=""><text:span text:style-name="a2165" text:class-names="">FreeGlut</text:span><text:span text:style-name="a2166" text:class-names=""><text:s text:c="1"/>e<text:s text:c="1"/></text:span><text:span text:style-name="a2167" text:class-names="">openGL</text:span><text:span text:style-name="a2168" text:class-names=""/></text:p>
          </draw:text-box>
          <svg:title/>
          <svg:desc>$PPTXTitle</svg:desc>
        </draw:frame>
        <draw:frame draw:id="id126" draw:style-name="a2187" draw:name="object 11" svg:x="1.10372in" svg:y="4.28527in" svg:width="9.39283in" svg:height="2.48262in">
          <draw:text-box>
            <text:p text:style-name="a2174" text:class-names="" text:cond-style-name=""><text:span text:style-name="a2171" text:class-names="">Disegno del cilindro da parte della tart</text:span><text:span text:style-name="a2172" text:class-names="">aruga.</text:span><text:span text:style-name="a2173" text:class-names=""/></text:p>
            <text:p text:style-name="a2176" text:class-names="" text:cond-style-name=""><text:span text:style-name="a2175" text:class-names=""/></text:p>
            <text:p text:style-name="a2186" text:class-names="" text:cond-style-name=""><text:span text:style-name="a2177" text:class-names="">Ancora una volta,<text:s text:c="1"/></text:span><text:span text:style-name="a2178" text:class-names="">freeGlut</text:span><text:span text:style-name="a2179" text:class-names=""><text:s text:c="1"/>torna utile con la funzione<text:s text:c="1"/></text:span><text:span text:style-name="a2180" text:class-names="">built</text:span><text:span text:style-name="a2181" text:class-names="">-in<text:s text:c="1"/></text:span><text:span text:style-name="a2182" text:class-names="">gluCylinder</text:span><text:span text:style-name="a2183" text:class-names="">, permettendoci di disegnare i cilindri con i quali creare senza troppa difficoltà, e con un certo stile, i pezzi delle<text:s text:c="1"/></text:span><text:span text:style-name="a2184" text:class-names="">piante.</text:span><text:span text:style-name="a2185" text:class-names=""/></text:p>
          </draw:text-box>
          <svg:title/>
          <svg:desc/>
        </draw:frame>
        <draw:frame draw:id="id127" draw:style-name="a2188" draw:name="Immagine 1" svg:x="11.7976in" svg:y="4.27933in" svg:width="8.64523in" svg:height="3.52083in" style:rel-width="scale" style:rel-height="scale">
          <draw:image xlink:href="media/image24.png" xlink:type="simple" xlink:show="embed" xlink:actuate="onLoad"/>
          <svg:title/>
          <svg:desc>Immagine che contiene testo, schermata, Carattere

Il contenuto generato dall&amp;#39;IA potrebbe non essere corretto.</svg:desc>
        </draw:frame>
      </draw:page>
      <draw:page draw:name="Slide12" draw:style-name="a2189" draw:master-page-name="Master1-Layout2-obj-Title-and-Content" presentation:presentation-page-layout-name="Master1-PPL2" draw:id="Slide-267">
        <draw:frame draw:id="id128" draw:style-name="a2190" draw:name="object 2" svg:x="1.35907in" svg:y="4.22006in" svg:width="19.28511in" svg:height="4.28887in" style:rel-width="scale" style:rel-height="scale">
          <draw:image xlink:href="media/image25.png" xlink:type="simple" xlink:show="embed" xlink:actuate="onLoad"/>
          <svg:title/>
          <svg:desc/>
        </draw:frame>
        <draw:custom-shape svg:x="1.41929in" svg:y="0.96466in" svg:width="0in" svg:height="0.80972in" draw:id="id129" draw:style-name="a2193" draw:name="object 3">
          <svg:title/>
          <svg:desc/>
          <text:p text:style-name="a2192" text:class-names="" text:cond-style-name=""><text:span text:style-name="a2191" text:class-names=""/></text:p>
          <draw:enhanced-geometry xmlns:dr3d="urn:oasis:names:tc:opendocument:xmlns:dr3d:1.0" draw:type="non-primitive" svg:viewBox="0 0 0 740410" draw:enhanced-path="M 0 74024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40410"/>
            <draw:equation draw:name="f8" draw:formula="0 / ?f6"/>
            <draw:equation draw:name="f9" draw:formula="1 / ?f6"/>
            <draw:equation draw:name="f10" draw:formula="0 / ?f7"/>
            <draw:equation draw:name="f11" draw:formula="740410 / ?f7"/>
          </draw:enhanced-geometry>
        </draw:custom-shape>
        <draw:frame draw:id="id130" presentation:style-name="a2203" draw:name="object 4" svg:x="1.7711in" svg:y="1.00244in" svg:width="15.81358in" svg:height="0.77222in" presentation:class="title" presentation:placeholder="false">
          <draw:text-box>
            <text:p text:style-name="a2202" text:class-names="" text:cond-style-name=""><text:span text:style-name="a2194" text:class-names="">EFFICIENZA</text:span><text:span text:style-name="a2195" text:class-names=""><text:s text:c="1"/></text:span><text:span text:style-name="a2196" text:class-names="">DELLA</text:span><text:span text:style-name="a2197" text:class-names=""><text:s text:c="1"/></text:span><text:span text:style-name="a2198" text:class-names="">PROCEDURALIT</text:span><text:span text:style-name="a2199" text:class-names="">A</text:span><text:span text:style-name="a2200" text:class-names="">'</text:span><text:span text:style-name="a2201" text:class-names=""/></text:p>
          </draw:text-box>
          <svg:title/>
          <svg:desc>$PPTXTitle</svg:desc>
        </draw:frame>
        <draw:frame draw:id="id131" draw:style-name="a2213" draw:name="object 5" svg:x="15.87908in" svg:y="5.08892in" svg:width="3.03472in" svg:height="0.35347in">
          <draw:text-box>
            <text:p text:style-name="a2212" text:class-names="" text:cond-style-name=""><text:span text:style-name="a2204" text:class-names="">Ore</text:span><text:span text:style-name="a2205" text:class-names=""><text:s text:c="1"/></text:span><text:span text:style-name="a2206" text:class-names="">di</text:span><text:span text:style-name="a2207" text:class-names=""><text:s text:c="1"/></text:span><text:span text:style-name="a2208" text:class-names="">Lavoro</text:span><text:span text:style-name="a2209" text:class-names=""><text:s text:c="1"/></text:span><text:span text:style-name="a2210" text:class-names="">Artistico</text:span><text:span text:style-name="a2211" text:class-names=""/></text:p>
          </draw:text-box>
          <svg:title/>
          <svg:desc/>
        </draw:frame>
        <draw:frame draw:id="id132" draw:style-name="a2257" draw:name="object 6" svg:x="1.72514in" svg:y="8.92565in" svg:width="18.58333in" svg:height="0.4in">
          <draw:text-box>
            <text:p text:style-name="a2256" text:class-names="" text:cond-style-name=""><text:span text:style-name="a2214" text:class-names="">L'approccio</text:span><text:span text:style-name="a2215" text:class-names=""><text:s text:c="1"/></text:span><text:span text:style-name="a2216" text:class-names="">consente</text:span><text:span text:style-name="a2217" text:class-names=""><text:s text:c="1"/></text:span><text:span text:style-name="a2218" text:class-names="">di</text:span><text:span text:style-name="a2219" text:class-names=""><text:s text:c="1"/></text:span><text:span text:style-name="a2220" text:class-names="">distribuire</text:span><text:span text:style-name="a2221" text:class-names=""><text:s text:c="1"/></text:span><text:span text:style-name="a2222" text:class-names="">un'intera</text:span><text:span text:style-name="a2223" text:class-names=""><text:s text:c="1"/></text:span><text:span text:style-name="a2224" text:class-names="">foresta</text:span><text:span text:style-name="a2225" text:class-names=""><text:s text:c="1"/></text:span><text:span text:style-name="a2226" text:class-names="">unica</text:span><text:span text:style-name="a2227" text:class-names=""><text:s text:c="1"/></text:span><text:span text:style-name="a2228" text:class-names="">con</text:span><text:span text:style-name="a2229" text:class-names=""><text:s text:c="1"/></text:span><text:span text:style-name="a2230" text:class-names="">pochissimi</text:span><text:span text:style-name="a2231" text:class-names=""><text:s text:c="1"/></text:span><text:span text:style-name="a2232" text:class-names="">byte</text:span><text:span text:style-name="a2233" text:class-names=""><text:s text:c="1"/></text:span><text:span text:style-name="a2234" text:class-names="">salvando</text:span><text:span text:style-name="a2235" text:class-names=""><text:s text:c="1"/></text:span><text:span text:style-name="a2236" text:class-names="">solo</text:span><text:span text:style-name="a2237" text:class-names=""><text:s text:c="1"/></text:span><text:span text:style-name="a2238" text:class-names="">le</text:span><text:span text:style-name="a2239" text:class-names=""><text:s text:c="1"/></text:span><text:span text:style-name="a2240" text:class-names="">regale</text:span><text:span text:style-name="a2241" text:class-names=""><text:s text:c="1"/></text:span><text:span text:style-name="a2242" text:class-names="">d'origine</text:span><text:span text:style-name="a2243" text:class-names=""><text:s text:c="1"/></text:span><text:span text:style-name="a2244" text:class-names="">e</text:span><text:span text:style-name="a2245" text:class-names=""><text:s text:c="1"/></text:span><text:span text:style-name="a2246" text:class-names="">il</text:span><text:span text:style-name="a2247" text:class-names=""><text:s text:c="1"/></text:span><text:span text:style-name="a2248" text:class-names="">seme</text:span><text:span text:style-name="a2249" text:class-names=""><text:s text:c="1"/></text:span><text:span text:style-name="a2250" text:class-names="">(Seed)</text:span><text:span text:style-name="a2251" text:class-names=""><text:s text:c="1"/></text:span><text:span text:style-name="a2252" text:class-names="">di</text:span><text:span text:style-name="a2253" text:class-names=""><text:s text:c="1"/></text:span><text:span text:style-name="a2254" text:class-names="">generazione.</text:span><text:span text:style-name="a2255" text:class-names=""/></text:p>
          </draw:text-box>
          <svg:title/>
          <svg:desc/>
        </draw:frame>
      </draw:page>
      <draw:page draw:name="Slide14" draw:style-name="a2258" draw:master-page-name="Master1-Layout5-obj-Blank" presentation:presentation-page-layout-name="Master1-PPL5" draw:id="Slide-269">
        <draw:frame draw:id="id133" draw:style-name="a2259" draw:name="object 2" svg:x="0in" svg:y="0in" svg:width="21.98611in" svg:height="12.36719in" style:rel-width="scale" style:rel-height="scale">
          <draw:image xlink:href="media/image26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96in" svg:y="3.8341in" svg:width="18.6882in" svg:height="2.59729in"/>
      <presentation:placeholder presentation:object="subtitle" svg:x="3.29792in" svg:y="6.92611in" svg:width="15.39028in" svg:height="3.09201in"/>
      <presentation:placeholder presentation:object="footer" svg:x="7.47528in" svg:y="11.50229in" svg:width="7.03556in" svg:height="0.6184in"/>
      <presentation:placeholder presentation:object="date-time" svg:x="1.09931in" svg:y="11.50229in" svg:width="5.05681in" svg:height="0.6184in"/>
      <presentation:placeholder presentation:object="page-number" svg:x="15.83in" svg:y="11.50229in" svg:width="5.05681in" svg:height="0.6184in"/>
    </style:presentation-page-layout>
    <style:presentation-page-layout style:name="Master1-PPL2" style:display-name="Title and Content">
      <presentation:placeholder presentation:object="title" svg:x="1.7711in" svg:y="1.00244in" svg:width="15.81358in" svg:height="0.77222in"/>
      <presentation:placeholder presentation:object="outline" svg:x="1.33031in" svg:y="3.77219in" svg:width="19.34722in" svg:height="6.28403in"/>
      <presentation:placeholder presentation:object="footer" svg:x="7.47528in" svg:y="11.50229in" svg:width="7.03556in" svg:height="0.6184in"/>
      <presentation:placeholder presentation:object="date-time" svg:x="1.09931in" svg:y="11.50229in" svg:width="5.05681in" svg:height="0.6184in"/>
      <presentation:placeholder presentation:object="page-number" svg:x="15.83in" svg:y="11.50229in" svg:width="5.05681in" svg:height="0.6184in"/>
    </style:presentation-page-layout>
    <style:presentation-page-layout style:name="Master1-PPL3" style:display-name="Two Content">
      <presentation:placeholder presentation:object="title" svg:x="1.7711in" svg:y="1.00244in" svg:width="15.81358in" svg:height="0.77222in"/>
      <presentation:placeholder presentation:object="object" svg:x="1.09931in" svg:y="2.84465in" svg:width="9.56396in" svg:height="8.16292in"/>
      <presentation:placeholder presentation:object="object" svg:x="11.32285in" svg:y="2.84465in" svg:width="9.56396in" svg:height="8.16292in"/>
      <presentation:placeholder presentation:object="footer" svg:x="7.47528in" svg:y="11.50229in" svg:width="7.03556in" svg:height="0.6184in"/>
      <presentation:placeholder presentation:object="date-time" svg:x="1.09931in" svg:y="11.50229in" svg:width="5.05681in" svg:height="0.6184in"/>
      <presentation:placeholder presentation:object="page-number" svg:x="15.83in" svg:y="11.50229in" svg:width="5.05681in" svg:height="0.6184in"/>
    </style:presentation-page-layout>
    <style:presentation-page-layout style:name="Master1-PPL4" style:display-name="Title Only">
      <presentation:placeholder presentation:object="title" svg:x="1.7711in" svg:y="1.00244in" svg:width="15.81358in" svg:height="0.77222in"/>
      <presentation:placeholder presentation:object="footer" svg:x="7.47528in" svg:y="11.50229in" svg:width="7.03556in" svg:height="0.6184in"/>
      <presentation:placeholder presentation:object="date-time" svg:x="1.09931in" svg:y="11.50229in" svg:width="5.05681in" svg:height="0.6184in"/>
      <presentation:placeholder presentation:object="page-number" svg:x="15.83in" svg:y="11.50229in" svg:width="5.05681in" svg:height="0.6184in"/>
    </style:presentation-page-layout>
    <style:presentation-page-layout style:name="Master1-PPL5" style:display-name="Blank">
      <presentation:placeholder presentation:object="footer" svg:x="7.47528in" svg:y="11.50229in" svg:width="7.03556in" svg:height="0.6184in"/>
      <presentation:placeholder presentation:object="date-time" svg:x="1.09931in" svg:y="11.50229in" svg:width="5.05681in" svg:height="0.6184in"/>
      <presentation:placeholder presentation:object="page-number" svg:x="15.83in" svg:y="11.50229in" svg:width="5.05681in" svg:height="0.6184in"/>
    </style:presentation-page-layout>
    <style:style style:family="table-cell" style:name="a101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table:table-template table:name="{2D5ABB26-0587-4C30-8999-92F81FD0307C}">
      <table:body table:style-name="a101" table:paragraph-style-name=""/>
    </table:table-template>
  </office:styles>
  <office:automatic-styles>
    <style:page-layout style:name="pageLayout1">
      <style:page-layout-properties fo:page-width="21.98611in" fo:page-height="12.36806in" style:print-orientation="landscape" style:register-truth-ref-style-name=""/>
    </style:page-layout>
    <style:page-layout style:name="pageLayout3">
      <style:page-layout-properties fo:page-width="21.98611in" fo:page-height="12.36806in" style:print-orientation="landscape" style:register-truth-ref-style-name=""/>
    </style:page-layout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946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1c31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1c31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1c31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1c31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1c312a" style:text-line-through-type="none" style:text-line-through-style="none" style:text-line-through-width="auto" style:text-line-through-color="font-color" style:text-position="0% 100%" fo:font-family="Arial" style:font-family-complex="Arial" fo:font-size="0.61806in" style:font-size-asian="0.61806in" style:font-size-complex="0.6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Holder 2" svg:x="1.7711in" svg:y="1.00244in" svg:width="15.81358in" svg:height="0.77222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Holder 3" svg:x="1.33031in" svg:y="3.77219in" svg:width="19.34722in" svg:height="6.2840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Holder 4" svg:x="7.47528in" svg:y="11.50229in" svg:width="7.03556in" svg:height="0.6184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4" draw:name="Holder 5" svg:x="1.09931in" svg:y="11.50229in" svg:width="5.05681in" svg:height="0.6184in" presentation:class="date-time" presentation:placeholder="false">
        <draw:text-box>
          <text:p text:style-name="a13" text:class-names="" text:cond-style-name=""><text:span text:style-name="a11" text:class-names=""><text:date text:fixed="false" style:data-style-name="a12">6/28/2026</text:date></text:span></text:p>
        </draw:text-box>
        <svg:title/>
        <svg:desc/>
      </draw:frame>
      <draw:frame draw:id="id4" presentation:style-name="a17" draw:name="Holder 6" svg:x="15.83in" svg:y="11.50229in" svg:width="5.05681in" svg:height="0.6184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1-obj-Title-Slide" style:page-layout-name="pageLayout1" draw:style-name="a18">
      <draw:frame draw:id="id5" presentation:style-name="a21" draw:name="Holder 2" svg:x="1.64896in" svg:y="3.8341in" svg:width="18.6882in" svg:height="2.59729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Holder 3" svg:x="3.29792in" svg:y="6.92611in" svg:width="15.39028in" svg:height="3.09201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7" draw:name="Holder 4" svg:x="7.47528in" svg:y="11.50229in" svg:width="7.03556in" svg:height="0.618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8" presentation:style-name="a31" draw:name="Holder 5" svg:x="1.09931in" svg:y="11.50229in" svg:width="5.05681in" svg:height="0.6184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6/28/2026</text:date></text:span></text:p>
        </draw:text-box>
        <svg:title/>
        <svg:desc/>
      </draw:frame>
      <draw:frame draw:id="id9" presentation:style-name="a34" draw:name="Holder 6" svg:x="15.83in" svg:y="11.50229in" svg:width="5.05681in" svg:height="0.6184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35">
      <draw:frame draw:id="id10" presentation:style-name="a38" draw:name="Holder 2" svg:x="1.7711in" svg:y="1.00244in" svg:width="15.81358in" svg:height="0.77222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1" presentation:style-name="a42" draw:name="Holder 3" svg:x="1.33031in" svg:y="3.77219in" svg:width="19.34722in" svg:height="6.28403in" presentation:class="outline" presentation:placeholder="false">
        <draw:text-box>
          <text:list text:style-name="a41">
            <text:list-item>
              <text:p text:style-name="a40" text:class-names="" text:cond-style-name=""><text:span text:style-name="a39" text:class-names=""/></text:p>
            </text:list-item>
          </text:list>
        </draw:text-box>
        <svg:title/>
        <svg:desc/>
      </draw:frame>
      <draw:frame draw:id="id12" presentation:style-name="a45" draw:name="Holder 4" svg:x="7.47528in" svg:y="11.50229in" svg:width="7.03556in" svg:height="0.6184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3" presentation:style-name="a49" draw:name="Holder 5" svg:x="1.09931in" svg:y="11.50229in" svg:width="5.05681in" svg:height="0.6184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6/28/2026</text:date></text:span></text:p>
        </draw:text-box>
        <svg:title/>
        <svg:desc/>
      </draw:frame>
      <draw:frame draw:id="id14" presentation:style-name="a52" draw:name="Holder 6" svg:x="15.83in" svg:y="11.50229in" svg:width="5.05681in" svg:height="0.6184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3-obj-Two-Content" style:page-layout-name="pageLayout1" draw:style-name="a53">
      <draw:custom-shape svg:x="1.41929in" svg:y="0.96466in" svg:width="0in" svg:height="0.80972in" draw:id="id15" draw:style-name="a56" draw:name="bg object 1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0 740410" draw:enhanced-path="M 0 740248 L 0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740410"/>
          <draw:equation draw:name="f8" draw:formula="0 / ?f6"/>
          <draw:equation draw:name="f9" draw:formula="1 / ?f6"/>
          <draw:equation draw:name="f10" draw:formula="0 / ?f7"/>
          <draw:equation draw:name="f11" draw:formula="740410 / ?f7"/>
        </draw:enhanced-geometry>
      </draw:custom-shape>
      <draw:frame draw:id="id16" presentation:style-name="a59" draw:name="Holder 2" svg:x="1.7711in" svg:y="1.00244in" svg:width="15.81358in" svg:height="0.77222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7" presentation:style-name="a62" draw:name="Holder 3" svg:x="1.09931in" svg:y="2.84465in" svg:width="9.56396in" svg:height="8.16292in" presentation:class="object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Holder 4" svg:x="11.32285in" svg:y="2.84465in" svg:width="9.56396in" svg:height="8.16292in" presentation:class="object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8" draw:name="Holder 5" svg:x="7.47528in" svg:y="11.50229in" svg:width="7.03556in" svg:height="0.6184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20" presentation:style-name="a72" draw:name="Holder 6" svg:x="1.09931in" svg:y="11.50229in" svg:width="5.05681in" svg:height="0.6184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6/28/2026</text:date></text:span></text:p>
        </draw:text-box>
        <svg:title/>
        <svg:desc/>
      </draw:frame>
      <draw:frame draw:id="id21" presentation:style-name="a75" draw:name="Holder 7" svg:x="15.83in" svg:y="11.50229in" svg:width="5.05681in" svg:height="0.6184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4-obj-Title-Only" style:page-layout-name="pageLayout1" draw:style-name="a76">
      <draw:frame draw:id="id22" presentation:style-name="a79" draw:name="Holder 2" svg:x="1.7711in" svg:y="1.00244in" svg:width="15.81358in" svg:height="0.77222in" presentation:class="titl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3" presentation:style-name="a82" draw:name="Holder 3" svg:x="7.47528in" svg:y="11.50229in" svg:width="7.03556in" svg:height="0.6184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4" presentation:style-name="a86" draw:name="Holder 4" svg:x="1.09931in" svg:y="11.50229in" svg:width="5.05681in" svg:height="0.6184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6/28/2026</text:date></text:span></text:p>
        </draw:text-box>
        <svg:title/>
        <svg:desc/>
      </draw:frame>
      <draw:frame draw:id="id25" presentation:style-name="a89" draw:name="Holder 5" svg:x="15.83in" svg:y="11.50229in" svg:width="5.05681in" svg:height="0.618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5-obj-Blank" style:page-layout-name="pageLayout1" draw:style-name="a90">
      <draw:frame draw:id="id26" presentation:style-name="a93" draw:name="Holder 2" svg:x="7.47528in" svg:y="11.50229in" svg:width="7.03556in" svg:height="0.6184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Holder 3" svg:x="1.09931in" svg:y="11.50229in" svg:width="5.05681in" svg:height="0.6184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6/28/2026</text:date></text:span></text:p>
        </draw:text-box>
        <svg:title/>
        <svg:desc/>
      </draw:frame>
      <draw:frame draw:id="id28" presentation:style-name="a100" draw:name="Holder 4" svg:x="15.83in" svg:y="11.50229in" svg:width="5.05681in" svg:height="0.618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N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tion</dc:title>
    <meta:creation-date>2026-06-20T09:52:20Z</meta:creation-date>
    <dc:date>2026-06-28T23:42:04Z</dc:date>
    <meta:template xlink:href="" xlink:type="simple"/>
    <meta:editing-cycles>478</meta:editing-cycles>
    <meta:editing-duration>PT0S</meta:editing-duration>
    <meta:user-defined meta:name="Created" meta:value-type="date">2026-06-20T00:00:00Z</meta:user-defined>
    <meta:user-defined meta:name="LastSaved" meta:value-type="date">2026-06-20T00:00:00Z</meta:user-defined>
  </office:meta>
</office:document-meta>
</file>